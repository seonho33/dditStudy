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 style:master-page-name="Standard">
      <style:table-properties style:width="14.776cm" fo:margin-left="0.113cm" fo:margin-right="0.111cm" fo:margin-top="0.101cm" fo:margin-bottom="0cm" style:page-number="auto" table:align="margins" style:may-break-between-rows="false" table:border-model="collapsing"/>
    </style:style>
    <style:style style:name="표1.A" style:family="table-column">
      <style:table-column-properties style:column-width="3.073cm" style:rel-column-width="13628*"/>
    </style:style>
    <style:style style:name="표1.B" style:family="table-column">
      <style:table-column-properties style:column-width="3.034cm" style:rel-column-width="13455*"/>
    </style:style>
    <style:style style:name="표1.C" style:family="table-column">
      <style:table-column-properties style:column-width="0.549cm" style:rel-column-width="2433*"/>
    </style:style>
    <style:style style:name="표1.D" style:family="table-column">
      <style:table-column-properties style:column-width="2.443cm" style:rel-column-width="10835*"/>
    </style:style>
    <style:style style:name="표1.E" style:family="table-column">
      <style:table-column-properties style:column-width="5.678cm" style:rel-column-width="25184*"/>
    </style:style>
    <style:style style:name="표1.1" style:family="table-row">
      <style:table-row-properties style:min-row-height="0.653cm" style:keep-together="true" fo:keep-together="auto"/>
    </style:style>
    <style:style style:name="표1.A1" style:family="table-cell">
      <style:table-cell-properties style:vertical-align="middle" fo:background-color="transparent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A2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0.018cm solid #000000" fo:border-top="none" fo:border-bottom="0.018cm solid #000000" style:shadow="none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018cm solid #000000" fo:border-right="0.018cm solid #000000" fo:border-top="none" fo:border-bottom="0.018cm solid #000000" style:shadow="none"/>
    </style:style>
    <style:style style:name="표1.D3" style:family="table-cell">
      <style:table-cell-properties style:vertical-align="middle" fo:background-color="#cccc99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E3" style:family="table-cell" style:data-style-name="N0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4" style:family="table-row">
      <style:table-row-properties style:min-row-height="1.217cm" style:keep-together="true" fo:keep-together="auto"/>
    </style:style>
    <style:style style:name="표1.B4" style:family="table-cell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B5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none" fo:border-top="none" fo:border-bottom="0.018cm solid #000000" style:shadow="none">
        <style:background-image/>
      </style:table-cell-properties>
    </style:style>
    <style:style style:name="P1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3" style:family="paragraph" style:parent-style-name="바탕글">
      <style:paragraph-properties fo:margin-left="0cm" fo:margin-right="0cm" fo:margin-top="0cm" fo:margin-bottom="0cm" fo:line-height="29%" fo:text-align="center" style:justify-single-word="false" fo:text-indent="0cm" style:auto-text-indent="false" fo:padding="0cm" fo:border="none" style:shadow="none" style:line-break="strict" style:vertical-align="auto" style:snap-to-layout-grid="true"/>
    </style:style>
    <style:style style:name="P4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5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7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line-break="strict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8" style:family="paragraph" style:parent-style-name="바탕글">
      <style:paragraph-properties fo:line-height="93%" fo:text-align="center" style:justify-single-word="false" fo:background-color="transparent" style:line-break="strict">
        <style:background-image/>
      </style:paragraph-properties>
      <style:text-properties style:font-name="맑은 고딕" style:font-name-asian="맑은 고딕" style:language-asian="ko" style:country-asian="KR" style:font-name-complex="맑은 고딕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Heading_20_4">
      <style:text-properties fo:font-size="10pt" style:font-size-asian="10pt" style:font-size-complex="10pt"/>
    </style:style>
    <style:style style:name="P11" style:family="paragraph" style:parent-style-name="바탕글" style:master-page-name="Standard">
      <style:paragraph-properties fo:margin-left="0cm" fo:margin-right="0cm" fo:margin-top="0cm" fo:margin-bottom="0cm" fo:line-height="93%" fo:text-align="center" style:justify-single-word="false" fo:text-indent="0cm" style:auto-text-indent="false" style:page-number="auto" fo:padding="0cm" fo:border="none" style:shadow="none" style:line-break="strict" style:vertical-align="auto" style:snap-to-layout-grid="true"/>
      <style:text-properties style:font-name="맑은 고딕" fo:font-size="25pt" fo:letter-spacing="normal" fo:font-weight="bold" style:letter-kerning="false" style:font-name-asian="맑은 고딕" style:font-size-asian="25pt" style:font-weight-asian="bold" style:font-name-complex="맑은 고딕" style:font-size-complex="25pt" style:font-weight-complex="bold"/>
    </style:style>
    <style:style style:name="P12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3" style:family="paragraph" style:parent-style-name="Heading_20_4"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4" style:family="paragraph" style:parent-style-name="Heading_20_2">
      <style:text-properties fo:font-size="9pt" style:font-size-asian="9pt" style:font-size-complex="9pt"/>
    </style:style>
    <style:style style:name="P15" style:family="paragraph" style:parent-style-name="Heading_20_2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fo:font-size="10pt" style:font-size-asian="10pt" style:font-size-complex="10pt"/>
    </style:style>
    <style:style style:name="P16" style:family="paragraph" style:parent-style-name="Heading_20_2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fo:font-size="10pt" fo:font-weight="bold" style:font-size-asian="10pt" style:font-size-complex="10pt"/>
    </style:style>
    <style:style style:name="P17" style:family="paragraph" style:parent-style-name="Heading_20_2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fo:font-size="9pt" style:font-size-asian="9pt" style:font-size-complex="9pt"/>
    </style:style>
    <style:style style:name="P18" style:family="paragraph" style:parent-style-name="Horizontal_20_Line">
      <style:text-properties fo:font-size="9pt" style:font-size-asian="9pt" style:font-size-complex="9pt"/>
    </style:style>
    <style:style style:name="P19" style:family="paragraph" style:parent-style-name="Heading_20_3">
      <style:text-properties fo:font-size="10pt" style:font-size-asian="10pt" style:font-size-complex="10pt"/>
    </style:style>
    <style:style style:name="P20" style:family="paragraph" style:parent-style-name="Heading_20_3">
      <style:text-properties fo:font-size="9pt" style:font-size-asian="9pt" style:font-size-complex="9pt"/>
    </style:style>
    <style:style style:name="P21" style:family="paragraph" style:parent-style-name="Text_20_body" style:list-style-name="L1">
      <style:text-properties fo:font-size="10pt" style:font-size-asian="10pt" style:font-size-complex="10pt"/>
    </style:style>
    <style:style style:name="P22" style:family="paragraph" style:parent-style-name="Text_20_body" style:list-style-name="L2">
      <style:text-properties fo:font-size="10pt" style:font-size-asian="10pt" style:font-size-complex="10pt"/>
    </style:style>
    <style:style style:name="P23" style:family="paragraph" style:parent-style-name="Text_20_body" style:list-style-name="L3">
      <style:text-properties fo:font-size="10pt" style:font-size-asian="10pt" style:font-size-complex="10pt"/>
    </style:style>
    <style:style style:name="P24" style:family="paragraph" style:parent-style-name="Text_20_body" style:list-style-name="L4">
      <style:text-properties fo:font-size="10pt" style:font-size-asian="10pt" style:font-size-complex="10pt"/>
    </style:style>
    <style:style style:name="P25" style:family="paragraph" style:parent-style-name="Text_20_body" style:list-style-name="L5">
      <style:text-properties fo:font-size="10pt" style:font-size-asian="10pt" style:font-size-complex="10pt"/>
    </style:style>
    <style:style style:name="P26" style:family="paragraph" style:parent-style-name="Text_20_body" style:list-style-name="L6">
      <style:text-properties fo:font-size="10pt" style:font-size-asian="10pt" style:font-size-complex="10pt"/>
    </style:style>
    <style:style style:name="P27" style:family="paragraph" style:parent-style-name="Text_20_body" style:list-style-name="L12">
      <style:text-properties fo:font-size="10pt" style:font-size-asian="10pt" style:font-size-complex="10pt"/>
    </style:style>
    <style:style style:name="P28" style:family="paragraph" style:parent-style-name="Text_20_body" style:list-style-name="L13">
      <style:text-properties fo:font-size="10pt" style:font-size-asian="10pt" style:font-size-complex="10pt"/>
    </style:style>
    <style:style style:name="P29" style:family="paragraph" style:parent-style-name="Text_20_body" style:list-style-name="L14">
      <style:text-properties fo:font-size="10pt" style:font-size-asian="10pt" style:font-size-complex="10pt"/>
    </style:style>
    <style:style style:name="P30" style:family="paragraph" style:parent-style-name="Text_20_body" style:list-style-name="L15">
      <style:text-properties fo:font-size="10pt" style:font-size-asian="10pt" style:font-size-complex="10pt"/>
    </style:style>
    <style:style style:name="P31" style:family="paragraph" style:parent-style-name="Text_20_body" style:list-style-name="L16">
      <style:text-properties fo:font-size="10pt" style:font-size-asian="10pt" style:font-size-complex="10pt"/>
    </style:style>
    <style:style style:name="P32" style:family="paragraph" style:parent-style-name="Text_20_body" style:list-style-name="L17">
      <style:text-properties fo:font-size="10pt" style:font-size-asian="10pt" style:font-size-complex="10pt"/>
    </style:style>
    <style:style style:name="P33" style:family="paragraph" style:parent-style-name="Text_20_body" style:list-style-name="L18">
      <style:text-properties fo:font-size="10pt" style:font-size-asian="10pt" style:font-size-complex="10pt"/>
    </style:style>
    <style:style style:name="P34" style:family="paragraph" style:parent-style-name="Text_20_body" style:list-style-name="L2">
      <style:text-properties fo:font-size="10pt" style:font-size-asian="10pt" style:font-weight-asian="bold" style:font-size-complex="10pt"/>
    </style:style>
    <style:style style:name="P35" style:family="paragraph" style:parent-style-name="Text_20_body" style:list-style-name="L7">
      <style:text-properties fo:font-size="9pt" style:font-size-asian="9pt" style:font-size-complex="9pt"/>
    </style:style>
    <style:style style:name="P36" style:family="paragraph" style:parent-style-name="Text_20_body" style:list-style-name="L8">
      <style:text-properties fo:font-size="9pt" style:font-size-asian="9pt" style:font-size-complex="9pt"/>
    </style:style>
    <style:style style:name="P37" style:family="paragraph" style:parent-style-name="Text_20_body" style:list-style-name="L9">
      <style:text-properties fo:font-size="9pt" style:font-size-asian="9pt" style:font-size-complex="9pt"/>
    </style:style>
    <style:style style:name="P38" style:family="paragraph" style:parent-style-name="Text_20_body" style:list-style-name="L10">
      <style:text-properties fo:font-size="9pt" style:font-size-asian="9pt" style:font-size-complex="9pt"/>
    </style:style>
    <style:style style:name="P39" style:family="paragraph" style:parent-style-name="Text_20_body" style:list-style-name="L11">
      <style:text-properties fo:font-size="9pt" style:font-size-asian="9pt" style:font-size-complex="9pt"/>
    </style:style>
    <style:style style:name="P40" style:family="paragraph" style:parent-style-name="Text_20_body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fo:font-size="10pt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fo:font-weight="bold"/>
    </style:style>
    <style:style style:name="T1" style:family="text">
      <style:text-properties style:language-asian="ko" style:country-asian="K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asian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5" office:value-type="string">
            <text:p text:style-name="P11">프로젝트 수행 계획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2" table:number-rows-spanned="2" office:value-type="string">
            <text:p text:style-name="P1">프로젝트명</text:p>
          </table:table-cell>
          <table:table-cell table:style-name="표1.B2" table:number-rows-spanned="2" table:number-columns-spanned="2" office:value-type="string">
            <text:p text:style-name="P1">오더덕</text:p>
          </table:table-cell>
          <table:covered-table-cell/>
          <table:table-cell table:style-name="표1.A2" office:value-type="string">
            <text:p text:style-name="P1">팀명</text:p>
          </table:table-cell>
          <table:table-cell table:style-name="표1.B2" office:value-type="string">
            <text:p text:style-name="P1">맛도리 </text:p>
          </table:table-cell>
        </table:table-row>
        <table:table-row table:style-name="표1.1">
          <table:covered-table-cell/>
          <table:covered-table-cell/>
          <table:covered-table-cell/>
          <table:table-cell table:style-name="표1.D3" office:value-type="string">
            <text:p text:style-name="P1">인원</text:p>
          </table:table-cell>
          <table:table-cell table:style-name="표1.E3" office:value-type="float" office:value="5">
            <text:p text:style-name="P2">5</text:p>
          </table:table-cell>
        </table:table-row>
        <table:table-row table:style-name="표1.4">
          <table:table-cell table:style-name="표1.D3" office:value-type="string">
            <text:p text:style-name="P1">팀명</text:p>
          </table:table-cell>
          <table:table-cell table:style-name="표1.B4" table:number-columns-spanned="4" office:value-type="string">
            <text:p text:style-name="P2">노태호, 한소희, 김보라, 김아영, 도선호 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3" office:value-type="string">
            <text:p text:style-name="P2">개요</text:p>
          </table:table-cell>
          <table:table-cell table:style-name="표1.B5" table:number-columns-spanned="2" office:value-type="string">
            <text:p text:style-name="P8">활용분야</text:p>
          </table:table-cell>
          <table:covered-table-cell/>
          <table:table-cell table:style-name="표1.B2" table:number-columns-spanned="2" office:value-type="string">
            <text:p text:style-name="P2">교육생 전용 복지 플랫폼 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2">선정이유</text:p>
          </table:table-cell>
          <table:covered-table-cell/>
          <table:table-cell table:style-name="표1.B2" table:number-columns-spanned="2" office:value-type="string">
            <text:p text:style-name="P1">수업내용을 연계한 CRUD 활용 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2">개발목표</text:p>
          </table:table-cell>
          <table:covered-table-cell/>
          <table:table-cell table:style-name="표1.B2" table:number-columns-spanned="2" office:value-type="string">
            <text:p text:style-name="P5">데이터 시각화 </text:p>
          </table:table-cell>
          <table:covered-table-cell/>
        </table:table-row>
        <table:table-row table:style-name="표1.4">
          <table:table-cell table:style-name="표1.A2" office:value-type="string">
            <text:p text:style-name="P1">내용</text:p>
            <text:p text:style-name="P1">(중분류 까지)</text:p>
          </table:table-cell>
          <table:table-cell table:style-name="표1.B2" table:number-columns-spanned="4" office:value-type="string">
            <text:h text:style-name="P17" text:outline-level="2"><text:span text:style-name="T4">1. 서비스 주체 (Actor)</text:span></text:h>
            <text:list xml:id="list6988458190822589281" text:style-name="L7">
              <text:list-item>
                <text:p text:style-name="P35"><text:span text:style-name="T4">일반 회원 </text:span><text:span text:style-name="T2">(</text:span><text:span text:style-name="T4">교육생</text:span><text:span text:style-name="T2">)</text:span>: 기수 인증을 거친 정회원으로, 맛집 탐색, 리뷰 작성, 예약 서비스 및 개인화 추천 서비스를 이용합니다.</text:p>
              </text:list-item>
              <text:list-item>
                <text:p text:style-name="P35"><text:span text:style-name="T4">판매자 </text:span><text:span text:style-name="T2">(</text:span><text:span text:style-name="T4">가게 주인</text:span><text:span text:style-name="T2">)</text:span>: 서비스에 입점하여 본인의 가게 정보를 등록/관리하고, 일반 회원의 예약을 접수 및 승인합니다.</text:p>
              </text:list-item>
              <text:list-item>
                <text:p text:style-name="P35"><text:span text:style-name="T4">관리자 </text:span><text:span text:style-name="T2">(</text:span><text:span text:style-name="T4">운영자</text:span><text:span text:style-name="T2">)</text:span>: 전체 식당 데이터, 회원 정보, 게시판을 총괄하며 통계 분석 및 특화 서비스(영달봇, 편의점 API)를 운영합니다.</text:p>
              </text:list-item>
            </text:list>
            <text:p text:style-name="P18"/>
            <text:h text:style-name="P14" text:outline-level="2">2. 주요 기능 (Key Features)</text:h>
            <text:h text:style-name="P20" text:outline-level="3">1) 회원 공통 및 가입</text:h>
            <text:list xml:id="list167903838595648618" text:style-name="L8">
              <text:list-item>
                <text:p text:style-name="P36"><text:span text:style-name="T4">데이터 기반 가입</text:span>: 기수, 이름, 생년월일 데이터가 DB 정보와 일치해야 가입 가능.</text:p>
              </text:list-item>
              <text:list-item>
                <text:p text:style-name="P36"><text:span text:style-name="T4">권한별 가입</text:span>: 일반 회원과 판매자 회원을 구분하여 가입 프로세스 진행.</text:p>
              </text:list-item>
              <text:list-item>
                <text:p text:style-name="P36"><text:span text:style-name="T4">계정 관리</text:span>: 프로필 설정(사진, 선호 카테고리), 이메일 수정, 임시 비밀번호 발송을 통한 비밀번호 재설정.</text:p>
              </text:list-item>
            </text:list>
            <text:h text:style-name="P20" text:outline-level="3">2) 일반 회원 (교육생)</text:h>
            <text:list xml:id="list831192227112921347" text:style-name="L9">
              <text:list-item>
                <text:p text:style-name="P37"><text:span text:style-name="T4">맛집 탐색 및 예약</text:span>: 다음 지도 API를 통해 주변 맛집 위치를 확인하고, 입점된 판매자 가게에 한해 예약 신청(메시지 전송).</text:p>
              </text:list-item>
              <text:list-item>
                <text:p text:style-name="P37"><text:span text:style-name="T4">개인화 서비스</text:span>: 선호 카테고리/가격대 기반 맞춤 추천, 찜 목록 관리.</text:p>
              </text:list-item>
              <text:list-item>
                <text:p text:style-name="P37"><text:span text:style-name="T4">활동 보상</text:span>: 30일 연속 출석 체크 시 '꿈돌이 뱃지' 부여.<text:span text:style-name="T1">(중요도 ↓)</text:span></text:p>
              </text:list-item>
              <text:list-item>
                <text:p text:style-name="P37"><text:span text:style-name="T4">소통 및 평가</text:span>: 별점/리뷰/댓글 작성, Q&amp;A(비밀글 가능) 이용.</text:p>
              </text:list-item>
            </text:list>
            <text:h text:style-name="P20" text:outline-level="3">3) 판매자 (가게 주인)</text:h>
            <text:list xml:id="list5255413299691276699" text:style-name="L10">
              <text:list-item>
                <text:p text:style-name="P38"><text:span text:style-name="T4">가게 관리</text:span>: 본인의 가게 등록, 정보 수정 및 삭제 기능.</text:p>
              </text:list-item>
              <text:list-item>
                <text:p text:style-name="P38"><text:span text:style-name="T4">예약 시스템</text:span>: 일반 회원의 예약 신청 확인 및 승인/거절 처리(승인 시 회원에게 메시지 전송).</text:p>
              </text:list-item>
            </text:list>
            <text:h text:style-name="P20" text:outline-level="3"><text:soft-page-break/>4) 관리자 (운영자)</text:h>
            <text:list xml:id="list5011813124494943557" text:style-name="L11">
              <text:list-item>
                <text:p text:style-name="P39"><text:span text:style-name="T4">통합 콘텐츠 관리</text:span>: 전체 맛집 데이터(이미지, 금액, 거리) 및 게시판 관리, 부적절한 가게 데이터 삭제.</text:p>
              </text:list-item>
              <text:list-item>
                <text:p text:style-name="P39"><text:span text:style-name="T4">커뮤니티 및 보안</text:span>: 블랙리스트 관리, 신고된 리뷰/댓글 최종 승인 및 삭제.</text:p>
              </text:list-item>
              <text:list-item>
                <text:p text:style-name="P39"><text:span text:style-name="T4">대시보드 및 통계</text:span>: 가게별 예약 횟수 시각화(그래프), 맛집 '좋아요' 및 조회수 통계 분석.</text:p>
              </text:list-item>
              <text:list-item>
                <text:p text:style-name="P39"><text:span text:style-name="T4">특화 서비스</text:span>: 영달봇 응답 시나리오 관리, GS25 마감 할인/세일 정보 연동.</text:p>
              </text:list-item>
            </text:list>
            <text:h text:style-name="P15" text:outline-level="2"><text:span text:style-name="T4">3. 세부 기능 설명 (Detail Scenarios)</text:span></text:h>
            <text:h text:style-name="P19" text:outline-level="3">[위치 기반 예약 서비스]</text:h>
            <text:list xml:id="list8849835813816082323" text:style-name="L12">
              <text:list-item>
                <text:p text:style-name="P27"><text:span text:style-name="T4">지도 인터페이스</text:span>: 다음 지도 API를 활용하여 주변의 모든 맛집을 표시.</text:p>
              </text:list-item>
              <text:list-item>
                <text:p text:style-name="P27"><text:span text:style-name="T4">예약 활성화 차별화</text:span>:</text:p>
                <text:list>
                  <text:list-item>
                    <text:p text:style-name="P27"><text:span text:style-name="T4">입점 판매자 가게</text:span>: '예약 가능' 버튼 활성화 및 예약 신청 가능.</text:p>
                  </text:list-item>
                  <text:list-item>
                    <text:p text:style-name="P27"><text:span text:style-name="T4">미입점 가게</text:span>: '예약 불가' 안내 및 버튼 비활성화(회색 표시).</text:p>
                  </text:list-item>
                </text:list>
              </text:list-item>
            </text:list>
            <text:h text:style-name="P19" text:outline-level="3">[스마트 챗봇: 영달봇]</text:h>
            <text:list xml:id="list4353799292733820815" text:style-name="L13">
              <text:list-item>
                <text:p text:style-name="P28"><text:span text:style-name="T4">실시간 추천</text:span>: 사용자가 입력한 카테고리 키워드에 맞는 맛집을 즉시 추천.</text:p>
              </text:list-item>
              <text:list-item>
                <text:p text:style-name="P28"><text:span text:style-name="T4">검색 예외 처리</text:span>: 입력된 키워드가 없을 경우, 사용자가 선택할 수 있는 <text:span text:style-name="T4">카테고리 버튼</text:span>을 노출하여 선택 유도.</text:p>
              </text:list-item>
            </text:list>
            <text:h text:style-name="P19" text:outline-level="3">[관리자 통계 대시보드]</text:h>
            <text:list xml:id="list5525162555207378644" text:style-name="L14">
              <text:list-item>
                <text:p text:style-name="P29"><text:span text:style-name="T4">예약 데이터 시각화</text:span>: 어떤 가게의 예약률이 높은지 한눈에 파악할 수 있도록 <text:span text:style-name="T4">그래프 형태의 대시보드</text:span> 제공.</text:p>
              </text:list-item>
              <text:list-item>
                <text:p text:style-name="P29"><text:span text:style-name="T4">리뷰 관리 시스템</text:span>: 신고 누적 리뷰는 자동으로 별도 항목으로 이동하여 관리자의 검토 후 처리.</text:p>
              </text:list-item>
            </text:list>
            <text:h text:style-name="P19" text:outline-level="3">[편의점 및 라이프스타일]</text:h>
            <text:list xml:id="list6623504877006297917" text:style-name="L15">
              <text:list-item>
                <text:p text:style-name="P30"><text:span text:style-name="T2">GS25 </text:span><text:span text:style-name="T4">연동</text:span>: 인근 GS25의 마감 할인 상품 및 갓세일 정보를 실시간으로 제공하여 교육생 편의성 증대.</text:p>
              </text:list-item>
            </text:list>
            <text:p text:style-name="P40"><text:span text:style-name="T4"/></text:p>
            <text:h text:style-name="P13" text:outline-level="4"><text:span text:style-name="T4"/></text:h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office:value-type="string">
            <text:p text:style-name="P2"/>
            <text:p text:style-name="P2"/>
            <text:p text:style-name="P2"/>
            <text:p text:style-name="P2"><text:soft-page-break/></text:p>
            <text:p text:style-name="P2">기대 효과</text:p>
          </table:table-cell>
          <table:table-cell table:style-name="표1.B2" table:number-columns-spanned="4" office:value-type="string">
            <text:h text:style-name="P16" text:outline-level="2"><text:span text:style-name="T2"/></text:h>
            <text:h text:style-name="P16" text:outline-level="2"><text:span text:style-name="T2"/></text:h>
            <text:h text:style-name="P16" text:outline-level="2"><text:span text:style-name="T2"/></text:h>
            <text:h text:style-name="P16" text:outline-level="2"><text:span text:style-name="T2"/></text:h>
            <text:h text:style-name="P16" text:outline-level="2"><text:soft-page-break/>4. 기대효과 (Expected Effects)</text:h>
            <text:h text:style-name="P19" text:outline-level="3">1) 일반 회원(교육생) 측면: 정보 접근성 및 편의성 향상</text:h>
            <text:list xml:id="list7903280461684203615" text:style-name="L16">
              <text:list-item>
                <text:p text:style-name="P31"><text:span text:style-name="T4">맞춤형 의사결정 지원</text:span>: 개인화된 선호도(카테고리, 가격대) 설정과 영달봇(챗봇)을 통해 메뉴 선택의 고민을 줄이고 만족도 높은 식사가 가능해집니다.</text:p>
              </text:list-item>
              <text:list-item>
                <text:p text:style-name="P31"><text:span text:style-name="T4">학원 생활의 활력 부여</text:span>: 30일 출석 체크와 '꿈돌이 뱃지' 같은 게이미피케이션(Gamification) 요소를 통해 서비스 이용의 재미와 학원 생활의 소소한 성취감을 제공합니다.</text:p>
              </text:list-item>
              <text:list-item>
                <text:p text:style-name="P31"><text:span text:style-name="T4">통합 편의 서비스</text:span>: 맛집 정보뿐만 아니라 실시간 GS25 마감 할인 정보를 제공받아 교육생들의 경제적인 소비를 돕습니다.</text:p>
              </text:list-item>
            </text:list>
            <text:h text:style-name="P19" text:outline-level="3">2) 판매자(가게 주인) 측면: 매출 증대 및 고객 관리 효율화</text:h>
            <text:list xml:id="list8710393283960563228" text:style-name="L17">
              <text:list-item>
                <text:p text:style-name="P32"><text:span text:style-name="T4">신규 고객 유입 경로 확보</text:span>: 지역 기반(대덕특구 등) 교육생들에게 가게를 효과적으로 노출하고, 지도 API 기반의 예약 시스템을 통해 실제 방문율을 높일 수 있습니다.</text:p>
              </text:list-item>
              <text:list-item>
                <text:p text:style-name="P32"><text:span text:style-name="T4">디지털 예약 관리</text:span>: 전화 통화 없이 메시지로 예약을 관리하고 승인할 수 있어, 바쁜 시간대에도 효율적인 고객 응대가 가능합니다.</text:p>
              </text:list-item>
              <text:list-item>
                <text:p text:style-name="P32"><text:span text:style-name="T4">미입점 업체와의 차별화</text:span>: 예약 가능 버튼 활성화를 통해 입점 업체만의 경쟁 우위를 확보하고 충성 고객을 만들 수 있습니다.</text:p>
              </text:list-item>
            </text:list>
            <text:h text:style-name="P19" text:outline-level="3">3) 관리자(운영자) 및 시스템 측면: 데이터 기반 운영 효율성</text:h>
            <text:list xml:id="list6343307322974516890" text:style-name="L18">
              <text:list-item>
                <text:p text:style-name="P33"><text:span text:style-name="T4">신뢰성 높은 커뮤니티 유지</text:span>: 기수 인증 기반의 가입 시스템과 신고 기반의 블랙리스트 관리로 허위 리뷰를 방지하고 깨끗한 정보 공유 환경을 조성합니다.</text:p>
              </text:list-item>
              <text:list-item>
                <text:p text:style-name="P33"><text:span text:style-name="T4">데이터 인사이트 도출</text:span>: 예약률, 좋아요, 조회수 등 시각화된 통계 대시보드를 통해 교육생들의 최신 외식 트렌드를 파악하고 서비스 개선 방향을 수립할 수 있습니다.</text:p>
              </text:list-item>
              <text:list-item>
                <text:p text:style-name="P33"><text:span text:style-name="T4">효율적인 콘텐츠 관리</text:span>: 영달봇 시나리오와 공지사항 시스템을 통해 반복되는 문의를 자동화하고 공지사항을 효과적으로 전달할 수 있습니다.</text:p>
              </text:list-item>
            </text:list>
            <text:p text:style-name="P41"><text:span text:style-name="T2"/>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2" office:value-type="string">
            <text:p text:style-name="P7">기타</text:p>
          </table:table-cell>
          <table:table-cell table:style-name="표1.B5" office:value-type="string">
            <text:p text:style-name="P6">개발 환경</text:p>
          </table:table-cell>
          <table:table-cell table:style-name="표1.B2" table:number-columns-spanned="3" office:value-type="string">
            <text:p text:style-name="P1">Eclipse, Oracle, javaFx, SVN</text:p>
          </table:table-cell>
          <table:covered-table-cell/>
          <table:covered-table-cell/>
        </table:table-row>
        <table:table-row table:style-name="표1.4">
          <table:covered-table-cell/>
          <table:table-cell table:style-name="표1.B5" office:value-type="string">
            <text:p text:style-name="P4">선수지식</text:p>
          </table:table-cell>
          <table:table-cell table:style-name="표1.B2" table:number-columns-spanned="3" office:value-type="string">
            <text:p text:style-name="P1">JavaFx, Oracle , ibatis. rmi</text:p>
            <text:p text:style-name="P1">API(주소, 메일, 챗봇, 캡챠)</text:p>
          </table:table-cell>
          <table:covered-table-cell/>
          <table:covered-table-cell/>
        </table:table-row>
        <table:table-row table:style-name="표1.4">
          <table:table-cell table:style-name="표1.A2" office:value-type="string">
            <text:p text:style-name="P2">프로젝트 </text:p>
            <text:p text:style-name="P2">예상</text:p>
            <text:p text:style-name="P2">소요시간</text:p>
          </table:table-cell>
          <table:table-cell table:style-name="표1.B5" office:value-type="string">
            <text:p text:style-name="P4">주말포함 여부</text:p>
          </table:table-cell>
          <table:table-cell table:style-name="표1.B2" table:number-columns-spanned="3" office:value-type="string">
            <text:p text:style-name="P1"><text:span text:style-name="T1">2026.01.05</text:span> ~ <text:span text:style-name="T1">2026.01.31</text:span> <text:span text:style-name="T1">(주말포함 </text:span>약 672시간<text:span text:style-name="T1">)</text:span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No_20_Spacing" style:display-name="No Spacing" style:family="paragraph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class="chapter">
      <style:paragraph-properties fo:margin-left="0cm" fo:margin-right="0cm" fo:margin-top="0.423cm" fo:margin-bottom="0.21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6pt" fo:letter-spacing="normal" fo:font-weight="bold" style:letter-kerning="false" style:font-name-asian="Arial1" style:font-size-asian="16pt" style:font-weight-asian="bold" style:font-name-complex="Arial1" style:font-size-complex="16pt" style:font-weight-complex="bold"/>
    </style:style>
    <style:style style:name="Subtitle" style:family="paragraph" style:class="chapter">
      <style:paragraph-properties fo:margin-left="0cm" fo:margin-right="0cm" fo:margin-top="0cm" fo:margin-bottom="0.106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2pt" fo:letter-spacing="normal" style:letter-kerning="false" style:font-name-asian="Arial1" style:font-size-asian="12pt" style:font-name-complex="Arial1" style:font-size-complex="12pt"/>
    </style:style>
    <style:style style:name="heading_20_1" style:display-name="heading 1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4pt" fo:letter-spacing="normal" style:letter-kerning="false" style:font-name-asian="Arial1" style:font-size-asian="14pt" style:font-name-complex="Arial1" style:font-size-complex="14pt"/>
    </style:style>
    <style:style style:name="heading_20_2" style:display-name="heading 2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3" style:display-name="heading 3" style:family="paragraph">
      <style:paragraph-properties fo:margin-left="2.469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4" style:display-name="heading 4" style:family="paragraph">
      <style:paragraph-properties fo:margin-left="2.822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5" style:display-name="heading 5" style:family="paragraph">
      <style:paragraph-properties fo:margin-left="3.175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6" style:display-name="heading 6" style:family="paragraph">
      <style:paragraph-properties fo:margin-left="3.528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7" style:display-name="heading 7" style:family="paragraph">
      <style:paragraph-properties fo:margin-left="3.881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8" style:display-name="heading 8" style:family="paragraph">
      <style:paragraph-properties fo:margin-left="4.233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9" style:display-name="heading 9" style:family="paragraph">
      <style:paragraph-properties fo:margin-left="4.586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Quote" style:family="paragraph">
      <style:paragraph-properties fo:margin-left="1.524cm" fo:margin-right="1.524cm" fo:margin-top="0.353cm" fo:margin-bottom="0.28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Quote" style:display-name="Intense Quote" style:family="paragraph">
      <style:paragraph-properties fo:margin-left="1.676cm" fo:margin-right="1.676cm" fo:margin-top="0.635cm" fo:margin-bottom="0.635cm" fo:line-height="160%" fo:text-align="center" style:justify-single-word="false" fo:text-indent="0cm" style:auto-text-indent="false" fo:padding="0cm" fo:border-left="none" fo:border-right="none" fo:border-top="0.011cm solid #5b9bd5" fo:border-bottom="0.011cm solid #5b9bd5" style:shadow="none" style:vertical-align="auto" style:snap-to-layout-grid="true"/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List_20_Paragraph" style:display-name="List Paragraph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Heading" style:display-name="TOC Heading" style:family="paragraph">
      <style:paragraph-properties fo:margin-left="0cm" fo:margin-right="0cm" fo:margin-top="0cm" fo:margin-bottom="0cm" fo:line-height="160%" fo:text-align="start" style:justify-single-word="false" fo:text-indent="0cm" style:auto-text-indent="false" fo:padding="0cm" fo:border="none" style:shadow="none" style:vertical-align="auto" style:snap-to-layout-grid="true"/>
      <style:text-properties fo:color="#2e74b5" style:font-name="Arial1" fo:font-size="16pt" fo:letter-spacing="normal" style:letter-kerning="false" style:font-name-asian="Arial1" style:font-size-asian="16pt" style:font-name-complex="Arial1" style:font-size-complex="16pt"/>
    </style:style>
    <style:style style:name="toc_20_1" style:display-name="toc 1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2" style:display-name="toc 2" style:family="paragraph">
      <style:paragraph-properties fo:margin-left="0.75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3" style:display-name="toc 3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4" style:display-name="toc 4" style:family="paragraph">
      <style:paragraph-properties fo:margin-left="2.24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5" style:display-name="toc 5" style:family="paragraph">
      <style:paragraph-properties fo:margin-left="2.9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6" style:display-name="toc 6" style:family="paragraph">
      <style:paragraph-properties fo:margin-left="3.7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7" style:display-name="toc 7" style:family="paragraph">
      <style:paragraph-properties fo:margin-left="4.49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8" style:display-name="toc 8" style:family="paragraph">
      <style:paragraph-properties fo:margin-left="5.2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9" style:display-name="toc 9" style:family="paragraph">
      <style:paragraph-properties fo:margin-left="5.99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본문" style:family="paragraph">
      <style:paragraph-properties fo:margin-left="0.52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1" style:display-name="개요 1" style:family="paragraph">
      <style:paragraph-properties fo:margin-left="0.353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2" style:display-name="개요 2" style:family="paragraph">
      <style:paragraph-properties fo:margin-left="0.706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3" style:display-name="개요 3" style:family="paragraph">
      <style:paragraph-properties fo:margin-left="1.05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4" style:display-name="개요 4" style:family="paragraph">
      <style:paragraph-properties fo:margin-left="1.411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5" style:display-name="개요 5" style:family="paragraph">
      <style:paragraph-properties fo:margin-left="1.764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6" style:display-name="개요 6" style:family="paragraph">
      <style:paragraph-properties fo:margin-left="2.11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7" style:display-name="개요 7" style:family="paragraph">
      <style:paragraph-properties fo:margin-left="2.46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쪽_20_번호" style:display-name="쪽 번호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머리말" style:family="paragraph">
      <style:paragraph-properties fo:margin-left="0cm" fo:margin-right="0cm" fo:margin-top="0cm" fo:margin-bottom="0cm" fo:line-height="150%" fo:text-align="justify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Foot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End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메모" style:family="paragraph">
      <style:paragraph-properties fo:margin-left="0cm" fo:margin-right="0cm" fo:margin-top="0cm" fo:margin-bottom="0cm" fo:line-height="130%" fo:text-align="start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-0.016cm" style:letter-kerning="false" style:font-name-asian="맑은 고딕" style:font-size-asian="9pt" style:font-name-complex="맑은 고딕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Subtle_20_Emphasis" style:display-name="Subtle Emphasis" style:family="text"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Emphasis" style:family="text">
      <style:text-properties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Emphasis" style:display-name="Intense Emphasis" style:family="text"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Strong" style:family="text"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Subtle_20_Reference" style:display-name="Subtle Reference" style:family="text">
      <style:text-properties fo:color="#5a5a5a" style:font-name="Arial1" fo:font-size="10pt" fo:letter-spacing="normal" style:letter-kerning="false" style:font-name-asian="Arial1" style:font-size-asian="10pt" style:font-name-complex="Arial1" style:font-size-complex="10pt"/>
    </style:style>
    <style:style style:name="Intense_20_Reference" style:display-name="Intense Reference" style:family="text">
      <style:text-properties fo:color="#5b9bd5"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Book_20_Title" style:display-name="Book Title" style:family="text">
      <style:text-properties style:font-name="Arial1" fo:font-size="10pt" fo:letter-spacing="normal" fo:font-style="italic" fo:font-weight="bold" style:letter-kerning="false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suffix=")" style:num-format="1" text:start-value="0" text:footnotes-position="page" text:start-numbering-at="page"/>
    <text:notes-configuration text:note-class="endnote" text:citation-style-name="Endnote_20_Symbol" text:master-page-name="Endnote" style:num-suffix=")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3cm" fo:border="none" fo:padding="0cm" style:shadow="none" style:writing-mode="lr-tb" style:footnote-max-height="0cm">
        <style:columns fo:column-count="1" fo:column-gap="0cm">
          <style:column-sep style:width="0.011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프로젝트 수행 계획서</dc:title>
    <dc:description/>
    <dc:subject/>
    <meta:keyword/>
    <meta:creation-date>2016-01-21T00:04:18.000</meta:creation-date>
    <meta:print-date>2018-12-17T10:43:36.000000000</meta:print-date>
    <meta:generator>OpenOffice/4.1.7$Win32 OpenOffice.org_project/417m1$Build-9800</meta:generator>
    <dc:date>2026-01-05T20:46:43.92</dc:date>
    <meta:editing-duration>PT5H3M53S</meta:editing-duration>
    <meta:editing-cycles>18</meta:editing-cycles>
    <meta:document-statistic meta:table-count="1" meta:image-count="0" meta:object-count="0" meta:page-count="3" meta:paragraph-count="79" meta:word-count="1832" meta:character-count="2553"/>
  </office:meta>
</office:document-meta>
</file>