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8000000438C2DE3366.jpg" manifest:media-type="image/jpeg"/>
  <manifest:file-entry manifest:full-path="Pictures/10000000000007800000043898828C6C.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 Black" svg:font-family="'Arial Black'" style:font-family-generic="swiss"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KR" svg:font-family="'Noto Sans KR'" style:font-family-generic="roman" style:font-pitch="variable"/>
    <style:font-face style:name="Noto Sans KR1" svg:font-family="'Noto Sans KR'" style:font-family-generic="swiss" style:font-pitch="variable"/>
    <style:font-face style:name="Noto Sans KR2" svg:font-family="'Noto Sans KR'" style:font-pitch="variable"/>
    <style:font-face style:name="Noto Sans KR3" svg:font-family="'Noto Sans KR'" style:font-family-generic="system" style:font-pitch="variable"/>
    <style:font-face style:name="Noto Sans KR4" svg:font-family="'Noto Sans KR'" style:font-family-generic="modern" style:font-pitch="variable"/>
    <style:font-face style:name="Noto Serif KR" svg:font-family="'Noto Serif KR'" style:font-family-generic="roman" style:font-pitch="variable"/>
    <style:font-face style:name="Noto Serif KR1" svg:font-family="'Noto Serif KR'" style:font-pitch="variable"/>
    <style:font-face style:name="Noto Serif KR2" svg:font-family="'Noto Serif KR'" style:font-family-generic="system" style:font-pitch="variable"/>
    <style:font-face style:name="Tahoma" svg:font-family="Tahoma" style:font-family-generic="system" style:font-pitch="variable"/>
    <style:font-face style:name="Tahoma1" svg:font-family="Tahoma" style:font-pitch="variable"/>
    <style:font-face style:name="맑은 고딕" svg:font-family="'맑은 고딕'" style:font-pitch="variable"/>
    <style:font-face style:name="맑은 고딕1" svg:font-family="'맑은 고딕'"/>
    <style:font-face style:name="맑은 고딕2" svg:font-family="'맑은 고딕'" style:font-family-generic="modern"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Graphics">
      <style:graphic-properties draw:stroke="none" draw:fill="none" style:mirror="none" style:protect="position size" loext:decorative="false"/>
    </style:style>
    <style:style style:name="gr2"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5.25cm" loext:decorative="false"/>
      <style:paragraph-properties style:writing-mode="lr-tb"/>
    </style:style>
    <style:style style:name="gr4" style:family="graphic" style:parent-style-name="standard">
      <style:graphic-properties svg:stroke-width="0.053cm" draw:marker-start-width="0.28cm" draw:marker-end-width="0.28cm" draw:textarea-horizontal-align="justify" draw:textarea-vertical-align="middle" draw:auto-grow-height="false" fo:min-height="0cm" fo:min-width="11.784cm" fo:padding-top="0.102cm" fo:padding-bottom="0.102cm" fo:padding-left="0.227cm" fo:padding-right="0.227cm" loext:decorative="false"/>
    </style:style>
    <style:style style:name="gr5" style:family="graphic" style:parent-style-name="standard">
      <style:graphic-properties draw:stroke-dash="Dash" svg:stroke-width="0.053cm" draw:marker-start-width="0.28cm" draw:marker-end-width="0.28cm" svg:stroke-linecap="butt" draw:textarea-horizontal-align="justify" draw:textarea-vertical-align="middle" draw:auto-grow-height="false" fo:min-height="0cm" fo:min-width="11.784cm" fo:padding-top="0.102cm" fo:padding-bottom="0.102cm" fo:padding-left="0.227cm" fo:padding-right="0.227cm" loext:decorative="false"/>
    </style:style>
    <style:style style:name="gr6" style:family="graphic" style:parent-style-name="standard">
      <style:graphic-properties draw:stroke="dash" draw:stroke-dash="Long_20_Dash_20_Dot" svg:stroke-width="0.053cm" draw:marker-start-width="0.28cm" draw:marker-end-width="0.28cm" svg:stroke-linecap="butt" draw:textarea-horizontal-align="justify" draw:textarea-vertical-align="middle" draw:auto-grow-height="false" fo:min-height="0cm" fo:min-width="11.784cm" fo:padding-top="0.102cm" fo:padding-bottom="0.102cm" fo:padding-left="0.227cm" fo:padding-right="0.227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9"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10" style:family="graphic">
      <style:graphic-properties style:protect="size" loext:decorative="false"/>
    </style:style>
    <style:style style:name="gr11" style:family="graphic" style:parent-style-name="Graphics">
      <style:graphic-properties draw:stroke="solid" svg:stroke-width="0.026cm" svg:stroke-color="#7f7f7f" svg:stroke-opacity="100%" draw:fill="solid" draw:fill-color="#e6e6e6" draw:opacity="100%" style:mirror="none" style:protect="position size" loext:decorative="false"/>
    </style:style>
    <style:style style:name="gr12" style:family="graphic" style:parent-style-name="standard">
      <style:graphic-properties draw:stroke="solid" svg:stroke-width="0.035cm" svg:stroke-color="#7f7f7f" svg:stroke-opacity="100%" draw:stroke-linejoin="miter" svg:stroke-linecap="butt" draw:fill="solid" draw:fill-color="#e6e6e6" draw:opacity="100%" draw:textarea-horizontal-align="center"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5cm" svg:stroke-color="#7f7f7f" svg:stroke-opacity="100%" draw:stroke-linejoin="miter" svg:stroke-linecap="butt" draw:fill="solid" draw:fill-color="#ffffff" draw:opacity="100%" draw:textarea-horizontal-align="center"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14" style:family="graphic" style:parent-style-name="objectwithoutfill">
      <style:graphic-properties svg:stroke-width="0.046cm" svg:stroke-color="#7f7f7f" draw:marker-start="화살촉_20_9" draw:marker-start-width="0.228cm" draw:marker-end="화살촉_20_10" draw:marker-end-width="0.228cm" draw:fill="none" draw:textarea-vertical-align="middle" fo:padding-top="0.148cm" fo:padding-bottom="0.148cm" fo:padding-left="0.273cm" fo:padding-right="0.273cm" loext:decorative="false"/>
    </style:style>
    <style:style style:name="gr15" style:family="graphic" style:parent-style-name="standard">
      <style:graphic-properties draw:stroke="none" draw:fill="none" draw:textarea-horizontal-align="left" draw:textarea-vertical-align="top" draw:auto-grow-height="true" draw:auto-grow-width="true" fo:min-height="0.772cm" fo:min-width="2.79cm" fo:padding-top="0.127cm" fo:padding-bottom="0.127cm" fo:padding-left="0.254cm" fo:padding-right="0.254cm" fo:wrap-option="no-wrap" loext:decorative="false"/>
      <style:paragraph-properties style:writing-mode="lr-tb"/>
    </style:style>
    <style:style style:name="gr16" style:family="graphic" style:parent-style-name="standard">
      <style:graphic-properties svg:stroke-width="0.046cm" svg:stroke-color="#7f7f7f" draw:marker-start-width="0.269cm" draw:marker-end-width="0.269cm" draw:textarea-vertical-align="middle" fo:padding-top="0.148cm" fo:padding-bottom="0.148cm" fo:padding-left="0.273cm" fo:padding-right="0.273cm" loext:decorative="false"/>
    </style:style>
    <style:style style:name="gr17" style:family="graphic" style:parent-style-name="objectwithoutfill">
      <style:graphic-properties svg:stroke-width="0.046cm" svg:stroke-color="#7f7f7f" draw:marker-start-width="0.269cm" draw:marker-end-width="0.269cm" draw:fill="none" draw:textarea-vertical-align="middle" fo:padding-top="0.148cm" fo:padding-bottom="0.148cm" fo:padding-left="0.273cm" fo:padding-right="0.273cm" loext:decorative="false"/>
    </style:style>
    <style:style style:name="gr18" style:family="graphic" style:parent-style-name="objectwithoutfill">
      <style:graphic-properties svg:stroke-width="0.046cm" svg:stroke-color="#7f7f7f" draw:marker-start-width="0.269cm" draw:marker-end="화살촉_20_34" draw:marker-end-width="0.228cm" draw:fill="none" draw:textarea-vertical-align="middle" fo:padding-top="0.148cm" fo:padding-bottom="0.148cm" fo:padding-left="0.273cm" fo:padding-right="0.273cm" loext:decorative="false"/>
    </style:style>
    <style:style style:name="gr19" style:family="graphic" style:parent-style-name="standard">
      <style:graphic-properties svg:stroke-width="0.035cm" svg:stroke-color="#b2b2b2" draw:marker-start-width="0.253cm" draw:marker-end-width="0.253cm" draw:fill-color="#eeeeee" draw:textarea-horizontal-align="justify" draw:textarea-vertical-align="middle" draw:auto-grow-height="false" fo:min-height="0.714cm" fo:min-width="27.064cm" fo:padding-top="0.093cm" fo:padding-bottom="0.093cm" fo:padding-left="0.218cm" fo:padding-right="0.218cm" loext:decorative="false"/>
    </style:style>
    <style:style style:name="gr20" style:family="graphic" style:parent-style-name="standard">
      <style:graphic-properties draw:stroke="none" svg:stroke-color="#000000" draw:fill="none" draw:fill-color="#ffffff" draw:textarea-horizontal-align="left" draw:auto-grow-height="true" draw:auto-grow-width="true" fo:min-height="0.509cm" fo:min-width="2.068cm" loext:decorative="false"/>
      <style:paragraph-properties style:writing-mode="lr-tb"/>
    </style:style>
    <style:style style:name="gr21" style:family="graphic" style:parent-style-name="objectwithoutfill">
      <style:graphic-properties svg:stroke-width="0.053cm" svg:stroke-color="#ffffff" draw:marker-start-width="0.284cm" draw:marker-end-width="0.284cm" draw:fill="none" fo:padding-top="0.136cm" fo:padding-bottom="0.136cm" fo:padding-left="0.261cm" fo:padding-right="0.261cm" loext:decorative="false"/>
    </style:style>
    <style:style style:name="gr22" style:family="graphic" style:parent-style-name="standard">
      <style:graphic-properties draw:stroke="none" svg:stroke-color="#000000" draw:fill="none" draw:fill-color="#ffffff" draw:textarea-horizontal-align="left" draw:auto-grow-height="true" draw:auto-grow-width="true" fo:min-height="0.509cm" fo:min-width="3.368cm" loext:decorative="false"/>
      <style:paragraph-properties style:writing-mode="lr-tb"/>
    </style:style>
    <style:style style:name="gr23"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24" style:family="graphic" style:parent-style-name="standard">
      <style:graphic-properties draw:stroke="solid" svg:stroke-width="0.044cm" svg:stroke-color="#7f7f7f"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25" style:family="graphic" style:parent-style-name="standard">
      <style:graphic-properties draw:stroke="solid" svg:stroke-width="0.044cm" svg:stroke-color="#7f7f7f" svg:stroke-opacity="100%" draw:stroke-linejoin="miter" svg:stroke-linecap="butt" draw:fill="none" fo:padding-top="0.147cm" fo:padding-bottom="0.147cm" fo:padding-left="0.272cm" fo:padding-right="0.272cm" loext:decorative="false"/>
    </style:style>
    <style:style style:name="gr26" style:family="graphic" style:parent-style-name="standard">
      <style:graphic-properties draw:stroke="solid" svg:stroke-width="0.044cm" svg:stroke-color="#7f7f7f" draw:marker-end="a733" svg:stroke-opacity="100%" draw:stroke-linejoin="miter" svg:stroke-linecap="butt" draw:fill="none" fo:padding-top="0.147cm" fo:padding-bottom="0.147cm" fo:padding-left="0.272cm" fo:padding-right="0.272cm" loext:decorative="false"/>
    </style:style>
    <style:style style:name="gr27" style:family="graphic" style:parent-style-name="standard">
      <style:graphic-properties svg:stroke-width="0.046cm" svg:stroke-color="#7f7f7f" draw:marker-start-width="0.269cm" draw:marker-end-width="0.269cm" svg:stroke-opacity="100%" draw:textarea-vertical-align="middle" fo:padding-top="0.148cm" fo:padding-bottom="0.148cm" fo:padding-left="0.273cm" fo:padding-right="0.273cm" loext:decorative="false"/>
    </style:style>
    <style:style style:name="gr28"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654cm" fo:min-width="2.404cm" fo:padding-top="0.125cm" fo:padding-bottom="0.125cm" fo:padding-left="0.25cm" fo:padding-right="0.25cm" fo:wrap-option="no-wrap" style:writing-mode="lr-tb" loext:decorative="false"/>
      <style:paragraph-properties style:writing-mode="lr-tb"/>
    </style:style>
    <style:style style:name="gr29" style:family="graphic" style:parent-style-name="standard">
      <style:graphic-properties draw:stroke="solid" svg:stroke-width="0.05cm" svg:stroke-color="#7f7f7f" svg:stroke-opacity="100%" draw:stroke-linejoin="miter" svg:stroke-linecap="butt" draw:fill="solid" draw:fill-color="#e7e6e6" draw:opacity="100%" draw:textarea-horizontal-align="center" draw:textarea-vertical-align="middle" draw:auto-grow-height="false" draw:auto-grow-width="false" fo:min-height="1.001cm" fo:min-width="7.212cm" fo:padding-top="0.125cm" fo:padding-bottom="0.125cm" fo:padding-left="0.25cm" fo:padding-right="0.25cm" fo:wrap-option="no-wrap" style:writing-mode="lr-tb" loext:decorative="false"/>
      <style:paragraph-properties style:writing-mode="lr-tb"/>
    </style:style>
    <style:style style:name="gr30" style:family="graphic" style:parent-style-name="standard">
      <style:graphic-properties draw:stroke="solid" svg:stroke-width="0.05cm" svg:stroke-color="#ff0000" svg:stroke-opacity="100%" draw:stroke-linejoin="miter" svg:stroke-linecap="butt" draw:fill="solid" draw:fill-color="#ffffff" draw:opacity="100%" draw:textarea-horizontal-align="center"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31" style:family="graphic" style:parent-style-name="standard">
      <style:graphic-properties draw:stroke="solid" svg:stroke-width="0.05cm" svg:stroke-color="#767171" draw:marker-end="a847"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32" style:family="graphic" style:parent-style-name="standard">
      <style:graphic-properties draw:stroke="solid" svg:stroke-width="0.05cm" svg:stroke-color="#767171" draw:marker-end="a851"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33" style:family="graphic" style:parent-style-name="standard">
      <style:graphic-properties draw:stroke="solid" svg:stroke-width="0.05cm" svg:stroke-color="#767171" draw:marker-end="a855"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34" style:family="graphic" style:parent-style-name="standard">
      <style:graphic-properties draw:stroke="solid" svg:stroke-width="0.05cm" svg:stroke-color="#767171" draw:marker-end="a859"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35" style:family="graphic" style:parent-style-name="standard">
      <style:graphic-properties draw:stroke="solid" svg:stroke-width="0.05cm" svg:stroke-color="#767171" draw:marker-end="a863"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36" style:family="graphic" style:parent-style-name="standard">
      <style:graphic-properties draw:stroke="solid" svg:stroke-width="0.05cm" svg:stroke-color="#767171" draw:marker-end="a867"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37" style:family="graphic" style:parent-style-name="standard">
      <style:graphic-properties draw:stroke="solid" svg:stroke-width="0.05cm" svg:stroke-color="#767171" draw:marker-end="a871"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38" style:family="graphic" style:parent-style-name="standard">
      <style:graphic-properties draw:stroke="solid" svg:stroke-width="0.05cm" svg:stroke-color="#7f7f7f" svg:stroke-opacity="100%" draw:stroke-linejoin="miter" svg:stroke-linecap="butt" draw:fill="solid" draw:fill-color="#e7e6e6" draw:opacity="100%" draw:textarea-horizontal-align="center"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39" style:family="graphic" style:parent-style-name="standard">
      <style:graphic-properties draw:stroke="solid" svg:stroke-width="0.053cm" svg:stroke-color="#7f7f7f" draw:marker-end="a881" svg:stroke-opacity="100%" draw:stroke-linejoin="miter" svg:stroke-linecap="butt" draw:fill="none" fo:padding-top="0.151cm" fo:padding-bottom="0.151cm" fo:padding-left="0.276cm" fo:padding-right="0.276cm" loext:decorative="false"/>
    </style:style>
    <style:style style:name="gr40" style:family="graphic" style:parent-style-name="standard">
      <style:graphic-properties draw:stroke="solid" svg:stroke-width="0.05cm" svg:stroke-color="#767171" draw:marker-end="a885"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509cm" fo:min-width="1.17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loext:decorative="false"/>
    </style:style>
    <style:style style:name="gr43" style:family="graphic" style:parent-style-name="standard">
      <style:graphic-properties draw:stroke="solid" svg:stroke-width="0.044cm" svg:stroke-color="#7f7f7f" draw:marker-end="a952" svg:stroke-opacity="100%" draw:stroke-linejoin="miter" svg:stroke-linecap="butt" draw:fill="none" fo:padding-top="0.147cm" fo:padding-bottom="0.147cm" fo:padding-left="0.272cm" fo:padding-right="0.272cm" loext:decorative="false"/>
    </style:style>
    <style:style style:name="gr44" style:family="graphic" style:parent-style-name="standard">
      <style:graphic-properties draw:stroke="solid" svg:stroke-width="0.044cm" svg:stroke-color="#7f7f7f" draw:marker-end="a955" svg:stroke-opacity="100%" draw:stroke-linejoin="miter" svg:stroke-linecap="butt" draw:fill="none" fo:padding-top="0.147cm" fo:padding-bottom="0.147cm" fo:padding-left="0.272cm" fo:padding-right="0.272cm" loext:decorative="false"/>
    </style:style>
    <style:style style:name="gr45" style:family="graphic" style:parent-style-name="standard">
      <style:graphic-properties draw:stroke="solid" svg:stroke-width="0.044cm" svg:stroke-color="#7f7f7f" draw:marker-end="a957" svg:stroke-opacity="100%" draw:stroke-linejoin="miter" svg:stroke-linecap="butt" draw:fill="none" fo:padding-top="0.147cm" fo:padding-bottom="0.147cm" fo:padding-left="0.272cm" fo:padding-right="0.272cm" loext:decorative="false"/>
    </style:style>
    <style:style style:name="gr46" style:family="graphic" style:parent-style-name="standard">
      <style:graphic-properties draw:stroke="solid" svg:stroke-width="0.035cm" svg:stroke-color="#7f7f7f" svg:stroke-opacity="100%" draw:stroke-linejoin="miter" svg:stroke-linecap="butt" draw:fill="none" draw:textarea-horizontal-align="center" draw:textarea-vertical-align="middle" draw:auto-grow-height="false" draw:auto-grow-width="false" fo:min-height="8.294cm" fo:min-width="5.451cm" fo:padding-top="0.127cm" fo:padding-bottom="0.127cm" fo:padding-left="0.254cm" fo:padding-right="0.254cm" fo:wrap-option="wrap" style:writing-mode="lr-tb"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017cm" fo:min-width="0cm" loext:decorative="false"/>
      <style:paragraph-properties style:writing-mode="lr-tb"/>
    </style:style>
    <style:style style:name="gr48" style:family="graphic" style:parent-style-name="standard">
      <style:graphic-properties draw:stroke="solid" svg:stroke-width="0.035cm" svg:stroke-color="#7f7f7f" draw:marker-end="a1021" svg:stroke-opacity="100%" draw:stroke-linejoin="miter" svg:stroke-linecap="butt" draw:fill="none" fo:padding-top="0.142cm" fo:padding-bottom="0.142cm" fo:padding-left="0.267cm" fo:padding-right="0.267cm" loext:decorative="false"/>
    </style:style>
    <style:style style:name="gr49" style:family="graphic" style:parent-style-name="standard">
      <style:graphic-properties draw:stroke="solid" svg:stroke-width="0.035cm" svg:stroke-color="#7f7f7f" draw:marker-end="a1023" svg:stroke-opacity="100%" draw:stroke-linejoin="miter" svg:stroke-linecap="butt" draw:fill="none" fo:padding-top="0.142cm" fo:padding-bottom="0.142cm" fo:padding-left="0.267cm" fo:padding-right="0.267cm" loext:decorative="false"/>
    </style:style>
    <style:style style:name="gr50" style:family="graphic" style:parent-style-name="standard">
      <style:graphic-properties draw:stroke="none" draw:fill="none" draw:textarea-horizontal-align="left" draw:textarea-vertical-align="top" draw:auto-grow-height="true" draw:auto-grow-width="true" fo:min-height="0.515cm" fo:min-width="2.483cm" fo:padding-top="0.127cm" fo:padding-bottom="0.127cm" fo:padding-left="0.254cm" fo:padding-right="0.254cm" fo:wrap-option="no-wrap" loext:decorative="false"/>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515cm" fo:min-width="3.203cm" fo:padding-top="0.127cm" fo:padding-bottom="0.127cm" fo:padding-left="0.254cm" fo:padding-right="0.254cm" fo:wrap-option="no-wrap" loext:decorative="false"/>
      <style:paragraph-properties style:writing-mode="lr-tb"/>
    </style:style>
    <style:style style:name="gr52" style:family="graphic" style:parent-style-name="standard">
      <style:graphic-properties draw:stroke="solid" svg:stroke-width="0.035cm" svg:stroke-color="#7f7f7f" svg:stroke-opacity="100%" draw:stroke-linejoin="miter" svg:stroke-linecap="butt" draw:fill="none" draw:textarea-horizontal-align="center" draw:textarea-vertical-align="middle" draw:auto-grow-height="false" draw:auto-grow-width="false" fo:min-height="8.394cm" fo:min-width="4.522cm" fo:padding-top="0.127cm" fo:padding-bottom="0.127cm" fo:padding-left="0.254cm" fo:padding-right="0.254cm" fo:wrap-option="wrap" style:writing-mode="lr-tb" loext:decorative="false"/>
      <style:paragraph-properties style:writing-mode="lr-tb"/>
    </style:style>
    <style:style style:name="gr53" style:family="graphic" style:parent-style-name="standard">
      <style:graphic-properties draw:stroke="solid" svg:stroke-width="0.035cm" svg:stroke-color="#7f7f7f" draw:marker-end="a1054" svg:stroke-opacity="100%" draw:stroke-linejoin="miter" svg:stroke-linecap="butt" draw:fill="none" fo:padding-top="0.142cm" fo:padding-bottom="0.142cm" fo:padding-left="0.267cm" fo:padding-right="0.267cm" loext:decorative="false"/>
    </style:style>
    <style:style style:name="gr54" style:family="graphic" style:parent-style-name="standard">
      <style:graphic-properties draw:stroke="solid" svg:stroke-width="0.035cm" svg:stroke-color="#7f7f7f" draw:marker-end="a1056" svg:stroke-opacity="100%" draw:stroke-linejoin="miter" svg:stroke-linecap="butt" draw:fill="none" fo:padding-top="0.142cm" fo:padding-bottom="0.142cm" fo:padding-left="0.267cm" fo:padding-right="0.267cm" loext:decorative="false"/>
    </style:style>
    <style:style style:name="gr55" style:family="graphic" style:parent-style-name="standard">
      <style:graphic-properties draw:stroke="solid" svg:stroke-width="0.035cm" svg:stroke-color="#7f7f7f" draw:marker-end="a1058" svg:stroke-opacity="100%" draw:stroke-linejoin="miter" svg:stroke-linecap="butt" draw:fill="none" fo:padding-top="0.142cm" fo:padding-bottom="0.142cm" fo:padding-left="0.267cm" fo:padding-right="0.267cm" loext:decorative="false"/>
    </style:style>
    <style:style style:name="gr56" style:family="graphic" style:parent-style-name="standard">
      <style:graphic-properties draw:stroke="solid" svg:stroke-width="0.035cm" svg:stroke-color="#7f7f7f" draw:marker-end="a1060" svg:stroke-opacity="100%" draw:stroke-linejoin="miter" svg:stroke-linecap="butt" draw:fill="none" fo:padding-top="0.142cm" fo:padding-bottom="0.142cm" fo:padding-left="0.267cm" fo:padding-right="0.267cm" loext:decorative="false"/>
    </style:style>
    <style:style style:name="gr57" style:family="graphic" style:parent-style-name="standard">
      <style:graphic-properties draw:stroke="solid" svg:stroke-width="0.035cm" svg:stroke-color="#7f7f7f" draw:marker-end="a1062" svg:stroke-opacity="100%" draw:stroke-linejoin="miter" svg:stroke-linecap="butt" draw:fill="none" fo:padding-top="0.142cm" fo:padding-bottom="0.142cm" fo:padding-left="0.267cm" fo:padding-right="0.267cm" loext:decorative="false"/>
    </style:style>
    <style:style style:name="gr58" style:family="graphic" style:parent-style-name="standard">
      <style:graphic-properties draw:stroke="solid" svg:stroke-width="0.035cm" svg:stroke-color="#7f7f7f" draw:marker-end="a1120"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59"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654cm" fo:min-width="3.404cm" fo:padding-top="0.125cm" fo:padding-bottom="0.125cm" fo:padding-left="0.25cm" fo:padding-right="0.25cm" fo:wrap-option="no-wrap" style:writing-mode="lr-tb" loext:decorative="false"/>
      <style:paragraph-properties style:writing-mode="lr-tb"/>
    </style:style>
    <style:style style:name="gr60" style:family="graphic" style:parent-style-name="standard">
      <style:graphic-properties draw:stroke="solid" svg:stroke-width="0.05cm" svg:stroke-color="#7f7f7f" svg:stroke-opacity="100%" draw:stroke-linejoin="miter" svg:stroke-linecap="butt" draw:fill="solid" draw:fill-color="#e6e6e6" draw:opacity="100%" draw:textarea-horizontal-align="center"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61" style:family="graphic" style:parent-style-name="standard">
      <style:graphic-properties svg:stroke-width="0.046cm" svg:stroke-color="#666666" draw:marker-start-width="0.269cm" draw:marker-end-width="0.269cm" draw:textarea-vertical-align="middle" fo:padding-top="0.148cm" fo:padding-bottom="0.148cm" fo:padding-left="0.273cm" fo:padding-right="0.273cm" loext:decorative="false"/>
    </style:style>
    <style:style style:name="gr62" style:family="graphic" style:parent-style-name="objectwithoutfill">
      <style:graphic-properties svg:stroke-width="0.046cm" svg:stroke-color="#7f7f7f" draw:marker-start-width="0.268cm" draw:marker-end-width="0.268cm" draw:fill="none" draw:textarea-vertical-align="middle" fo:padding-top="0.147cm" fo:padding-bottom="0.147cm" fo:padding-left="0.272cm" fo:padding-right="0.272cm" loext:decorative="false"/>
    </style:style>
    <style:style style:name="gr63" style:family="graphic" style:parent-style-name="objectwithoutfill">
      <style:graphic-properties svg:stroke-width="0.046cm" svg:stroke-color="#7f7f7f" draw:marker-start-width="0.269cm" draw:marker-end="화살촉_20_11" draw:marker-end-width="0.228cm" draw:fill="none" draw:textarea-vertical-align="middle" fo:padding-top="0.148cm" fo:padding-bottom="0.148cm" fo:padding-left="0.273cm" fo:padding-right="0.273cm" loext:decorative="false"/>
    </style:style>
    <style:style style:name="gr64" style:family="graphic" style:parent-style-name="objectwithoutfill">
      <style:graphic-properties svg:stroke-width="0.046cm" svg:stroke-color="#7f7f7f" draw:marker-start-width="0.269cm" draw:marker-end="화살촉_20_12" draw:marker-end-width="0.228cm" draw:fill="none" draw:textarea-vertical-align="middle" fo:padding-top="0.148cm" fo:padding-bottom="0.148cm" fo:padding-left="0.273cm" fo:padding-right="0.273cm" loext:decorative="false"/>
    </style:style>
    <style:style style:name="gr65" style:family="graphic" style:parent-style-name="objectwithoutfill">
      <style:graphic-properties svg:stroke-width="0.046cm" svg:stroke-color="#7f7f7f" draw:marker-start-width="0.269cm" draw:marker-end="화살촉_20_13" draw:marker-end-width="0.228cm" draw:fill="none" draw:textarea-vertical-align="middle" fo:padding-top="0.148cm" fo:padding-bottom="0.148cm" fo:padding-left="0.273cm" fo:padding-right="0.273cm" loext:decorative="false"/>
    </style:style>
    <style:style style:name="gr66" style:family="graphic" style:parent-style-name="objectwithoutfill">
      <style:graphic-properties svg:stroke-width="0.046cm" svg:stroke-color="#7f7f7f" draw:marker-start-width="0.269cm" draw:marker-end="화살촉_20_14" draw:marker-end-width="0.228cm" draw:fill="none" draw:textarea-vertical-align="middle" fo:padding-top="0.148cm" fo:padding-bottom="0.148cm" fo:padding-left="0.273cm" fo:padding-right="0.273cm" loext:decorative="false"/>
    </style:style>
    <style:style style:name="gr67" style:family="graphic" style:parent-style-name="standard">
      <style:graphic-properties draw:stroke="solid" svg:stroke-width="0.05cm" svg:stroke-color="#7f7f7f" svg:stroke-opacity="100%" draw:stroke-linejoin="miter" svg:stroke-linecap="butt" draw:fill="solid" draw:fill-color="#e6e6e6" draw:opacity="100%" draw:textarea-horizontal-align="center" draw:textarea-vertical-align="middle" draw:auto-grow-height="false" draw:auto-grow-width="false" fo:min-height="1.001cm" fo:min-width="3.5cm" fo:padding-top="0.125cm" fo:padding-bottom="0.125cm" fo:padding-left="0.25cm" fo:padding-right="0.25cm" fo:wrap-option="no-wrap" style:writing-mode="lr-tb" loext:decorative="false"/>
      <style:paragraph-properties style:writing-mode="lr-tb"/>
    </style:style>
    <style:style style:name="gr68" style:family="graphic" style:parent-style-name="objectwithoutfill">
      <style:graphic-properties svg:stroke-width="0.046cm" svg:stroke-color="#7f7f7f" draw:marker-start-width="0.269cm" draw:marker-end="화살촉_20_32" draw:marker-end-width="0.228cm" draw:fill="none" draw:textarea-vertical-align="middle" fo:padding-top="0.148cm" fo:padding-bottom="0.148cm" fo:padding-left="0.273cm" fo:padding-right="0.273cm" loext:decorative="false"/>
    </style:style>
    <style:style style:name="gr69" style:family="graphic" style:parent-style-name="objectwithoutfill">
      <style:graphic-properties svg:stroke-width="0.046cm" svg:stroke-color="#7f7f7f" draw:marker-start-width="0.269cm" draw:marker-end="화살촉_20_33" draw:marker-end-width="0.228cm" draw:fill="none" draw:textarea-vertical-align="middle" fo:padding-top="0.148cm" fo:padding-bottom="0.148cm" fo:padding-left="0.273cm" fo:padding-right="0.273cm" loext:decorative="false"/>
    </style:style>
    <style:style style:name="gr70" style:family="graphic" style:parent-style-name="standard">
      <style:graphic-properties draw:stroke="solid" svg:stroke-width="0.05cm" svg:stroke-color="#ff0000" svg:stroke-opacity="100%" draw:stroke-linejoin="miter" svg:stroke-linecap="butt" draw:fill="solid" draw:fill-color="#ffffff" draw:opacity="100%" draw:textarea-horizontal-align="center" draw:textarea-vertical-align="middle" draw:auto-grow-height="false" draw:auto-grow-width="false" fo:min-height="0.813cm" fo:min-width="1.422cm" fo:padding-top="0.125cm" fo:padding-bottom="0.125cm" fo:padding-left="0.25cm" fo:padding-right="0.25cm" fo:wrap-option="no-wrap" style:writing-mode="lr-tb"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1.078cm" fo:min-width="0cm" loext:decorative="false"/>
      <style:paragraph-properties style:writing-mode="lr-tb"/>
    </style:style>
    <style:style style:name="gr72"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554cm" fo:min-width="4.204cm" fo:padding-top="0.125cm" fo:padding-bottom="0.125cm" fo:padding-left="0.25cm" fo:padding-right="0.25cm" fo:wrap-option="no-wrap" style:writing-mode="lr-tb" loext:decorative="false"/>
      <style:paragraph-properties style:writing-mode="lr-tb"/>
    </style:style>
    <style:style style:name="gr73" style:family="graphic" style:parent-style-name="objectwithoutfill">
      <style:graphic-properties svg:stroke-width="0.046cm" draw:marker-start-width="0.274cm" draw:marker-end="Arrow" draw:marker-end-width="0.183cm" draw:fill="none" fo:padding-top="0.133cm" fo:padding-bottom="0.133cm" fo:padding-left="0.258cm" fo:padding-right="0.258cm" loext:decorative="false"/>
    </style:style>
    <style:style style:name="gr74"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93cm" fo:min-width="3.243cm" fo:padding-top="0.125cm" fo:padding-bottom="0.125cm" fo:padding-left="0.25cm" fo:padding-right="0.25cm" fo:wrap-option="no-wrap" style:writing-mode="lr-tb" loext:decorative="false"/>
      <style:paragraph-properties style:writing-mode="lr-tb"/>
    </style:style>
    <style:style style:name="gr75"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736cm" fo:min-width="4.586cm" fo:padding-top="0.125cm" fo:padding-bottom="0.125cm" fo:padding-left="0.25cm" fo:padding-right="0.25cm" fo:wrap-option="no-wrap" style:writing-mode="lr-tb" loext:decorative="false"/>
      <style:paragraph-properties style:writing-mode="lr-tb"/>
    </style:style>
    <style:style style:name="gr76"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915cm" fo:min-width="3.666cm" fo:padding-top="0.125cm" fo:padding-bottom="0.125cm" fo:padding-left="0.25cm" fo:padding-right="0.25cm" fo:wrap-option="no-wrap" style:writing-mode="lr-tb" loext:decorative="false"/>
      <style:paragraph-properties style:writing-mode="lr-tb"/>
    </style:style>
    <style:style style:name="gr77"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284cm" fo:min-width="3.734cm" fo:padding-top="0.125cm" fo:padding-bottom="0.125cm" fo:padding-left="0.25cm" fo:padding-right="0.25cm" fo:wrap-option="no-wrap" style:writing-mode="lr-tb" loext:decorative="false"/>
      <style:paragraph-properties style:writing-mode="lr-tb"/>
    </style:style>
    <style:style style:name="gr78" style:family="graphic" style:parent-style-name="objectwithoutfill">
      <style:graphic-properties svg:stroke-width="0.046cm" draw:marker-start="Arrow" draw:marker-start-width="0.183cm" draw:marker-end="Arrow" draw:marker-end-width="0.183cm" draw:fill="none" fo:padding-top="0.133cm" fo:padding-bottom="0.133cm" fo:padding-left="0.258cm" fo:padding-right="0.258cm" loext:decorative="false"/>
    </style:style>
    <style:style style:name="gr79" style:family="graphic" style:parent-style-name="objectwithoutfill">
      <style:graphic-properties svg:stroke-width="0.046cm" draw:marker-start-width="0.274cm" draw:marker-end-width="0.274cm" draw:fill="none" fo:padding-top="0.133cm" fo:padding-bottom="0.133cm" fo:padding-left="0.258cm" fo:padding-right="0.258cm" loext:decorative="false"/>
    </style:style>
    <style:style style:name="gr80"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496cm" fo:min-width="3.322cm" fo:padding-top="0.125cm" fo:padding-bottom="0.125cm" fo:padding-left="0.25cm" fo:padding-right="0.25cm" fo:wrap-option="no-wrap" style:writing-mode="lr-tb" loext:decorative="false"/>
      <style:paragraph-properties style:writing-mode="lr-tb"/>
    </style:style>
    <style:style style:name="gr81" style:family="graphic" style:parent-style-name="objectwithoutfill">
      <style:graphic-properties svg:stroke-width="0.046cm" svg:stroke-color="#7f7f7f" draw:marker-start-width="0.274cm" draw:marker-end-width="0.274cm" svg:stroke-opacity="100%" draw:fill="none" draw:textarea-vertical-align="middle" fo:padding-top="0.133cm" fo:padding-bottom="0.133cm" fo:padding-left="0.258cm" fo:padding-right="0.258cm" loext:decorative="false"/>
    </style:style>
    <style:style style:name="gr82" style:family="graphic" style:parent-style-name="objectwithoutfill">
      <style:graphic-properties svg:stroke-width="0.046cm" svg:stroke-color="#7f7f7f" draw:marker-start-width="0.274cm" draw:marker-end="화살촉_20_61" draw:marker-end-width="0.183cm" svg:stroke-opacity="100%" draw:fill="none" draw:textarea-vertical-align="middle" fo:padding-top="0.133cm" fo:padding-bottom="0.133cm" fo:padding-left="0.258cm" fo:padding-right="0.258cm" loext:decorative="false"/>
    </style:style>
    <style:style style:name="gr83" style:family="graphic" style:parent-style-name="objectwithoutfill">
      <style:graphic-properties svg:stroke-width="0.046cm" svg:stroke-color="#7f7f7f" draw:marker-start-width="0.274cm" draw:marker-end="화살촉_20_62" draw:marker-end-width="0.183cm" svg:stroke-opacity="100%" draw:fill="none" draw:textarea-vertical-align="middle" fo:padding-top="0.133cm" fo:padding-bottom="0.133cm" fo:padding-left="0.258cm" fo:padding-right="0.258cm" loext:decorative="false"/>
    </style:style>
    <style:style style:name="gr84"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456cm" fo:min-width="3.723cm" fo:padding-top="0.125cm" fo:padding-bottom="0.125cm" fo:padding-left="0.25cm" fo:padding-right="0.25cm" fo:wrap-option="no-wrap" style:writing-mode="lr-tb" loext:decorative="false"/>
      <style:paragraph-properties style:writing-mode="lr-tb"/>
    </style:style>
    <style:style style:name="gr85"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456cm" fo:min-width="3.326cm" fo:padding-top="0.125cm" fo:padding-bottom="0.125cm" fo:padding-left="0.25cm" fo:padding-right="0.25cm" fo:wrap-option="no-wrap" style:writing-mode="lr-tb" loext:decorative="false"/>
      <style:paragraph-properties style:writing-mode="lr-tb"/>
    </style:style>
    <style:style style:name="gr86" style:family="graphic" style:parent-style-name="objectwithoutfill">
      <style:graphic-properties svg:stroke-width="0.046cm" svg:stroke-color="#7f7f7f" draw:marker-start="화살촉_20_72" draw:marker-start-width="0.183cm" draw:marker-end="화살촉_20_73" draw:marker-end-width="0.183cm" svg:stroke-opacity="100%" draw:fill="none" draw:textarea-vertical-align="middle" fo:padding-top="0.133cm" fo:padding-bottom="0.133cm" fo:padding-left="0.258cm" fo:padding-right="0.258cm" loext:decorative="false"/>
    </style:style>
    <style:style style:name="gr87"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456cm" fo:min-width="3.921cm" fo:padding-top="0.125cm" fo:padding-bottom="0.125cm" fo:padding-left="0.25cm" fo:padding-right="0.25cm" fo:wrap-option="no-wrap" style:writing-mode="lr-tb" loext:decorative="false"/>
      <style:paragraph-properties style:writing-mode="lr-tb"/>
    </style:style>
    <style:style style:name="gr88" style:family="graphic" style:parent-style-name="objectwithoutfill">
      <style:graphic-properties svg:stroke-width="0.046cm" draw:marker-start-width="0.274cm" draw:marker-end="화살촉_20_111" draw:marker-end-width="0.183cm" draw:fill="none" fo:padding-top="0.133cm" fo:padding-bottom="0.133cm" fo:padding-left="0.258cm" fo:padding-right="0.258cm" loext:decorative="false"/>
    </style:style>
    <style:style style:name="gr89" style:family="graphic" style:parent-style-name="objectwithoutfill">
      <style:graphic-properties svg:stroke-width="0.046cm" draw:marker-start-width="0.274cm" draw:marker-end="화살촉_20_112" draw:marker-end-width="0.183cm" draw:fill="none" fo:padding-top="0.133cm" fo:padding-bottom="0.133cm" fo:padding-left="0.258cm" fo:padding-right="0.258cm" loext:decorative="false"/>
    </style:style>
    <style:style style:name="gr90" style:family="graphic" style:parent-style-name="objectwithoutfill">
      <style:graphic-properties svg:stroke-width="0.046cm" draw:marker-start-width="0.274cm" draw:marker-end="화살촉_20_113" draw:marker-end-width="0.183cm" draw:fill="none" fo:padding-top="0.133cm" fo:padding-bottom="0.133cm" fo:padding-left="0.258cm" fo:padding-right="0.258cm" loext:decorative="false"/>
    </style:style>
    <style:style style:name="gr91" style:family="graphic" style:parent-style-name="objectwithoutfill">
      <style:graphic-properties svg:stroke-width="0.046cm" draw:marker-start-width="0.274cm" draw:marker-end="화살촉_20_114" draw:marker-end-width="0.183cm" draw:fill="none" fo:padding-top="0.133cm" fo:padding-bottom="0.133cm" fo:padding-left="0.258cm" fo:padding-right="0.258cm" loext:decorative="false"/>
    </style:style>
    <style:style style:name="gr92"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94cm" fo:min-width="2.744cm" fo:padding-top="0.125cm" fo:padding-bottom="0.125cm" fo:padding-left="0.25cm" fo:padding-right="0.25cm" fo:wrap-option="no-wrap" style:writing-mode="lr-tb" loext:decorative="false"/>
      <style:paragraph-properties style:writing-mode="lr-tb"/>
    </style:style>
    <style:style style:name="gr93" style:family="graphic" style:parent-style-name="standard">
      <style:graphic-properties draw:stroke="solid" svg:stroke-width="0.05cm" svg:stroke-color="#7f7f7f" svg:stroke-opacity="100%" draw:stroke-linejoin="miter" svg:stroke-linecap="butt" draw:fill="solid" draw:fill-color="#e6e6e6" draw:opacity="100%" draw:textarea-horizontal-align="center" draw:textarea-vertical-align="middle" draw:auto-grow-height="false" draw:auto-grow-width="false" fo:min-height="1.001cm" fo:min-width="6cm" fo:padding-top="0.125cm" fo:padding-bottom="0.125cm" fo:padding-left="0.25cm" fo:padding-right="0.25cm" fo:wrap-option="no-wrap" style:writing-mode="lr-tb" loext:decorative="false"/>
      <style:paragraph-properties style:writing-mode="lr-tb"/>
    </style:style>
    <style:style style:name="gr94" style:family="graphic" style:parent-style-name="objectwithoutfill">
      <style:graphic-properties svg:stroke-width="0.046cm" draw:marker-start-width="0.274cm" draw:marker-end="화살촉_20_115" draw:marker-end-width="0.183cm" draw:fill="none" fo:padding-top="0.133cm" fo:padding-bottom="0.133cm" fo:padding-left="0.258cm" fo:padding-right="0.258cm" loext:decorative="false"/>
    </style:style>
    <style:style style:name="gr95" style:family="graphic" style:parent-style-name="objectwithoutfill">
      <style:graphic-properties svg:stroke-width="0.046cm" draw:marker-start-width="0.274cm" draw:marker-end="화살촉_20_116" draw:marker-end-width="0.183cm" draw:fill="none" fo:padding-top="0.133cm" fo:padding-bottom="0.133cm" fo:padding-left="0.258cm" fo:padding-right="0.258cm" loext:decorative="false"/>
    </style:style>
    <style:style style:name="gr96" style:family="graphic" style:parent-style-name="objectwithoutfill">
      <style:graphic-properties svg:stroke-width="0.046cm" draw:marker-start-width="0.274cm" draw:marker-end="화살촉_20_117" draw:marker-end-width="0.183cm" draw:fill="none" fo:padding-top="0.133cm" fo:padding-bottom="0.133cm" fo:padding-left="0.258cm" fo:padding-right="0.258cm" loext:decorative="false"/>
    </style:style>
    <style:style style:name="gr97"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564cm" fo:min-width="3.914cm" fo:padding-top="0.125cm" fo:padding-bottom="0.125cm" fo:padding-left="0.25cm" fo:padding-right="0.25cm" fo:wrap-option="no-wrap" style:writing-mode="lr-tb" loext:decorative="false"/>
      <style:paragraph-properties style:writing-mode="lr-tb"/>
    </style:style>
    <style:style style:name="gr98" style:family="graphic" style:parent-style-name="standard">
      <style:graphic-properties draw:stroke="solid" svg:stroke-width="0.05cm" svg:stroke-color="#7f7f7f" svg:stroke-opacity="100%" draw:stroke-linejoin="miter" svg:stroke-linecap="butt" draw:fill="solid" draw:fill-color="#e6e6e6" draw:opacity="100%" draw:textarea-horizontal-align="center" draw:textarea-vertical-align="middle" draw:auto-grow-height="false" draw:auto-grow-width="false" fo:min-height="1.001cm" fo:min-width="3.801cm" fo:padding-top="0.125cm" fo:padding-bottom="0.125cm" fo:padding-left="0.25cm" fo:padding-right="0.25cm" fo:wrap-option="no-wrap" style:writing-mode="lr-tb" loext:decorative="false"/>
      <style:paragraph-properties style:writing-mode="lr-tb"/>
    </style:style>
    <style:style style:name="gr99"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03cm" fo:min-width="3.854cm" fo:padding-top="0.125cm" fo:padding-bottom="0.125cm" fo:padding-left="0.25cm" fo:padding-right="0.25cm" fo:wrap-option="no-wrap" style:writing-mode="lr-tb" loext:decorative="false"/>
      <style:paragraph-properties style:writing-mode="lr-tb"/>
    </style:style>
    <style:style style:name="gr100"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564cm" fo:min-width="2.713cm" fo:padding-top="0.125cm" fo:padding-bottom="0.125cm" fo:padding-left="0.25cm" fo:padding-right="0.25cm" fo:wrap-option="no-wrap" style:writing-mode="lr-tb" loext:decorative="false"/>
      <style:paragraph-properties style:writing-mode="lr-tb"/>
    </style:style>
    <style:style style:name="gr101"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92cm" fo:min-width="3.473cm" fo:padding-top="0.125cm" fo:padding-bottom="0.125cm" fo:padding-left="0.25cm" fo:padding-right="0.25cm" fo:wrap-option="no-wrap" style:writing-mode="lr-tb" loext:decorative="false"/>
      <style:paragraph-properties style:writing-mode="lr-tb"/>
    </style:style>
    <style:style style:name="gr102"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92cm" fo:min-width="2.973cm" fo:padding-top="0.125cm" fo:padding-bottom="0.125cm" fo:padding-left="0.25cm" fo:padding-right="0.25cm" fo:wrap-option="no-wrap" style:writing-mode="lr-tb" loext:decorative="false"/>
      <style:paragraph-properties style:writing-mode="lr-tb"/>
    </style:style>
    <style:style style:name="gr103"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564cm" fo:min-width="2.013cm" fo:padding-top="0.125cm" fo:padding-bottom="0.125cm" fo:padding-left="0.25cm" fo:padding-right="0.25cm" fo:wrap-option="no-wrap" style:writing-mode="lr-tb" loext:decorative="false"/>
      <style:paragraph-properties style:writing-mode="lr-tb"/>
    </style:style>
    <style:style style:name="gr104" style:family="graphic" style:parent-style-name="objectwithoutfill">
      <style:graphic-properties svg:stroke-width="0.046cm" draw:marker-start-width="0.274cm" draw:marker-end="화살촉_20_118" draw:marker-end-width="0.183cm" draw:fill="none" fo:padding-top="0.133cm" fo:padding-bottom="0.133cm" fo:padding-left="0.258cm" fo:padding-right="0.258cm" loext:decorative="false"/>
    </style:style>
    <style:style style:name="gr105" style:family="graphic" style:parent-style-name="objectwithoutfill">
      <style:graphic-properties svg:stroke-width="0.046cm" draw:marker-start-width="0.274cm" draw:marker-end="화살촉_20_119" draw:marker-end-width="0.183cm" draw:fill="none" fo:padding-top="0.133cm" fo:padding-bottom="0.133cm" fo:padding-left="0.258cm" fo:padding-right="0.258cm" loext:decorative="false"/>
    </style:style>
    <style:style style:name="gr106" style:family="graphic" style:parent-style-name="objectwithoutfill">
      <style:graphic-properties svg:stroke-width="0.046cm" draw:marker-start-width="0.274cm" draw:marker-end="화살촉_20_120" draw:marker-end-width="0.183cm" draw:fill="none" fo:padding-top="0.133cm" fo:padding-bottom="0.133cm" fo:padding-left="0.258cm" fo:padding-right="0.258cm" loext:decorative="false"/>
    </style:style>
    <style:style style:name="gr107" style:family="graphic" style:parent-style-name="objectwithoutfill">
      <style:graphic-properties svg:stroke-width="0.046cm" draw:marker-start-width="0.274cm" draw:marker-end="화살촉_20_121" draw:marker-end-width="0.183cm" draw:fill="none" fo:padding-top="0.133cm" fo:padding-bottom="0.133cm" fo:padding-left="0.258cm" fo:padding-right="0.258cm" loext:decorative="false"/>
    </style:style>
    <style:style style:name="gr108" style:family="graphic" style:parent-style-name="objectwithoutfill">
      <style:graphic-properties svg:stroke-width="0.046cm" draw:marker-start-width="0.274cm" draw:marker-end="화살촉_20_123" draw:marker-end-width="0.183cm" draw:fill="none" fo:padding-top="0.133cm" fo:padding-bottom="0.133cm" fo:padding-left="0.258cm" fo:padding-right="0.258cm" loext:decorative="false"/>
    </style:style>
    <style:style style:name="gr109" style:family="graphic" style:parent-style-name="objectwithoutfill">
      <style:graphic-properties svg:stroke-width="0.046cm" draw:marker-start-width="0.274cm" draw:marker-end="화살촉_20_124" draw:marker-end-width="0.183cm" draw:fill="none" fo:padding-top="0.133cm" fo:padding-bottom="0.133cm" fo:padding-left="0.258cm" fo:padding-right="0.258cm" loext:decorative="false"/>
    </style:style>
    <style:style style:name="gr110" style:family="graphic" style:parent-style-name="objectwithoutfill">
      <style:graphic-properties svg:stroke-width="0.046cm" draw:marker-start-width="0.274cm" draw:marker-end="화살촉_20_125" draw:marker-end-width="0.183cm" draw:fill="none" fo:padding-top="0.133cm" fo:padding-bottom="0.133cm" fo:padding-left="0.258cm" fo:padding-right="0.258cm" loext:decorative="false"/>
    </style:style>
    <style:style style:name="gr111" style:family="graphic" style:parent-style-name="objectwithoutfill">
      <style:graphic-properties svg:stroke-width="0.046cm" draw:marker-start-width="0.274cm" draw:marker-end="화살촉_20_126" draw:marker-end-width="0.183cm" draw:fill="none" fo:padding-top="0.133cm" fo:padding-bottom="0.133cm" fo:padding-left="0.258cm" fo:padding-right="0.258cm" loext:decorative="false"/>
    </style:style>
    <style:style style:name="gr112" style:family="graphic" style:parent-style-name="objectwithoutfill">
      <style:graphic-properties svg:stroke-width="0.046cm" draw:marker-start-width="0.274cm" draw:marker-end="화살촉_20_127" draw:marker-end-width="0.183cm" draw:fill="none" fo:padding-top="0.133cm" fo:padding-bottom="0.133cm" fo:padding-left="0.258cm" fo:padding-right="0.258cm" loext:decorative="false"/>
    </style:style>
    <style:style style:name="gr113"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833cm" fo:min-width="3.884cm" fo:padding-top="0.125cm" fo:padding-bottom="0.125cm" fo:padding-left="0.25cm" fo:padding-right="0.25cm" fo:wrap-option="no-wrap" style:writing-mode="lr-tb" loext:decorative="false"/>
      <style:paragraph-properties style:writing-mode="lr-tb"/>
    </style:style>
    <style:style style:name="gr114"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833cm" fo:min-width="4.284cm" fo:padding-top="0.125cm" fo:padding-bottom="0.125cm" fo:padding-left="0.25cm" fo:padding-right="0.25cm" fo:wrap-option="no-wrap" style:writing-mode="lr-tb" loext:decorative="false"/>
      <style:paragraph-properties style:writing-mode="lr-tb"/>
    </style:style>
    <style:style style:name="gr115"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284cm" fo:min-width="3.233cm" fo:padding-top="0.125cm" fo:padding-bottom="0.125cm" fo:padding-left="0.25cm" fo:padding-right="0.25cm" fo:wrap-option="no-wrap" style:writing-mode="lr-tb" loext:decorative="false"/>
      <style:paragraph-properties style:writing-mode="lr-tb"/>
    </style:style>
    <style:style style:name="gr116"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284cm" fo:min-width="4.533cm" fo:padding-top="0.125cm" fo:padding-bottom="0.125cm" fo:padding-left="0.25cm" fo:padding-right="0.25cm" fo:wrap-option="no-wrap" style:writing-mode="lr-tb" loext:decorative="false"/>
      <style:paragraph-properties style:writing-mode="lr-tb"/>
    </style:style>
    <style:style style:name="gr117" style:family="graphic" style:parent-style-name="objectwithoutfill">
      <style:graphic-properties svg:stroke-width="0.046cm" draw:marker-start-width="0.274cm" draw:marker-end="화살촉_20_129" draw:marker-end-width="0.183cm" draw:fill="none" fo:padding-top="0.133cm" fo:padding-bottom="0.133cm" fo:padding-left="0.258cm" fo:padding-right="0.258cm" loext:decorative="false"/>
    </style:style>
    <style:style style:name="gr118" style:family="graphic" style:parent-style-name="objectwithoutfill">
      <style:graphic-properties svg:stroke-width="0.046cm" draw:marker-start-width="0.274cm" draw:marker-end="화살촉_20_131" draw:marker-end-width="0.183cm" draw:fill="none" fo:padding-top="0.133cm" fo:padding-bottom="0.133cm" fo:padding-left="0.258cm" fo:padding-right="0.258cm" loext:decorative="false"/>
    </style:style>
    <style:style style:name="gr119" style:family="graphic" style:parent-style-name="objectwithoutfill">
      <style:graphic-properties svg:stroke-width="0.046cm" draw:marker-start-width="0.274cm" draw:marker-end="화살촉_20_132" draw:marker-end-width="0.183cm" draw:fill="none" fo:padding-top="0.133cm" fo:padding-bottom="0.133cm" fo:padding-left="0.258cm" fo:padding-right="0.258cm" loext:decorative="false"/>
    </style:style>
    <style:style style:name="gr120"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833cm" fo:min-width="2.383cm" fo:padding-top="0.125cm" fo:padding-bottom="0.125cm" fo:padding-left="0.25cm" fo:padding-right="0.25cm" fo:wrap-option="no-wrap" style:writing-mode="lr-tb" loext:decorative="false"/>
      <style:paragraph-properties style:writing-mode="lr-tb"/>
    </style:style>
    <style:style style:name="gr121"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564cm" fo:min-width="3.214cm" fo:padding-top="0.125cm" fo:padding-bottom="0.125cm" fo:padding-left="0.25cm" fo:padding-right="0.25cm" fo:wrap-option="no-wrap" style:writing-mode="lr-tb" loext:decorative="false"/>
      <style:paragraph-properties style:writing-mode="lr-tb"/>
    </style:style>
    <style:style style:name="gr122"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83cm" fo:min-width="4.183cm" fo:padding-top="0.125cm" fo:padding-bottom="0.125cm" fo:padding-left="0.25cm" fo:padding-right="0.25cm" fo:wrap-option="no-wrap" style:writing-mode="lr-tb" loext:decorative="false"/>
      <style:paragraph-properties style:writing-mode="lr-tb"/>
    </style:style>
    <style:style style:name="gr123" style:family="graphic" style:parent-style-name="standard">
      <style:graphic-properties draw:stroke="solid" svg:stroke-width="0.05cm" svg:stroke-color="#7f7f7f" svg:stroke-opacity="100%" draw:stroke-linejoin="miter" svg:stroke-linecap="butt" draw:fill="solid" draw:fill-color="#e6e6e6" draw:opacity="100%" draw:textarea-horizontal-align="center" draw:textarea-vertical-align="middle" draw:auto-grow-height="false" draw:auto-grow-width="false" fo:min-height="1.001cm" fo:min-width="5.3cm" fo:padding-top="0.125cm" fo:padding-bottom="0.125cm" fo:padding-left="0.25cm" fo:padding-right="0.25cm" fo:wrap-option="no-wrap" style:writing-mode="lr-tb" loext:decorative="false"/>
      <style:paragraph-properties style:writing-mode="lr-tb"/>
    </style:style>
    <style:style style:name="gr124"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284cm" fo:min-width="3.733cm" fo:padding-top="0.125cm" fo:padding-bottom="0.125cm" fo:padding-left="0.25cm" fo:padding-right="0.25cm" fo:wrap-option="no-wrap" style:writing-mode="lr-tb" loext:decorative="false"/>
      <style:paragraph-properties style:writing-mode="lr-tb"/>
    </style:style>
    <style:style style:name="gr125"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923cm" fo:min-width="2.873cm" fo:padding-top="0.125cm" fo:padding-bottom="0.125cm" fo:padding-left="0.25cm" fo:padding-right="0.25cm" fo:wrap-option="no-wrap" style:writing-mode="lr-tb" loext:decorative="false"/>
      <style:paragraph-properties style:writing-mode="lr-tb"/>
    </style:style>
    <style:style style:name="gr126"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92cm" fo:min-width="3.345cm" fo:padding-top="0.125cm" fo:padding-bottom="0.125cm" fo:padding-left="0.25cm" fo:padding-right="0.25cm" fo:wrap-option="no-wrap" style:writing-mode="lr-tb" loext:decorative="false"/>
      <style:paragraph-properties style:writing-mode="lr-tb"/>
    </style:style>
    <style:style style:name="gr127" style:family="graphic" style:parent-style-name="objectwithoutfill">
      <style:graphic-properties svg:stroke-width="0.046cm" draw:marker-start-width="0.274cm" draw:marker-end="화살촉_20_135" draw:marker-end-width="0.183cm" draw:fill="none" fo:padding-top="0.133cm" fo:padding-bottom="0.133cm" fo:padding-left="0.258cm" fo:padding-right="0.258cm" loext:decorative="false"/>
    </style:style>
    <style:style style:name="gr128" style:family="graphic" style:parent-style-name="objectwithoutfill">
      <style:graphic-properties svg:stroke-width="0.046cm" draw:marker-start-width="0.274cm" draw:marker-end="화살촉_20_136" draw:marker-end-width="0.183cm" draw:fill="none" fo:padding-top="0.133cm" fo:padding-bottom="0.133cm" fo:padding-left="0.258cm" fo:padding-right="0.258cm" loext:decorative="false"/>
    </style:style>
    <style:style style:name="gr129" style:family="graphic" style:parent-style-name="objectwithoutfill">
      <style:graphic-properties svg:stroke-width="0.046cm" draw:marker-start-width="0.274cm" draw:marker-end="화살촉_20_137" draw:marker-end-width="0.183cm" draw:fill="none" fo:padding-top="0.133cm" fo:padding-bottom="0.133cm" fo:padding-left="0.258cm" fo:padding-right="0.258cm" loext:decorative="false"/>
    </style:style>
    <style:style style:name="gr130" style:family="graphic" style:parent-style-name="objectwithoutfill">
      <style:graphic-properties svg:stroke-width="0.046cm" draw:marker-start-width="0.274cm" draw:marker-end="화살촉_20_138" draw:marker-end-width="0.183cm" draw:fill="none" fo:padding-top="0.133cm" fo:padding-bottom="0.133cm" fo:padding-left="0.258cm" fo:padding-right="0.258cm" loext:decorative="false"/>
    </style:style>
    <style:style style:name="gr131" style:family="graphic" style:parent-style-name="objectwithoutfill">
      <style:graphic-properties svg:stroke-width="0.046cm" draw:marker-start="화살촉_20_139" draw:marker-start-width="0.183cm" draw:marker-end="화살촉_20_140" draw:marker-end-width="0.183cm" draw:fill="none" fo:padding-top="0.133cm" fo:padding-bottom="0.133cm" fo:padding-left="0.258cm" fo:padding-right="0.258cm" loext:decorative="false"/>
    </style:style>
    <style:style style:name="gr132" style:family="graphic" style:parent-style-name="objectwithoutfill">
      <style:graphic-properties svg:stroke-width="0.046cm" draw:marker-start-width="0.274cm" draw:marker-end="화살촉_20_143" draw:marker-end-width="0.183cm" draw:fill="none" fo:padding-top="0.133cm" fo:padding-bottom="0.133cm" fo:padding-left="0.258cm" fo:padding-right="0.258cm" loext:decorative="false"/>
    </style:style>
    <style:style style:name="gr133" style:family="graphic" style:parent-style-name="objectwithoutfill">
      <style:graphic-properties svg:stroke-width="0.046cm" draw:marker-start-width="0.274cm" draw:marker-end="화살촉_20_144" draw:marker-end-width="0.183cm" draw:fill="none" fo:padding-top="0.133cm" fo:padding-bottom="0.133cm" fo:padding-left="0.258cm" fo:padding-right="0.258cm" loext:decorative="false"/>
    </style:style>
    <style:style style:name="gr134"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833cm" fo:min-width="3.884cm" fo:padding-top="0.125cm" fo:padding-bottom="0.125cm" fo:padding-left="0.25cm" fo:padding-right="0.25cm" fo:wrap-option="no-wrap" style:writing-mode="lr-tb" loext:decorative="false"/>
      <style:paragraph-properties style:writing-mode="lr-tb"/>
    </style:style>
    <style:style style:name="gr135"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014cm" fo:min-width="3.763cm" fo:padding-top="0.125cm" fo:padding-bottom="0.125cm" fo:padding-left="0.25cm" fo:padding-right="0.25cm" fo:wrap-option="no-wrap" style:writing-mode="lr-tb" loext:decorative="false"/>
      <style:paragraph-properties style:writing-mode="lr-tb"/>
    </style:style>
    <style:style style:name="gr136"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563cm" fo:min-width="2.913cm" fo:padding-top="0.125cm" fo:padding-bottom="0.125cm" fo:padding-left="0.25cm" fo:padding-right="0.25cm" fo:wrap-option="no-wrap" style:writing-mode="lr-tb" loext:decorative="false"/>
      <style:paragraph-properties style:writing-mode="lr-tb"/>
    </style:style>
    <style:style style:name="gr137"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92cm" fo:min-width="3.345cm" fo:padding-top="0.125cm" fo:padding-bottom="0.125cm" fo:padding-left="0.25cm" fo:padding-right="0.25cm" fo:wrap-option="no-wrap" style:writing-mode="lr-tb" loext:decorative="false"/>
      <style:paragraph-properties style:writing-mode="lr-tb"/>
    </style:style>
    <style:style style:name="gr138"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92cm" fo:min-width="3.345cm" fo:padding-top="0.125cm" fo:padding-bottom="0.125cm" fo:padding-left="0.25cm" fo:padding-right="0.25cm" fo:wrap-option="no-wrap" style:writing-mode="lr-tb" loext:decorative="false"/>
      <style:paragraph-properties style:writing-mode="lr-tb"/>
    </style:style>
    <style:style style:name="gr139"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563cm" fo:min-width="2.913cm" fo:padding-top="0.125cm" fo:padding-bottom="0.125cm" fo:padding-left="0.25cm" fo:padding-right="0.25cm" fo:wrap-option="no-wrap" style:writing-mode="lr-tb" loext:decorative="false"/>
      <style:paragraph-properties style:writing-mode="lr-tb"/>
    </style:style>
    <style:style style:name="gr140"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563cm" fo:min-width="2.913cm" fo:padding-top="0.125cm" fo:padding-bottom="0.125cm" fo:padding-left="0.25cm" fo:padding-right="0.25cm" fo:wrap-option="no-wrap" style:writing-mode="lr-tb" loext:decorative="false"/>
      <style:paragraph-properties style:writing-mode="lr-tb"/>
    </style:style>
    <style:style style:name="gr141" style:family="graphic" style:parent-style-name="objectwithoutfill">
      <style:graphic-properties draw:marker-end="화살촉_20_145" draw:marker-end-width="0.159cm" draw:fill="none" loext:decorative="false"/>
    </style:style>
    <style:style style:name="gr142" style:family="graphic" style:parent-style-name="objectwithoutfill">
      <style:graphic-properties draw:marker-end="화살촉_20_146" draw:marker-end-width="0.159cm" draw:fill="none" loext:decorative="false"/>
    </style:style>
    <style:style style:name="gr143" style:family="graphic" style:parent-style-name="objectwithoutfill">
      <style:graphic-properties draw:marker-end="화살촉_20_147" draw:marker-end-width="0.159cm" draw:fill="none" loext:decorative="false"/>
    </style:style>
    <style:style style:name="gr144" style:family="graphic" style:parent-style-name="objectwithoutfill">
      <style:graphic-properties draw:marker-end="화살촉_20_149" draw:marker-end-width="0.159cm" draw:fill="none" loext:decorative="false"/>
    </style:style>
    <style:style style:name="gr145"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833cm" fo:min-width="2.583cm" fo:padding-top="0.125cm" fo:padding-bottom="0.125cm" fo:padding-left="0.25cm" fo:padding-right="0.25cm" fo:wrap-option="no-wrap" style:writing-mode="lr-tb" loext:decorative="false"/>
      <style:paragraph-properties style:writing-mode="lr-tb"/>
    </style:style>
    <style:style style:name="gr146"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654cm" fo:min-width="3.603cm" fo:padding-top="0.125cm" fo:padding-bottom="0.125cm" fo:padding-left="0.25cm" fo:padding-right="0.25cm" fo:wrap-option="no-wrap" style:writing-mode="lr-tb" loext:decorative="false"/>
      <style:paragraph-properties style:writing-mode="lr-tb"/>
    </style:style>
    <style:style style:name="gr147"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013cm" fo:min-width="3.163cm" fo:padding-top="0.125cm" fo:padding-bottom="0.125cm" fo:padding-left="0.25cm" fo:padding-right="0.25cm" fo:wrap-option="no-wrap" style:writing-mode="lr-tb" loext:decorative="false"/>
      <style:paragraph-properties style:writing-mode="lr-tb"/>
    </style:style>
    <style:style style:name="gr148"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65cm" fo:min-width="3.403cm" fo:padding-top="0.125cm" fo:padding-bottom="0.125cm" fo:padding-left="0.25cm" fo:padding-right="0.25cm" fo:wrap-option="no-wrap" style:writing-mode="lr-tb" loext:decorative="false"/>
      <style:paragraph-properties style:writing-mode="lr-tb"/>
    </style:style>
    <style:style style:name="gr149"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04cm" fo:min-width="3.353cm" fo:padding-top="0.125cm" fo:padding-bottom="0.125cm" fo:padding-left="0.25cm" fo:padding-right="0.25cm" fo:wrap-option="no-wrap" style:writing-mode="lr-tb" loext:decorative="false"/>
      <style:paragraph-properties style:writing-mode="lr-tb"/>
    </style:style>
    <style:style style:name="gr150"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653cm" fo:min-width="3.103cm" fo:padding-top="0.125cm" fo:padding-bottom="0.125cm" fo:padding-left="0.25cm" fo:padding-right="0.25cm" fo:wrap-option="no-wrap" style:writing-mode="lr-tb" loext:decorative="false"/>
      <style:paragraph-properties style:writing-mode="lr-tb"/>
    </style:style>
    <style:style style:name="gr151"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564cm" fo:min-width="2.513cm" fo:padding-top="0.125cm" fo:padding-bottom="0.125cm" fo:padding-left="0.25cm" fo:padding-right="0.25cm" fo:wrap-option="no-wrap" style:writing-mode="lr-tb" loext:decorative="false"/>
      <style:paragraph-properties style:writing-mode="lr-tb"/>
    </style:style>
    <style:style style:name="gr152" style:family="graphic" style:parent-style-name="objectwithoutfill">
      <style:graphic-properties draw:marker-end="화살촉_20_153" draw:marker-end-width="0.159cm" draw:fill="none" loext:decorative="false"/>
    </style:style>
    <style:style style:name="gr153" style:family="graphic" style:parent-style-name="objectwithoutfill">
      <style:graphic-properties draw:marker-end="화살촉_20_154" draw:marker-end-width="0.159cm" draw:fill="none" loext:decorative="false"/>
    </style:style>
    <style:style style:name="gr154" style:family="graphic" style:parent-style-name="objectwithoutfill">
      <style:graphic-properties draw:marker-end="화살촉_20_155" draw:marker-end-width="0.159cm" draw:fill="none" loext:decorative="false"/>
    </style:style>
    <style:style style:name="gr155" style:family="graphic" style:parent-style-name="objectwithoutfill">
      <style:graphic-properties draw:marker-end="화살촉_20_156" draw:marker-end-width="0.159cm" draw:fill="none" loext:decorative="false"/>
    </style:style>
    <style:style style:name="gr156" style:family="graphic" style:parent-style-name="objectwithoutfill">
      <style:graphic-properties draw:marker-end="화살촉_20_157" draw:marker-end-width="0.159cm" draw:fill="none" loext:decorative="false"/>
    </style:style>
    <style:style style:name="gr157" style:family="graphic" style:parent-style-name="objectwithoutfill">
      <style:graphic-properties draw:marker-end="화살촉_20_158" draw:marker-end-width="0.159cm" draw:fill="none" loext:decorative="false"/>
    </style:style>
    <style:style style:name="gr158" style:family="graphic" style:parent-style-name="objectwithoutfill">
      <style:graphic-properties draw:marker-end="화살촉_20_159" draw:marker-end-width="0.159cm" draw:fill="none" loext:decorative="false"/>
    </style:style>
    <style:style style:name="gr159" style:family="graphic" style:parent-style-name="standard">
      <style:graphic-properties svg:stroke-width="0.042cm" svg:stroke-color="#ff4000" draw:marker-start-width="0.263cm" draw:marker-end-width="0.263cm" draw:fill-color="#ffffff" draw:textarea-horizontal-align="justify" draw:textarea-vertical-align="middle" draw:auto-grow-height="false" fo:min-height="1.765cm" fo:min-width="1.841cm" fo:padding-top="0.096cm" fo:padding-bottom="0.096cm" fo:padding-left="0.221cm" fo:padding-right="0.221cm" style:writing-mode="lr-tb" loext:decorative="false"/>
      <style:paragraph-properties style:writing-mode="lr-tb"/>
    </style:style>
    <style:style style:name="gr160"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376cm" fo:min-width="3.526cm" fo:padding-top="0.125cm" fo:padding-bottom="0.125cm" fo:padding-left="0.25cm" fo:padding-right="0.25cm" fo:wrap-option="no-wrap" style:writing-mode="lr-tb" loext:decorative="false"/>
      <style:paragraph-properties style:writing-mode="lr-tb"/>
    </style:style>
    <style:style style:name="gr161"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92cm" fo:min-width="3.745cm" fo:padding-top="0.125cm" fo:padding-bottom="0.125cm" fo:padding-left="0.25cm" fo:padding-right="0.25cm" fo:wrap-option="no-wrap" style:writing-mode="lr-tb" loext:decorative="false"/>
      <style:paragraph-properties style:writing-mode="lr-tb"/>
    </style:style>
    <style:style style:name="gr162" style:family="graphic" style:parent-style-name="objectwithoutfill">
      <style:graphic-properties draw:marker-end="화살촉_20_171" draw:marker-end-width="0.159cm" draw:fill="none" loext:decorative="false"/>
    </style:style>
    <style:style style:name="gr163" style:family="graphic" style:parent-style-name="objectwithoutfill">
      <style:graphic-properties draw:marker-end="화살촉_20_172" draw:marker-end-width="0.159cm" draw:fill="none" loext:decorative="false"/>
    </style:style>
    <style:style style:name="gr164" style:family="graphic" style:parent-style-name="objectwithoutfill">
      <style:graphic-properties draw:marker-end="화살촉_20_173" draw:marker-end-width="0.159cm" draw:fill="none" loext:decorative="false"/>
    </style:style>
    <style:style style:name="gr165"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92cm" fo:min-width="3.745cm" fo:padding-top="0.125cm" fo:padding-bottom="0.125cm" fo:padding-left="0.25cm" fo:padding-right="0.25cm" fo:wrap-option="no-wrap" style:writing-mode="lr-tb" loext:decorative="false"/>
      <style:paragraph-properties style:writing-mode="lr-tb"/>
    </style:style>
    <style:style style:name="gr166"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28cm" fo:min-width="3.036cm" fo:padding-top="0.125cm" fo:padding-bottom="0.125cm" fo:padding-left="0.25cm" fo:padding-right="0.25cm" fo:wrap-option="no-wrap" style:writing-mode="lr-tb" loext:decorative="false"/>
      <style:paragraph-properties style:writing-mode="lr-tb"/>
    </style:style>
    <style:style style:name="gr167" style:family="graphic" style:parent-style-name="standard">
      <style:graphic-properties svg:stroke-width="0.046cm" svg:stroke-color="#ff0000" draw:marker-start-width="0.269cm" draw:marker-end-width="0.269cm" draw:fill-color="#ffffff" draw:textarea-horizontal-align="justify" draw:textarea-vertical-align="middle" draw:auto-grow-height="false" fo:min-height="1.602cm" fo:min-width="5.056cm" fo:padding-top="0.098cm" fo:padding-bottom="0.098cm" fo:padding-left="0.223cm" fo:padding-right="0.223cm" fo:wrap-option="wrap" loext:decorative="false"/>
      <style:paragraph-properties style:writing-mode="lr-tb"/>
    </style:style>
    <style:style style:name="gr168" style:family="graphic" style:parent-style-name="objectwithoutfill">
      <style:graphic-properties svg:stroke-width="0.046cm" draw:marker-start-width="0.274cm" draw:marker-end="화살촉_20_162" draw:marker-end-width="0.183cm" draw:fill="none" fo:padding-top="0.133cm" fo:padding-bottom="0.133cm" fo:padding-left="0.258cm" fo:padding-right="0.258cm" loext:decorative="false"/>
    </style:style>
    <style:style style:name="gr169" style:family="graphic" style:parent-style-name="objectwithoutfill">
      <style:graphic-properties svg:stroke-width="0.046cm" draw:marker-start-width="0.274cm" draw:marker-end="화살촉_20_163" draw:marker-end-width="0.183cm" draw:fill="none" fo:padding-top="0.133cm" fo:padding-bottom="0.133cm" fo:padding-left="0.258cm" fo:padding-right="0.258cm" loext:decorative="false"/>
    </style:style>
    <style:style style:name="gr170" style:family="graphic" style:parent-style-name="objectwithoutfill">
      <style:graphic-properties svg:stroke-width="0.046cm" draw:marker-start-width="0.274cm" draw:marker-end="화살촉_20_164" draw:marker-end-width="0.183cm" draw:fill="none" fo:padding-top="0.133cm" fo:padding-bottom="0.133cm" fo:padding-left="0.258cm" fo:padding-right="0.258cm" loext:decorative="false"/>
    </style:style>
    <style:style style:name="gr171" style:family="graphic" style:parent-style-name="objectwithoutfill">
      <style:graphic-properties svg:stroke-width="0.046cm" draw:marker-start-width="0.274cm" draw:marker-end="화살촉_20_165" draw:marker-end-width="0.183cm" draw:fill="none" fo:padding-top="0.133cm" fo:padding-bottom="0.133cm" fo:padding-left="0.258cm" fo:padding-right="0.258cm" loext:decorative="false"/>
    </style:style>
    <style:style style:name="gr172"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92cm" fo:min-width="3.745cm" fo:padding-top="0.125cm" fo:padding-bottom="0.125cm" fo:padding-left="0.25cm" fo:padding-right="0.25cm" fo:wrap-option="no-wrap" style:writing-mode="lr-tb" loext:decorative="false"/>
      <style:paragraph-properties style:writing-mode="lr-tb"/>
    </style:style>
    <style:style style:name="gr173"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28cm" fo:min-width="5.634cm" fo:padding-top="0.125cm" fo:padding-bottom="0.125cm" fo:padding-left="0.25cm" fo:padding-right="0.25cm" fo:wrap-option="no-wrap" style:writing-mode="lr-tb" loext:decorative="false"/>
      <style:paragraph-properties style:writing-mode="lr-tb"/>
    </style:style>
    <style:style style:name="gr174" style:family="graphic" style:parent-style-name="objectwithoutfill">
      <style:graphic-properties svg:stroke-width="0.046cm" draw:marker-start-width="0.274cm" draw:marker-end="화살촉_20_166" draw:marker-end-width="0.183cm" draw:fill="none" fo:padding-top="0.133cm" fo:padding-bottom="0.133cm" fo:padding-left="0.258cm" fo:padding-right="0.258cm" loext:decorative="false"/>
    </style:style>
    <style:style style:name="gr175" style:family="graphic" style:parent-style-name="standard">
      <style:graphic-properties svg:stroke-width="0.046cm" svg:stroke-color="#ff0000" draw:marker-start-width="0.269cm" draw:marker-end-width="0.269cm" draw:fill-color="#ffffff" draw:textarea-horizontal-align="justify" draw:textarea-vertical-align="middle" draw:auto-grow-height="false" fo:min-height="1.656cm" fo:min-width="5.11cm" fo:padding-top="0.098cm" fo:padding-bottom="0.098cm" fo:padding-left="0.223cm" fo:padding-right="0.223cm" fo:wrap-option="wrap" loext:decorative="false"/>
      <style:paragraph-properties style:writing-mode="lr-tb"/>
    </style:style>
    <style:style style:name="gr176" style:family="graphic" style:parent-style-name="standard">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82cm" fo:min-width="3.376cm" fo:padding-top="0.125cm" fo:padding-bottom="0.125cm" fo:padding-left="0.25cm" fo:padding-right="0.25cm" fo:wrap-option="no-wrap" style:writing-mode="lr-tb" loext:decorative="false"/>
      <style:paragraph-properties style:writing-mode="lr-tb"/>
    </style:style>
    <style:style style:name="gr177"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192cm" fo:min-width="3.745cm" fo:padding-top="0.125cm" fo:padding-bottom="0.125cm" fo:padding-left="0.25cm" fo:padding-right="0.25cm" fo:wrap-option="no-wrap" style:writing-mode="lr-tb" loext:decorative="false"/>
      <style:paragraph-properties style:writing-mode="lr-tb"/>
    </style:style>
    <style:style style:name="gr178" style:family="graphic" style:parent-style-name="standard">
      <style:graphic-properties svg:stroke-width="0.046cm" svg:stroke-color="#ff0000" draw:marker-start-width="0.269cm" draw:marker-end-width="0.269cm" draw:fill-color="#ffffff" draw:textarea-horizontal-align="justify" draw:textarea-vertical-align="middle" draw:auto-grow-height="false" fo:min-height="1.008cm" fo:min-width="5.11cm" fo:padding-top="0.098cm" fo:padding-bottom="0.098cm" fo:padding-left="0.223cm" fo:padding-right="0.223cm" fo:wrap-option="wrap" loext:decorative="false"/>
      <style:paragraph-properties style:writing-mode="lr-tb"/>
    </style:style>
    <style:style style:name="gr179"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555cm" fo:min-width="3.505cm" fo:padding-top="0.125cm" fo:padding-bottom="0.125cm" fo:padding-left="0.25cm" fo:padding-right="0.25cm" fo:wrap-option="no-wrap" style:writing-mode="lr-tb" loext:decorative="false"/>
      <style:paragraph-properties style:writing-mode="lr-tb"/>
    </style:style>
    <style:style style:name="gr180"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555cm" fo:min-width="3.505cm" fo:padding-top="0.125cm" fo:padding-bottom="0.125cm" fo:padding-left="0.25cm" fo:padding-right="0.25cm" fo:wrap-option="no-wrap" style:writing-mode="lr-tb" loext:decorative="false"/>
      <style:paragraph-properties style:writing-mode="lr-tb"/>
    </style:style>
    <style:style style:name="gr181"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555cm" fo:min-width="4.505cm" fo:padding-top="0.125cm" fo:padding-bottom="0.125cm" fo:padding-left="0.25cm" fo:padding-right="0.25cm" fo:wrap-option="no-wrap" style:writing-mode="lr-tb" loext:decorative="false"/>
      <style:paragraph-properties style:writing-mode="lr-tb"/>
    </style:style>
    <style:style style:name="gr182"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555cm" fo:min-width="3.505cm" fo:padding-top="0.125cm" fo:padding-bottom="0.125cm" fo:padding-left="0.25cm" fo:padding-right="0.25cm" fo:wrap-option="no-wrap" style:writing-mode="lr-tb" loext:decorative="false"/>
      <style:paragraph-properties style:writing-mode="lr-tb"/>
    </style:style>
    <style:style style:name="gr183"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555cm" fo:min-width="3.505cm" fo:padding-top="0.125cm" fo:padding-bottom="0.125cm" fo:padding-left="0.25cm" fo:padding-right="0.25cm" fo:wrap-option="no-wrap" style:writing-mode="lr-tb" loext:decorative="false"/>
      <style:paragraph-properties style:writing-mode="lr-tb"/>
    </style:style>
    <style:style style:name="gr184" style:family="graphic" style:parent-style-name="standard">
      <style:graphic-properties draw:stroke="solid" svg:stroke-width="0.05cm" svg:stroke-color="#ff0000" svg:stroke-opacity="100%" draw:stroke-linejoin="miter" svg:stroke-linecap="butt" draw:fill="solid" draw:fill-color="#ffffff" draw:opacity="100%" draw:textarea-horizontal-align="center" draw:textarea-vertical-align="middle" draw:auto-grow-height="false" draw:auto-grow-width="false" fo:min-height="1.156cm" fo:min-width="5.864cm" fo:padding-top="0.125cm" fo:padding-bottom="0.125cm" fo:padding-left="0.25cm" fo:padding-right="0.25cm" fo:wrap-option="no-wrap" style:writing-mode="lr-tb" loext:decorative="false"/>
      <style:paragraph-properties style:writing-mode="lr-tb"/>
    </style:style>
    <style:style style:name="gr185"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555cm" fo:min-width="3.505cm" fo:padding-top="0.125cm" fo:padding-bottom="0.125cm" fo:padding-left="0.25cm" fo:padding-right="0.25cm" fo:wrap-option="no-wrap" style:writing-mode="lr-tb" loext:decorative="false"/>
      <style:paragraph-properties style:writing-mode="lr-tb"/>
    </style:style>
    <style:style style:name="gr186"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555cm" fo:min-width="3.505cm" fo:padding-top="0.125cm" fo:padding-bottom="0.125cm" fo:padding-left="0.25cm" fo:padding-right="0.25cm" fo:wrap-option="no-wrap" style:writing-mode="lr-tb" loext:decorative="false"/>
      <style:paragraph-properties style:writing-mode="lr-tb"/>
    </style:style>
    <style:style style:name="gr187"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2.097cm" fo:min-width="4.447cm" fo:padding-top="0.125cm" fo:padding-bottom="0.125cm" fo:padding-left="0.25cm" fo:padding-right="0.25cm" fo:wrap-option="no-wrap" style:writing-mode="lr-tb" loext:decorative="false"/>
      <style:paragraph-properties style:writing-mode="lr-tb"/>
    </style:style>
    <style:style style:name="gr188"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465cm" fo:min-width="3.915cm" fo:padding-top="0.125cm" fo:padding-bottom="0.125cm" fo:padding-left="0.25cm" fo:padding-right="0.25cm" fo:wrap-option="no-wrap" style:writing-mode="lr-tb" loext:decorative="false"/>
      <style:paragraph-properties style:writing-mode="lr-tb"/>
    </style:style>
    <style:style style:name="gr189" style:family="graphic" style:parent-style-name="objectwithoutfill">
      <style:graphic-properties svg:stroke-width="0.046cm" draw:marker-start-width="0.274cm" draw:marker-end="화살촉_20_169" draw:marker-end-width="0.183cm" draw:fill="none" fo:padding-top="0.133cm" fo:padding-bottom="0.133cm" fo:padding-left="0.258cm" fo:padding-right="0.258cm" loext:decorative="false"/>
    </style:style>
    <style:style style:name="gr190" style:family="graphic" style:parent-style-name="objectwithoutfill">
      <style:graphic-properties svg:stroke-width="0.046cm" draw:marker-start-width="0.274cm" draw:marker-end="화살촉_20_170" draw:marker-end-width="0.183cm" draw:fill="none" fo:padding-top="0.133cm" fo:padding-bottom="0.133cm" fo:padding-left="0.258cm" fo:padding-right="0.258cm" loext:decorative="false"/>
    </style:style>
    <style:style style:name="gr191"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555cm" fo:min-width="3.505cm" fo:padding-top="0.125cm" fo:padding-bottom="0.125cm" fo:padding-left="0.25cm" fo:padding-right="0.25cm" fo:wrap-option="no-wrap" style:writing-mode="lr-tb" loext:decorative="false"/>
      <style:paragraph-properties style:writing-mode="lr-tb"/>
    </style:style>
    <style:style style:name="gr192"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555cm" fo:min-width="3.505cm" fo:padding-top="0.125cm" fo:padding-bottom="0.125cm" fo:padding-left="0.25cm" fo:padding-right="0.25cm" fo:wrap-option="no-wrap" style:writing-mode="lr-tb" loext:decorative="false"/>
      <style:paragraph-properties style:writing-mode="lr-tb"/>
    </style:style>
    <style:style style:name="gr193"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0.923cm" fo:min-width="3.373cm" fo:padding-top="0.125cm" fo:padding-bottom="0.125cm" fo:padding-left="0.25cm" fo:padding-right="0.25cm" fo:wrap-option="no-wrap" style:writing-mode="lr-tb" loext:decorative="false"/>
      <style:paragraph-properties style:writing-mode="lr-tb"/>
    </style:style>
    <style:style style:name="gr194" style:family="graphic" style:parent-style-name="standard" style:list-style-name="L2">
      <style:graphic-properties draw:stroke="solid" svg:stroke-width="0.035cm" svg:stroke-color="#7f7f7f" svg:stroke-opacity="100%" draw:stroke-linejoin="miter" svg:stroke-linecap="butt" draw:fill="solid" draw:fill-color="#ffffff" draw:opacity="100%" draw:textarea-horizontal-align="center" draw:textarea-vertical-align="middle" draw:auto-grow-height="false" draw:auto-grow-width="false" fo:min-height="1.465cm" fo:min-width="3.815cm" fo:padding-top="0.125cm" fo:padding-bottom="0.125cm" fo:padding-left="0.25cm" fo:padding-right="0.25cm" fo:wrap-option="no-wrap" style:writing-mode="lr-tb" loext:decorative="false"/>
      <style:paragraph-properties style:writing-mode="lr-tb"/>
    </style:style>
    <style:style style:name="gr195" style:family="graphic" style:parent-style-name="standard">
      <style:graphic-properties svg:stroke-width="0.053cm" draw:marker-start-width="0.28cm" draw:marker-end-width="0.28cm" draw:textarea-horizontal-align="justify" draw:textarea-vertical-align="middle" draw:auto-grow-height="false" fo:min-height="0cm" fo:min-width="11.738cm" fo:padding-top="0.102cm" fo:padding-bottom="0.102cm" fo:padding-left="0.227cm" fo:padding-right="0.227cm" loext:decorative="false"/>
    </style:style>
    <style:style style:name="pr1" style:family="presentation" style:parent-style-name="Master2-Layout2-blank-빈-화면-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loext:decorative="false"/>
      <style:paragraph-properties style:writing-mode="lr-tb"/>
    </style:style>
    <style:style style:name="P1" style:family="paragraph">
      <loext:graphic-properties draw:fill="none"/>
    </style:style>
    <style:style style:name="P2" style:family="paragraph">
      <style:paragraph-properties fo:margin-left="0cm" fo:margin-right="0cm" fo:margin-top="0cm" fo:margin-bottom="0cm" fo:line-height="100%" fo:text-align="end" fo:text-indent="0cm" style:punctuation-wrap="simple" loext:tab-stop-distance="0cm" style:writing-mode="lr-tb">
        <style:tab-stops/>
      </style:paragraph-properties>
      <style:text-properties style:font-size-asian="18pt"/>
    </style:style>
    <style:style style:name="P3" style:family="paragraph">
      <loext:graphic-properties draw:fill="none"/>
      <style:paragraph-properties fo:margin-left="0cm" fo:margin-right="0cm" fo:margin-top="0cm" fo:margin-bottom="0cm" fo:line-height="100%" fo:text-align="end" fo:text-indent="0cm" style:punctuation-wrap="simple" loext:tab-stop-distance="0cm" style:font-independent-line-spacing="true">
        <style:tab-stops/>
      </style:paragraph-properties>
      <style:text-properties style:font-size-asian="18pt"/>
    </style:style>
    <style:style style:name="P4" style:family="paragraph">
      <style:text-properties fo:color="#666666" loext:opacity="100%" fo:font-size="54pt" fo:font-weight="bold" style:font-size-asian="54pt" style:font-weight-asian="bold" style:font-size-complex="54pt" style:font-weight-complex="bold"/>
    </style:style>
    <style:style style:name="P5" style:family="paragraph">
      <loext:graphic-properties draw:fill="none" draw:fill-color="#ffffff"/>
      <style:text-properties fo:color="#666666" loext:opacity="100%" fo:font-size="54pt" fo:font-weight="bold" style:font-size-asian="54pt" style:font-weight-asian="bold" style:font-size-complex="54pt" style:font-weight-complex="bold"/>
    </style:style>
    <style:style style:name="P6" style:family="paragraph">
      <style:paragraph-properties fo:text-align="center"/>
    </style:style>
    <style:style style:name="P7" style:family="paragraph">
      <style:text-properties fo:color="#666666" loext:opacity="100%" fo:font-size="26pt" style:font-size-asian="26pt" style:font-size-complex="26pt"/>
    </style:style>
    <style:style style:name="P8" style:family="paragraph">
      <loext:graphic-properties draw:fill="none" draw:fill-color="#ffffff"/>
      <style:text-properties fo:color="#666666" loext:opacity="100%" fo:font-size="26pt" style:font-size-asian="26pt" style:font-size-complex="26pt"/>
    </style:style>
    <style:style style:name="P9" style:family="paragraph">
      <loext:graphic-properties draw:fill="none" draw:fill-color="#ffffff"/>
      <style:paragraph-properties style:font-independent-line-spacing="true"/>
      <style:text-properties fo:font-size="20pt"/>
    </style:style>
    <style:style style:name="P10" style:family="paragraph">
      <loext:graphic-properties draw:fill="solid" draw:fill-color="#e6e6e6" draw:opacity="100%"/>
    </style:style>
    <style:style style:name="P11"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12" style:family="paragraph">
      <loext:graphic-properties draw:fill="solid" draw:fill-color="#e6e6e6" draw:opacity="100%"/>
      <style:paragraph-properties style:writing-mode="lr-tb" style:font-independent-line-spacing="false"/>
    </style:style>
    <style:style style:name="P13" style:family="paragraph">
      <loext:graphic-properties draw:fill="solid" draw:fill-color="#e6e6e6"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14" style:family="paragraph">
      <loext:graphic-properties draw:fill="solid" draw:fill-color="#ffffff" draw:opacity="100%"/>
      <style:paragraph-properties style:writing-mode="lr-tb" style:font-independent-line-spacing="false"/>
    </style:style>
    <style:style style:name="P15" style:family="paragraph">
      <loext:graphic-properties draw:fill="none"/>
      <style:paragraph-properties fo:text-align="center"/>
    </style:style>
    <style:style style:name="P16"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7" style:family="paragraph">
      <loext:graphic-properties draw:fill="none"/>
      <style:paragraph-properties style:font-independent-line-spacing="true"/>
    </style:style>
    <style:style style:name="P18" style:family="paragraph">
      <loext:graphic-properties draw:fill-color="#eeeeee"/>
      <style:paragraph-properties fo:text-align="center"/>
    </style:style>
    <style:style style:name="P19" style:family="paragraph">
      <loext:graphic-properties draw:fill="none" draw:fill-color="#ffffff"/>
      <style:text-properties fo:color="#666666" loext:opacity="100%" fo:font-size="12pt" style:font-size-asian="12pt" style:font-size-complex="12pt"/>
    </style:style>
    <style:style style:name="P20"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21" style:family="paragraph">
      <loext:graphic-properties draw:fill="none" draw:fill-color="#ffffff"/>
      <style:paragraph-properties style:font-independent-line-spacing="true"/>
    </style:style>
    <style:style style:name="P22" style:family="paragraph">
      <loext:graphic-properties draw:fill="none"/>
      <style:paragraph-properties style:writing-mode="lr-tb" style:font-independent-line-spacing="true"/>
    </style:style>
    <style:style style:name="P23" style:family="paragraph">
      <loext:graphic-properties draw:fill="solid" draw:fill-color="#fffff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24" style:family="paragraph">
      <loext:graphic-properties draw:fill="solid" draw:fill-color="#e7e6e6"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25"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26" style:family="paragraph">
      <loext:graphic-properties draw:fill="none"/>
      <style:paragraph-properties style:writing-mode="lr-tb" style:font-independent-line-spacing="false"/>
    </style:style>
    <style:style style:name="P27" style:family="paragraph">
      <loext:graphic-properties draw:fill="solid" draw:fill-color="#e7e6e6" draw:opacity="100%"/>
      <style:paragraph-properties style:writing-mode="lr-tb" style:font-independent-line-spacing="false"/>
    </style:style>
    <style:style style:name="P28"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font-size="12pt" style:font-size-asian="12pt" style:font-size-complex="12pt"/>
    </style:style>
    <style:style style:name="P29" style:family="paragraph">
      <loext:graphic-properties draw:fill="solid" draw:fill-color="#fffff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text-properties fo:font-size="12pt" style:font-size-asian="12pt" style:font-size-complex="12pt"/>
    </style:style>
    <style:style style:name="P30" style:family="paragraph">
      <style:paragraph-properties fo:margin-left="0cm" fo:margin-right="0cm" fo:margin-top="0.1cm" fo:margin-bottom="0.1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ans KR" fo:font-size="18pt" fo:font-style="normal" fo:text-shadow="none" style:text-underline-style="none" fo:font-weight="normal" style:letter-kerning="true" style:font-name-asian="Noto Sans KR3"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font-size="11pt" style:font-size-asian="11pt" style:font-size-complex="11pt"/>
    </style:style>
    <style:style style:name="P32" style:family="paragraph">
      <loext:graphic-properties draw:fill="solid" draw:fill-color="#fffff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text-properties fo:font-size="11pt" style:font-size-asian="11pt" style:font-size-complex="11pt"/>
    </style:style>
    <style:style style:name="P33"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true">
        <style:tab-stops/>
      </style:paragraph-properties>
      <style:text-properties fo:font-size="18pt"/>
    </style:style>
    <style:style style:name="P34" style:family="paragraph">
      <loext:graphic-properties draw:fill="none"/>
      <style:paragraph-properties fo:margin-left="0cm" fo:margin-right="0cm" fo:margin-top="0cm" fo:margin-bottom="0cm" fo:line-height="100%" fo:text-align="end" fo:text-indent="0cm" style:punctuation-wrap="simple" loext:tab-stop-distance="0cm" style:font-independent-line-spacing="true">
        <style:tab-stops/>
      </style:paragraph-properties>
      <style:text-properties fo:font-size="18pt" style:font-size-asian="18pt"/>
    </style:style>
    <style:style style:name="P35"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color="#000000" loext:opacity="100%" fo:font-size="11pt" style:font-size-asian="11pt" style:font-size-complex="11pt"/>
    </style:style>
    <style:style style:name="P37" style:family="paragraph">
      <loext:graphic-properties draw:fill="solid" draw:fill-color="#fffff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text-properties fo:color="#000000" loext:opacity="100%" fo:font-size="11pt" style:font-size-asian="11pt" style:font-size-complex="11pt"/>
    </style:style>
    <style:style style:name="P38"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style:font-size-asian="18pt"/>
    </style:style>
    <style:style style:name="P39" style:family="paragraph">
      <loext:graphic-properties draw:fill="solid" draw:fill-color="#fffff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text-properties style:font-size-asian="18pt"/>
    </style:style>
    <style:style style:name="P40"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font-size="18pt"/>
    </style:style>
    <style:style style:name="P41" style:family="paragraph">
      <loext:graphic-properties draw:fill="solid" draw:fill-color="#fffff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text-properties fo:font-size="18pt"/>
    </style:style>
    <style:style style:name="P42" style:family="paragraph">
      <loext:graphic-properties draw:fill="solid" draw:fill-color="#e6e6e6"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text-properties style:font-size-asian="18pt"/>
    </style:style>
    <style:style style:name="P43" style:family="paragraph">
      <style:paragraph-properties fo:text-align="center"/>
      <style:text-properties fo:font-size="10pt" fo:font-weight="normal" style:font-size-asian="10pt" style:font-weight-asian="normal" style:font-size-complex="10pt" style:font-weight-complex="normal"/>
    </style:style>
    <style:style style:name="P44" style:family="paragraph">
      <loext:graphic-properties draw:fill-color="#ffffff"/>
      <style:paragraph-properties fo:text-align="center" style:writing-mode="lr-tb"/>
      <style:text-properties fo:font-size="10pt" fo:font-weight="normal" style:font-size-asian="10pt" style:font-weight-asian="normal" style:font-size-complex="10pt" style:font-weight-complex="normal"/>
    </style:style>
    <style:style style:name="P45" style:family="paragraph">
      <loext:graphic-properties draw:fill-color="#ffffff"/>
      <style:paragraph-properties fo:text-align="center"/>
      <style:text-properties fo:font-size="12pt" style:font-size-asian="12pt" style:font-size-complex="12pt"/>
    </style:style>
    <style:style style:name="P46" style:family="paragraph">
      <loext:graphic-properties draw:fill="solid" draw:fill-color="#fffff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text-properties fo:font-weight="bold"/>
    </style:style>
    <style:style style:name="P47"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font-size="13pt" style:font-size-asian="13pt" style:font-size-complex="13pt"/>
    </style:style>
    <style:style style:name="P48" style:family="paragraph">
      <loext:graphic-properties draw:fill="solid" draw:fill-color="#fffff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text-properties fo:font-size="13pt" style:font-size-asian="13pt" style:font-size-complex="13pt"/>
    </style:style>
    <style:style style:name="P49"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font-weight="bold"/>
    </style:style>
    <style:style style:name="P50" style:family="paragraph">
      <style:text-properties fo:color="#666666" loext:opacity="100%" fo:font-size="60pt" fo:font-weight="bold" style:font-size-asian="60pt" style:font-weight-asian="bold" style:font-size-complex="60pt" style:font-weight-complex="bold"/>
    </style:style>
    <style:style style:name="P51" style:family="paragraph">
      <loext:graphic-properties draw:fill="none" draw:fill-color="#ffffff"/>
      <style:text-properties fo:color="#666666" loext:opacity="100%" fo:font-size="60pt" fo:font-weight="bold" style:font-size-asian="60pt" style:font-weight-asian="bold" style:font-size-complex="60pt" style:font-weight-complex="bold"/>
    </style:style>
    <style:style style:name="T1" style:family="text">
      <style:text-properties fo:font-variant="normal" fo:text-transform="none" fo:color="#ffffff"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erif KR1" style:font-size-asian="14pt" style:font-style-asian="normal" style:font-weight-asian="normal" style:font-name-complex="Tahoma1" style:font-size-complex="14pt" style:font-style-complex="normal" style:font-weight-complex="normal"/>
    </style:style>
    <style:style style:name="T2" style:family="text">
      <style:text-properties fo:color="#666666" loext:opacity="100%" fo:font-size="54pt" fo:font-weight="bold" style:font-size-asian="54pt" style:font-weight-asian="bold" style:font-size-complex="54pt" style:font-weight-complex="bold"/>
    </style:style>
    <style:style style:name="T3" style:family="text">
      <style:text-properties fo:color="#666666" loext:opacity="100%" fo:font-size="26pt" style:font-size-asian="26pt" style:font-size-complex="26pt"/>
    </style:style>
    <style:style style:name="T4" style:family="text">
      <style:text-properties fo:font-variant="normal" fo:text-transform="none" fo:color="#000000" loext:opacity="100%" style:text-line-through-style="none" style:text-line-through-type="none" style:text-position="0% 100%" style:font-name="Liberation Sans" fo:font-size="14pt" fo:letter-spacing="normal" fo:font-style="normal" style:text-underline-style="none" fo:font-weight="normal" style:text-underline-mode="continuous" style:text-overline-mode="continuous" style:text-line-through-mode="continuous" style:letter-kerning="true" style:font-name-asian="Noto Serif KR1" style:font-size-asian="14pt" style:language-asian="ko" style:country-asian="KR" style:font-style-asian="normal" style:font-weight-asian="normal" style:font-name-complex="Tahoma1"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ans" fo:font-size="10pt" fo:letter-spacing="normal" fo:font-style="normal" style:text-underline-style="none" fo:font-weight="normal" style:text-underline-mode="continuous" style:text-overline-mode="continuous" style:text-line-through-mode="continuous" style:letter-kerning="true" style:font-name-asian="Noto Serif KR1" style:font-size-asian="10pt" style:language-asian="ko" style:country-asian="KR" style:font-style-asian="normal" style:font-weight-asian="normal" style:font-name-complex="Tahoma1" style:font-size-complex="10pt" style:font-style-complex="normal" style:font-weight-complex="normal"/>
    </style:style>
    <style:style style:name="T6" style:family="text">
      <style:text-properties fo:font-variant="normal" fo:text-transform="none" fo:color="#7f7f7f" loext:opacity="100%" style:text-line-through-style="none" style:text-line-through-type="none" style:text-position="0% 100%" style:font-name="맑은 고딕1" fo:font-size="18pt" fo:letter-spacing="normal" fo:language="en" fo:country="US" fo:font-style="normal" style:text-underline-style="none" fo:font-weight="bold" style:text-underline-mode="continuous" style:text-overline-mode="continuous" style:text-line-through-mode="continuous" style:letter-kerning="true" style:font-name-asian="맑은 고딕1" style:font-size-asian="18pt" style:language-asian="ko" style:country-asian="KR" style:font-style-asian="normal" style:font-weight-asian="bold" style:font-size-complex="18pt" style:font-style-complex="normal" style:font-weight-complex="bold"/>
    </style:style>
    <style:style style:name="T7" style:family="text">
      <style:text-properties fo:color="#666666" loext:opacity="100%" fo:font-size="12pt" style:font-size-asian="12pt" style:font-size-complex="12pt"/>
    </style:style>
    <style:style style:name="T8" style:family="text">
      <style:text-properties fo:font-variant="normal" fo:text-transform="none" fo:color="#000000" loext:opacity="100%" style:text-line-through-style="none" style:text-line-through-type="none" style:text-position="0% 100%" style:font-name="Liberation Sans" fo:font-size="10pt" fo:letter-spacing="normal" fo:language="en" fo:country="US" fo:font-style="normal" style:text-underline-style="none" fo:font-weight="normal" style:text-underline-mode="continuous" style:text-overline-mode="continuous" style:text-line-through-mode="continuous" style:letter-kerning="true" style:font-name-asian="Noto Serif KR1" style:font-size-asian="10pt" style:font-style-asian="normal" style:font-weight-asian="normal" style:font-name-complex="Tahoma1" style:font-size-complex="1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 fo:font-size="10pt" fo:letter-spacing="normal" fo:language="en" fo:country="US" fo:font-style="normal" style:text-underline-style="none" fo:font-weight="normal" style:text-underline-mode="continuous" style:text-overline-mode="continuous" style:text-line-through-mode="continuous" style:letter-kerning="false" style:font-name-asian="Noto Serif KR1" style:font-size-asian="10pt" style:language-asian="ko" style:country-asian="KR" style:font-style-asian="normal" style:font-weight-asian="normal" style:font-name-complex="Tahoma1" style:font-size-complex="1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Black" fo:font-size="18pt" fo:letter-spacing="normal" fo:font-style="normal" style:text-underline-style="none" fo:font-weight="bold" style:text-underline-mode="continuous" style:text-overline-mode="continuous" style:text-line-through-mode="continuous" style:letter-kerning="true" style:font-name-asian="Arial Black" style:font-size-asian="18pt" style:language-asian="ko" style:country-asian="KR" style:font-style-asian="normal" style:font-weight-asian="bold" style:font-name-complex="Tahoma1"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 Black" fo:font-size="18pt" fo:letter-spacing="normal" fo:language="en" fo:country="US" fo:font-style="normal" style:text-underline-style="none" fo:font-weight="bold" style:text-underline-mode="continuous" style:text-overline-mode="continuous" style:text-line-through-mode="continuous" style:letter-kerning="true" style:font-name-asian="Arial Black" style:font-size-asian="18pt" style:font-style-asian="normal" style:font-weight-asian="bold" style:font-name-complex="Tahoma1" style:font-size-complex="18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Arial Black" fo:font-size="18pt" fo:letter-spacing="normal" fo:language="en" fo:country="US" fo:font-style="normal" style:text-underline-style="none" fo:font-weight="bold" style:text-underline-mode="continuous" style:text-overline-mode="continuous" style:text-line-through-mode="continuous" style:letter-kerning="true" style:font-name-asian="Arial Black" style:font-size-asian="18pt" style:language-asian="ko" style:country-asian="KR" style:font-style-asian="normal" style:font-weight-asian="bold" style:font-name-complex="Tahoma1" style:font-size-complex="18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Liberation Sans" fo:font-size="9pt" fo:letter-spacing="normal" fo:font-style="normal" style:text-underline-style="none" fo:font-weight="normal" style:text-underline-mode="continuous" style:text-overline-mode="continuous" style:text-line-through-mode="continuous" style:letter-kerning="true" style:font-name-asian="Noto Serif KR1" style:font-size-asian="9pt" style:language-asian="ko" style:country-asian="KR" style:font-style-asian="normal" style:font-weight-asian="normal" style:font-name-complex="Tahoma1" style:font-size-complex="9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Liberation Sans" fo:font-size="9pt" fo:letter-spacing="normal" fo:language="en" fo:country="US" fo:font-style="normal" style:text-underline-style="none" fo:font-weight="normal" style:text-underline-mode="continuous" style:text-overline-mode="continuous" style:text-line-through-mode="continuous" style:letter-kerning="true" style:font-name-asian="Noto Serif KR1" style:font-size-asian="9pt" style:font-style-asian="normal" style:font-weight-asian="normal" style:font-name-complex="Tahoma1" style:font-size-complex="9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Liberation Sans" fo:font-size="9pt" fo:letter-spacing="normal" fo:language="en" fo:country="US" fo:font-style="normal" style:text-underline-style="none" fo:font-weight="normal" style:text-underline-mode="continuous" style:text-overline-mode="continuous" style:text-line-through-mode="continuous" style:letter-kerning="true" style:font-name-asian="Noto Serif KR1" style:font-size-asian="9pt" style:language-asian="ko" style:country-asian="KR" style:font-style-asian="normal" style:font-weight-asian="normal" style:font-name-complex="Tahoma1" style:font-size-complex="9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Liberation Sans" fo:font-size="9pt" fo:letter-spacing="normal" fo:language="en" fo:country="US" fo:font-style="normal" style:text-underline-style="none" fo:font-weight="normal" style:text-underline-mode="continuous" style:text-overline-mode="continuous" style:text-line-through-mode="continuous" style:letter-kerning="false" style:font-name-asian="Noto Serif KR1" style:font-size-asian="9pt" style:language-asian="ko" style:country-asian="KR" style:font-style-asian="normal" style:font-weight-asian="normal" style:font-name-complex="Tahoma1" style:font-size-complex="9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12pt" style:language-asian="ko" style:country-asian="KR" style:font-style-asian="normal" style:font-weight-asian="normal" style:font-size-complex="12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Liberation Sans" fo:font-size="10pt" fo:letter-spacing="normal" fo:language="en" fo:country="US" fo:font-style="normal" style:text-underline-style="none" fo:font-weight="normal" style:text-underline-mode="continuous" style:text-overline-mode="continuous" style:text-line-through-mode="continuous" style:letter-kerning="true" style:font-name-asian="Noto Serif KR1" style:font-size-asian="10pt" style:language-asian="ko" style:country-asian="KR" style:font-style-asian="normal" style:font-weight-asian="normal" style:font-name-complex="Tahoma1" style:font-size-complex="10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Liberation Sans" fo:font-size="8pt" fo:letter-spacing="normal" fo:font-style="normal" style:text-underline-style="none" fo:font-weight="normal" style:text-underline-mode="continuous" style:text-overline-mode="continuous" style:text-line-through-mode="continuous" style:letter-kerning="true" style:font-name-asian="Noto Serif KR1" style:font-size-asian="8pt" style:language-asian="ko" style:country-asian="KR" style:font-style-asian="normal" style:font-weight-asian="normal" style:font-name-complex="Tahoma1" style:font-size-complex="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Liberation Sans" fo:font-size="8pt" fo:letter-spacing="normal" fo:language="en" fo:country="US" fo:font-style="normal" style:text-underline-style="none" fo:font-weight="normal" style:text-underline-mode="continuous" style:text-overline-mode="continuous" style:text-line-through-mode="continuous" style:letter-kerning="false" style:font-name-asian="Noto Serif KR1" style:font-size-asian="8pt" style:language-asian="ko" style:country-asian="KR" style:font-style-asian="normal" style:font-weight-asian="normal" style:font-name-complex="Tahoma1" style:font-size-complex="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Liberation Sans" fo:font-size="12pt" fo:letter-spacing="normal" fo:font-style="normal" style:text-underline-style="none" fo:font-weight="normal" style:text-underline-mode="continuous" style:text-overline-mode="continuous" style:text-line-through-mode="continuous" style:letter-kerning="true" style:font-name-asian="Noto Serif KR1" style:font-size-asian="12pt" style:language-asian="ko" style:country-asian="KR" style:font-style-asian="normal" style:font-weight-asian="normal" style:font-name-complex="Tahoma1" style:font-size-complex="12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Liberation Sans" fo:font-size="12pt" fo:letter-spacing="normal" fo:language="en" fo:country="US" fo:font-style="normal" style:text-underline-style="none" fo:font-weight="normal" style:text-underline-mode="continuous" style:text-overline-mode="continuous" style:text-line-through-mode="continuous" style:letter-kerning="true" style:font-name-asian="Noto Serif KR1"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Liberation Sans" fo:font-size="11pt" fo:letter-spacing="normal" fo:font-style="normal" style:text-underline-style="none" fo:font-weight="normal" style:text-underline-mode="continuous" style:text-overline-mode="continuous" style:text-line-through-mode="continuous" style:letter-kerning="true" style:font-name-asian="Noto Serif KR1" style:font-size-asian="11pt" style:language-asian="ko" style:country-asian="KR" style:font-style-asian="normal" style:font-weight-asian="normal" style:font-name-complex="Tahoma1" style:font-size-complex="11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Liberation Sans" fo:font-size="12pt" fo:letter-spacing="normal" fo:font-style="normal" fo:text-shadow="none" style:text-underline-style="none" fo:font-weight="normal" style:text-underline-mode="continuous" style:text-overline-mode="continuous" style:text-line-through-mode="continuous" style:letter-kerning="true" style:font-name-asian="Noto Serif KR1" style:font-size-asian="12pt" style:language-asian="ko" style:country-asian="KR" style:font-style-asian="normal" style:font-weight-asian="normal" style:font-name-complex="Tahoma1"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Liberation Sans" fo:font-size="12pt" fo:letter-spacing="normal" fo:font-style="normal" fo:text-shadow="none" style:text-underline-style="none" fo:font-weight="normal" style:text-underline-mode="continuous" style:text-overline-mode="continuous" style:text-line-through-mode="continuous" style:letter-kerning="true" style:font-name-asian="Noto Serif KR1" style:font-size-asian="18pt" style:language-asian="ko" style:country-asian="KR" style:font-style-asian="normal" style:font-weight-asian="normal" style:font-name-complex="Tahoma1"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Liberation Sans" fo:font-size="11pt" fo:letter-spacing="normal" fo:font-style="normal" fo:text-shadow="none" style:text-underline-style="none" fo:font-weight="normal" style:text-underline-mode="continuous" style:text-overline-mode="continuous" style:text-line-through-mode="continuous" style:letter-kerning="true" style:font-name-asian="Noto Serif KR1" style:font-size-asian="11pt" style:language-asian="ko" style:country-asian="KR" style:font-style-asian="normal" style:font-weight-asian="normal" style:font-name-complex="Tahoma1" style:font-size-complex="11pt" style:font-style-complex="normal" style:font-weight-complex="normal" style:text-emphasize="none" style:font-relief="none" style:text-overline-style="none" style:text-overline-color="font-color"/>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2pt" style:font-size-asian="12pt" style:font-size-complex="12pt"/>
    </style:style>
    <style:style style:name="T29" style:family="text">
      <style:text-properties fo:font-variant="normal" fo:text-transform="none" fo:color="#000000" loext:opacity="100%" style:text-line-through-style="none" style:text-line-through-type="none" style:text-position="0% 100%" style:font-name="Liberation Sans" fo:font-size="12pt" fo:letter-spacing="normal" fo:language="en" fo:country="US" fo:font-style="normal" style:text-underline-style="none" fo:font-weight="normal" style:text-underline-mode="continuous" style:text-overline-mode="continuous" style:text-line-through-mode="continuous" style:letter-kerning="true" style:font-name-asian="Noto Serif KR1" style:font-size-asian="12pt" style:language-asian="ko" style:country-asian="KR" style:font-style-asian="normal" style:font-weight-asian="normal" style:font-name-complex="Tahoma1" style:font-size-complex="12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Liberation Sans" fo:font-size="13pt" fo:letter-spacing="normal" fo:font-style="normal" style:text-underline-style="none" fo:font-weight="normal" style:text-underline-mode="continuous" style:text-overline-mode="continuous" style:text-line-through-mode="continuous" style:letter-kerning="true" style:font-name-asian="Noto Serif KR1" style:font-size-asian="13pt" style:language-asian="ko" style:country-asian="KR" style:font-style-asian="normal" style:font-weight-asian="normal" style:font-name-complex="Tahoma1" style:font-size-complex="13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Liberation Sans" fo:font-size="12pt" fo:letter-spacing="normal" fo:language="en" fo:country="US" fo:font-style="normal" style:text-underline-style="none" style:text-underline-mode="continuous" style:text-overline-mode="continuous" style:text-line-through-mode="continuous" style:letter-kerning="true" style:font-name-asian="Noto Serif KR1" style:font-size-asian="12pt" style:language-asian="ko" style:country-asian="KR" style:font-style-asian="normal" style:font-weight-asian="normal" style:font-name-complex="Tahoma1" style:font-size-complex="12pt" style:font-style-complex="normal" style:font-weight-complex="normal"/>
    </style:style>
    <style:style style:name="T32" style:family="text">
      <style:text-properties fo:color="#666666" loext:opacity="100%"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2-Layout2-blank-빈-화면" presentation:presentation-page-layout-name="AL1T14">
        <draw:frame draw:name="그림 14"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슬라이드 번호 개체 틀 29" draw:style-name="gr2" draw:text-style-name="P3" draw:layer="layout" svg:width="6.5cm" svg:height="1cm" svg:x="20.5cm" svg:y="14.5cm">
          <draw:text-box>
            <text:p text:style-name="P2"><text:span text:style-name="T1"><text:page-number>&lt;숫자&gt;</text:page-number></text:span></text:p>
          </draw:text-box>
        </draw:frame>
        <draw:frame draw:style-name="gr3" draw:text-style-name="P5" draw:layer="layout" svg:width="18cm" svg:height="5.5cm" svg:x="4.7cm" svg:y="4.9cm">
          <draw:text-box>
            <text:p text:style-name="P4"><text:span text:style-name="T2">프로세스 흐름도</text:span></text:p>
          </draw:text-box>
        </draw:frame>
        <draw:custom-shape draw:style-name="gr4" draw:text-style-name="P6" draw:layer="layout" svg:width="16cm" svg:height="0.001cm" svg:x="6cm" svg:y="10cm">
          <text:p/>
          <draw:enhanced-geometry svg:viewBox="0 0 21600 21600" draw:text-areas="2540 0 19060 21600" draw:type="flowchart-predefined-process" draw:enhanced-path="M 0 0 L 21600 0 21600 21600 0 21600 Z N M 2540 0 L 2540 21600 N M 19060 0 L 19060 21600 N"/>
        </draw:custom-shape>
        <draw:custom-shape draw:style-name="gr5" draw:text-style-name="P6" draw:layer="layout" svg:width="16cm" svg:height="0.001cm" svg:x="6.001cm" svg:y="5.6cm">
          <text:p/>
          <draw:enhanced-geometry svg:viewBox="0 0 21600 21600" draw:text-areas="2540 0 19060 21600" draw:type="flowchart-predefined-process" draw:enhanced-path="M 0 0 L 21600 0 21600 21600 0 21600 Z N M 2540 0 L 2540 21600 N M 19060 0 L 19060 21600 N"/>
        </draw:custom-shape>
        <draw:custom-shape draw:style-name="gr6" draw:text-style-name="P6" draw:layer="layout" svg:width="16cm" svg:height="0.001cm" svg:x="6.002cm" svg:y="5.8cm">
          <text:p/>
          <draw:enhanced-geometry svg:viewBox="0 0 21600 21600" draw:text-areas="2540 0 19060 21600" draw:type="flowchart-predefined-process" draw:enhanced-path="M 0 0 L 21600 0 21600 21600 0 21600 Z N M 2540 0 L 2540 21600 N M 19060 0 L 19060 21600 N"/>
        </draw:custom-shape>
        <draw:custom-shape draw:style-name="gr6" draw:text-style-name="P6" draw:layer="layout" svg:width="16cm" svg:height="0.001cm" svg:x="6.003cm" svg:y="9.8cm">
          <text:p/>
          <draw:enhanced-geometry svg:viewBox="0 0 21600 21600" draw:text-areas="2540 0 19060 21600" draw:type="flowchart-predefined-process" draw:enhanced-path="M 0 0 L 21600 0 21600 21600 0 21600 Z N M 2540 0 L 2540 21600 N M 19060 0 L 19060 21600 N"/>
        </draw:custom-shape>
        <draw:frame draw:style-name="gr7" draw:text-style-name="P8" draw:layer="layout" svg:width="5.946cm" svg:height="1.352cm" svg:x="20.339cm" svg:y="12.53cm">
          <draw:text-box>
            <text:p text:style-name="P7"><text:span text:style-name="T3">Project team</text:span></text:p>
          </draw:text-box>
        </draw:frame>
        <draw:frame draw:style-name="gr8" draw:text-style-name="P8" draw:layer="layout" svg:width="5.793cm" svg:height="1.352cm" svg:x="21.7cm" svg:y="13.631cm">
          <draw:text-box>
            <text:p text:style-name="P7"><text:span text:style-name="T3">우리 뭐 먹조</text:span></text:p>
          </draw:text-box>
        </draw:frame>
        <presentation:notes draw:style-name="dp2">
          <draw:frame draw:name="슬라이드 번호 개체 틀 30" draw:style-name="gr9" draw:text-style-name="P3" draw:layer="layout" svg:width="9.113cm" svg:height="1.484cm" svg:x="11.886cm" svg:y="28.215cm">
            <draw:text-box>
              <text:p text:style-name="P2"><text:span text:style-name="T1"><text:page-number>&lt;숫자&gt;</text:page-number></text:span></text:p>
            </draw:text-box>
          </draw:frame>
          <draw:page-thumbnail draw:name="슬라이드 이미지 개체 틀 15" draw:style-name="gr10" draw:layer="layout" svg:width="19.786cm" svg:height="11.135cm" svg:x="0.604cm" svg:y="2.258cm" draw:page-number="1" presentation:class="page"/>
          <draw:frame draw:name="슬라이드 노트 개체 틀 16" presentation:style-name="pr1" draw:text-style-name="P9" draw:layer="layout" svg:width="16.799cm" svg:height="13.364cm" svg:x="2.1cm" svg:y="14.107cm" presentation:class="notes" presentation:placeholder="true">
            <draw:text-box/>
          </draw:frame>
        </presentation:notes>
      </draw:page>
      <draw:page draw:name="page2" draw:style-name="dp1" draw:master-page-name="Master2-Layout2-blank-빈-화면" presentation:presentation-page-layout-name="AL1T14">
        <draw:frame draw:name="그림 18" draw:style-name="gr11" draw:text-style-name="P10"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custom-shape draw:name="자유형: 도형 1" draw:style-name="gr12" draw:text-style-name="P12" xml:id="id3" draw:id="id3" draw:layer="layout" svg:width="3cm" svg:height="3cm" svg:x="3.137cm" svg:y="3.6cm">
          <text:p text:style-name="P11"><text:span text:style-name="T4">일반 회원</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자유형: 도형 2" draw:style-name="gr12" draw:text-style-name="P12" xml:id="id4" draw:id="id4" draw:layer="layout" svg:width="3cm" svg:height="3cm" svg:x="22.997cm" svg:y="3.698cm">
          <text:p text:style-name="P11"><text:span text:style-name="T4">사장님</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자유형: 도형 3" draw:style-name="gr12" draw:text-style-name="P13" xml:id="id5" draw:id="id5" draw:layer="layout" svg:width="3cm" svg:height="3cm" svg:x="13.05cm" svg:y="3.698cm">
          <text:p text:style-name="P11"><text:span text:style-name="T4">관리자</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자유형: 도형 4" draw:style-name="gr13" draw:text-style-name="P14" draw:layer="layout" svg:width="3.5cm" svg:height="1.043cm" svg:x="17.976cm" svg:y="11.606cm">
          <text:p text:style-name="P11"><text:span text:style-name="T5">맛집 선택</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5" draw:style-name="gr13" draw:text-style-name="P14" xml:id="id2" draw:id="id2" draw:layer="layout" svg:width="3.5cm" svg:height="1.043cm" svg:x="22.747cm" svg:y="11.606cm">
          <text:p text:style-name="P11"><text:span text:style-name="T5">랜덤 룰렛</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6" draw:style-name="gr13" draw:text-style-name="P14" xml:id="id6" draw:id="id6" draw:layer="layout" svg:width="3.5cm" svg:height="1.043cm" svg:x="12.817cm" svg:y="11.606cm">
          <text:p text:style-name="P11"><text:span text:style-name="T5">카테고리</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7" draw:style-name="gr13" draw:text-style-name="P14" draw:layer="layout" svg:width="3.5cm" svg:height="1.043cm" svg:x="7.659cm" svg:y="11.606cm">
          <text:p text:style-name="P11"><text:span text:style-name="T5">검색</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8" draw:style-name="gr13" draw:text-style-name="P14" xml:id="id1" draw:id="id1" draw:layer="layout" svg:width="3.5cm" svg:height="1.043cm" svg:x="2.5cm" svg:y="11.606cm">
          <text:p text:style-name="P11"><text:span text:style-name="T5">로그인 화면</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onnector draw:style-name="gr14" draw:text-style-name="P15" draw:layer="layout" draw:line-skew="-1.08cm" svg:x1="4.25cm" svg:y1="11.606cm" svg:x2="24.497cm" svg:y2="11.606cm" draw:start-shape="id1" draw:start-glue-point="0" draw:end-shape="id2" draw:end-glue-point="0" svg:d="M4250 11606v-1606h20247v1606" svg:viewBox="0 0 20248 1607">
          <text:p/>
        </draw:connector>
        <draw:frame draw:name="TextBox 1" draw:style-name="gr15" draw:text-style-name="P17" draw:layer="layout" svg:width="3.298cm" svg:height="1.026cm" svg:x="0.181cm" svg:y="0.127cm">
          <draw:text-box>
            <text:p text:style-name="P16"><text:span text:style-name="T6">PROCESS</text:span></text:p>
          </draw:text-box>
        </draw:frame>
        <draw:connector draw:style-name="gr16" draw:text-style-name="P6" draw:layer="layout" draw:line-skew="0.784cm" svg:x1="4.637cm" svg:y1="6.6cm" svg:x2="24.497cm" svg:y2="6.698cm" draw:start-shape="id3" draw:start-glue-point="2" draw:end-shape="id4" draw:end-glue-point="2" svg:d="M4637 6600v1400h19860v-1302" svg:viewBox="0 0 19861 1401">
          <text:p/>
        </draw:connector>
        <draw:connector draw:style-name="gr17" draw:text-style-name="P15" draw:layer="layout" draw:type="line" svg:x1="14.55cm" svg:y1="6.698cm" svg:x2="14.567cm" svg:y2="11.606cm" draw:start-shape="id5" draw:start-glue-point="2" draw:end-shape="id6" draw:end-glue-point="0" svg:d="M14550 6698l17 4908" svg:viewBox="0 0 18 4909">
          <text:p/>
        </draw:connector>
        <draw:line draw:style-name="gr18" draw:text-style-name="P15" draw:layer="layout" svg:x1="9.5cm" svg:y1="10cm" svg:x2="9.5cm" svg:y2="11.606cm">
          <text:p/>
        </draw:line>
        <draw:line draw:style-name="gr18" draw:text-style-name="P15" draw:layer="layout" svg:x1="19.7cm" svg:y1="10cm" svg:x2="19.7cm" svg:y2="11.606cm">
          <text:p/>
        </draw:line>
        <draw:custom-shape draw:style-name="gr19" draw:text-style-name="P18" draw:layer="layout" svg:width="27.5cm" svg:height="0.9cm" svg:x="0.3cm" svg:y="1.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323cm">
          <draw:text-box>
            <text:p><text:span text:style-name="T7">프로세스 명</text:span></text:p>
          </draw:text-box>
        </draw:frame>
        <draw:frame draw:style-name="gr20" draw:text-style-name="P19" draw:layer="layout" svg:width="2.568cm" svg:height="0.759cm" svg:x="23.3cm" svg:y="1.324cm">
          <draw:text-box>
            <text:p><text:span text:style-name="T7">로그인 화면</text:span></text:p>
          </draw:text-box>
        </draw:frame>
        <draw:line draw:style-name="gr21" draw:text-style-name="P15" draw:layer="layout" svg:x1="21.5cm" svg:y1="1.2cm" svg:x2="21.5cm" svg:y2="2.1cm">
          <text:p/>
        </draw:line>
        <draw:line draw:style-name="gr21" draw:text-style-name="P15" draw:layer="layout" svg:x1="6.9cm" svg:y1="1.2cm" svg:x2="6.9cm" svg:y2="2.1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draw:line draw:style-name="gr21" draw:text-style-name="P15" draw:layer="layout" svg:x1="14.1cm" svg:y1="1.2cm" svg:x2="14.1cm" svg:y2="2.1cm">
          <text:p/>
        </draw:line>
        <presentation:notes draw:style-name="dp3">
          <draw:frame draw:name="슬라이드 번호 개체 틀 6"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1" draw:style-name="gr10" draw:layer="layout" svg:width="19.786cm" svg:height="11.135cm" svg:x="0.604cm" svg:y="2.258cm" draw:page-number="2" presentation:class="page"/>
          <draw:frame draw:name="슬라이드 노트 개체 틀 2" presentation:style-name="pr1" draw:text-style-name="P21" draw:layer="layout" svg:width="16.799cm" svg:height="13.364cm" svg:x="2.1cm" svg:y="14.107cm" presentation:class="notes" presentation:placeholder="true">
            <draw:text-box/>
          </draw:frame>
        </presentation:notes>
      </draw:page>
      <draw:page draw:name="page3" draw:style-name="dp1" draw:master-page-name="Master2-Layout2-blank-빈-화면" presentation:presentation-page-layout-name="AL1T14">
        <draw:frame draw:name="그림 20"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슬라이드 번호 개체 틀 3" draw:style-name="gr2" draw:text-style-name="P17" draw:layer="layout" svg:width="6.5cm" svg:height="1cm" svg:x="20.5cm" svg:y="15.6cm">
          <draw:text-box>
            <text:p text:style-name="P20"><text:span text:style-name="T1"><text:page-number>&lt;숫자&gt;</text:page-number></text:span></text:p>
          </draw:text-box>
        </draw:frame>
        <draw:custom-shape draw:name="자유형: 도형 2" draw:style-name="gr23" draw:text-style-name="P14" draw:layer="layout" svg:width="3.129cm" svg:height="0.893cm" svg:x="16.389cm" svg:y="12.333cm">
          <text:p text:style-name="P11"><text:span text:style-name="T5">아이디 찾기</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3" draw:style-name="gr23" draw:text-style-name="P14" xml:id="id9" draw:id="id9" draw:layer="layout" svg:width="3.143cm" svg:height="1.345cm" svg:x="2.324cm" svg:y="8.963cm">
          <text:p text:style-name="P11"><text:span text:style-name="T5">로그인 화면</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4" draw:style-name="gr23" draw:text-style-name="P14" draw:layer="layout" svg:width="3.129cm" svg:height="0.893cm" svg:x="20.621cm" svg:y="12.333cm">
          <text:p text:style-name="P11"><text:span text:style-name="T5">비밀번호 찾기</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5" draw:style-name="gr23" draw:text-style-name="P14" draw:layer="layout" svg:width="3.129cm" svg:height="0.893cm" svg:x="16.389cm" svg:y="10.456cm">
          <text:p text:style-name="P11"><text:span text:style-name="T5">로그인</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6" draw:style-name="gr23" draw:text-style-name="P14" draw:layer="layout" svg:width="3.129cm" svg:height="0.893cm" svg:x="20.621cm" svg:y="10.456cm">
          <text:p text:style-name="P11"><text:span text:style-name="T5">회원 가입</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2" draw:style-name="gr23" draw:text-style-name="P14" xml:id="id7" draw:id="id7" draw:layer="layout" svg:width="3cm" svg:height="1cm" svg:x="8.244cm" svg:y="12.726cm">
          <text:p text:style-name="P11"><text:span text:style-name="T5">관리자</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3" draw:style-name="gr23" draw:text-style-name="P14" xml:id="id8" draw:id="id8" draw:layer="layout" svg:width="3cm" svg:height="1cm" svg:x="8.244cm" svg:y="5.465cm">
          <text:p text:style-name="P11"><text:span text:style-name="T5">일반 </text:span><text:span text:style-name="T8"><text:s/></text:span><text:span text:style-name="T5">회원</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 draw:style-name="gr23" draw:text-style-name="P14" draw:layer="layout" svg:width="6.05cm" svg:height="0.893cm" svg:x="16.977cm" svg:y="6.081cm">
          <text:p text:style-name="P11"><text:span text:style-name="T9">아이디 입력 창</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5" draw:style-name="gr23" draw:text-style-name="P14" draw:layer="layout" svg:width="6.05cm" svg:height="0.893cm" svg:x="16.977cm" svg:y="8.246cm">
          <text:p text:style-name="P11"><text:span text:style-name="T9">비밀번호 입력 창</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양쪽 대괄호 36" draw:style-name="gr24" draw:text-style-name="P22" draw:layer="layout" svg:width="9.585cm" svg:height="7.719cm" svg:x="15.21cm" svg:y="6.096cm">
          <text:p/>
          <draw:enhanced-geometry svg:viewBox="0 0 21600 21600" draw:path-stretchpoint-x="21600" draw:path-stretchpoint-y="21600" draw:text-areas="?f15 ?f15 ?f16 ?f17" draw:type="non-primitive" draw:modifiers="16667"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9 * ?f11 / 100000"/>
            <draw:equation draw:name="f13" draw:formula="?f4 - ?f12"/>
            <draw:equation draw:name="f14" draw:formula="?f6 - ?f12"/>
            <draw:equation draw:name="f15" draw:formula="?f12 * 29289 / 100000"/>
            <draw:equation draw:name="f16" draw:formula="?f4 - ?f15"/>
            <draw:equation draw:name="f17" draw:formula="?f6 - ?f15"/>
            <draw:equation draw:name="f18" draw:formula="21550000 - ?f2"/>
            <draw:equation draw:name="f19" draw:formula="if(?f18, ?f2, 21550000)"/>
            <draw:equation draw:name="f20" draw:formula="-21550000 - ?f19"/>
            <draw:equation draw:name="f21" draw:formula="if(?f20, -21550000, ?f19)"/>
            <draw:equation draw:name="f22" draw:formula="?f1 + ?f21"/>
            <draw:equation draw:name="f23" draw:formula="?f1 + ?f2"/>
            <draw:equation draw:name="f24" draw:formula="?f23 * ?f10 / ?f1"/>
            <draw:equation draw:name="f25" draw:formula="0 - ?f24"/>
            <draw:equation draw:name="f26" draw:formula="cos(?f25)"/>
            <draw:equation draw:name="f27" draw:formula="0 - ?f26"/>
            <draw:equation draw:name="f28" draw:formula="?f27 * ?f12"/>
            <draw:equation draw:name="f29" draw:formula="sin(?f25)"/>
            <draw:equation draw:name="f30" draw:formula="0 - ?f29"/>
            <draw:equation draw:name="f31" draw:formula="?f30 * ?f12"/>
            <draw:equation draw:name="f32" draw:formula="sqrt(?f28 * ?f28 + ?f31 * ?f31 + 0 * 0)"/>
            <draw:equation draw:name="f33" draw:formula="?f12 * ?f12 / ?f32"/>
            <draw:equation draw:name="f34" draw:formula="?f30 * ?f33"/>
            <draw:equation draw:name="f35" draw:formula="?f3 - ?f34"/>
            <draw:equation draw:name="f36" draw:formula="?f27 * ?f33"/>
            <draw:equation draw:name="f37" draw:formula="?f12 - ?f36"/>
            <draw:equation draw:name="f38" draw:formula="?f35 - ?f12"/>
            <draw:equation draw:name="f39" draw:formula="?f37 - ?f12"/>
            <draw:equation draw:name="f40" draw:formula="?f35 + ?f12"/>
            <draw:equation draw:name="f41" draw:formula="?f37 + ?f12"/>
            <draw:equation draw:name="f42" draw:formula="?f22 + ?f2"/>
            <draw:equation draw:name="f43" draw:formula="?f42 * ?f10 / ?f1"/>
            <draw:equation draw:name="f44" draw:formula="0 - ?f43"/>
            <draw:equation draw:name="f45" draw:formula="cos(?f44)"/>
            <draw:equation draw:name="f46" draw:formula="0 - ?f45"/>
            <draw:equation draw:name="f47" draw:formula="?f46 * ?f12"/>
            <draw:equation draw:name="f48" draw:formula="sin(?f44)"/>
            <draw:equation draw:name="f49" draw:formula="0 - ?f48"/>
            <draw:equation draw:name="f50" draw:formula="?f49 * ?f12"/>
            <draw:equation draw:name="f51" draw:formula="sqrt(?f47 * ?f47 + ?f50 * ?f50 + 0 * 0)"/>
            <draw:equation draw:name="f52" draw:formula="?f12 * ?f12 / ?f51"/>
            <draw:equation draw:name="f53" draw:formula="?f49 * ?f52"/>
            <draw:equation draw:name="f54" draw:formula="?f35 + ?f53"/>
            <draw:equation draw:name="f55" draw:formula="?f46 * ?f52"/>
            <draw:equation draw:name="f56" draw:formula="?f37 + ?f55"/>
            <draw:equation draw:name="f57" draw:formula="if(?f21, ?f3, ?f38)"/>
            <draw:equation draw:name="f58" draw:formula="if(?f21, ?f12, ?f39)"/>
            <draw:equation draw:name="f59" draw:formula="if(?f21, ?f3, ?f40)"/>
            <draw:equation draw:name="f60" draw:formula="if(?f21, ?f12, ?f41)"/>
            <draw:equation draw:name="f61" draw:formula="if(?f21, ?f38, ?f54)"/>
            <draw:equation draw:name="f62" draw:formula="if(?f21, ?f39, ?f56)"/>
            <draw:equation draw:name="f63" draw:formula="if(?f21, ?f40, ?f54)"/>
            <draw:equation draw:name="f64" draw:formula="if(?f21, ?f41, ?f56)"/>
            <draw:equation draw:name="f65" draw:formula="?f0 + ?f21"/>
            <draw:equation draw:name="f66" draw:formula="?f0 + ?f2"/>
            <draw:equation draw:name="f67" draw:formula="?f66 * ?f10 / ?f1"/>
            <draw:equation draw:name="f68" draw:formula="0 - ?f67"/>
            <draw:equation draw:name="f69" draw:formula="cos(?f68)"/>
            <draw:equation draw:name="f70" draw:formula="0 - ?f69"/>
            <draw:equation draw:name="f71" draw:formula="?f70 * ?f12"/>
            <draw:equation draw:name="f72" draw:formula="sin(?f68)"/>
            <draw:equation draw:name="f73" draw:formula="0 - ?f72"/>
            <draw:equation draw:name="f74" draw:formula="?f73 * ?f12"/>
            <draw:equation draw:name="f75" draw:formula="sqrt(?f71 * ?f71 + ?f74 * ?f74 + 0 * 0)"/>
            <draw:equation draw:name="f76" draw:formula="?f12 * ?f12 / ?f75"/>
            <draw:equation draw:name="f77" draw:formula="?f73 * ?f76"/>
            <draw:equation draw:name="f78" draw:formula="?f13 - ?f77"/>
            <draw:equation draw:name="f79" draw:formula="?f70 * ?f76"/>
            <draw:equation draw:name="f80" draw:formula="?f5 - ?f79"/>
            <draw:equation draw:name="f81" draw:formula="?f78 - ?f12"/>
            <draw:equation draw:name="f82" draw:formula="?f80 - ?f12"/>
            <draw:equation draw:name="f83" draw:formula="?f78 + ?f12"/>
            <draw:equation draw:name="f84" draw:formula="?f80 + ?f12"/>
            <draw:equation draw:name="f85" draw:formula="?f65 + ?f2"/>
            <draw:equation draw:name="f86" draw:formula="?f85 * ?f10 / ?f1"/>
            <draw:equation draw:name="f87" draw:formula="0 - ?f86"/>
            <draw:equation draw:name="f88" draw:formula="cos(?f87)"/>
            <draw:equation draw:name="f89" draw:formula="0 - ?f88"/>
            <draw:equation draw:name="f90" draw:formula="?f89 * ?f12"/>
            <draw:equation draw:name="f91" draw:formula="sin(?f87)"/>
            <draw:equation draw:name="f92" draw:formula="0 - ?f91"/>
            <draw:equation draw:name="f93" draw:formula="?f92 * ?f12"/>
            <draw:equation draw:name="f94" draw:formula="sqrt(?f90 * ?f90 + ?f93 * ?f93 + 0 * 0)"/>
            <draw:equation draw:name="f95" draw:formula="?f12 * ?f12 / ?f94"/>
            <draw:equation draw:name="f96" draw:formula="?f92 * ?f95"/>
            <draw:equation draw:name="f97" draw:formula="?f78 + ?f96"/>
            <draw:equation draw:name="f98" draw:formula="?f89 * ?f95"/>
            <draw:equation draw:name="f99" draw:formula="?f80 + ?f98"/>
            <draw:equation draw:name="f100" draw:formula="if(?f21, ?f13, ?f81)"/>
            <draw:equation draw:name="f101" draw:formula="if(?f21, ?f5, ?f82)"/>
            <draw:equation draw:name="f102" draw:formula="if(?f21, ?f13, ?f83)"/>
            <draw:equation draw:name="f103" draw:formula="if(?f21, ?f5, ?f84)"/>
            <draw:equation draw:name="f104" draw:formula="if(?f21, ?f81, ?f97)"/>
            <draw:equation draw:name="f105" draw:formula="if(?f21, ?f82, ?f99)"/>
            <draw:equation draw:name="f106" draw:formula="if(?f21, ?f83, ?f97)"/>
            <draw:equation draw:name="f107" draw:formula="if(?f21, ?f84, ?f99)"/>
            <draw:equation draw:name="f108" draw:formula="0 + ?f21"/>
            <draw:equation draw:name="f109" draw:formula="0 + ?f2"/>
            <draw:equation draw:name="f110" draw:formula="?f109 * ?f10 / ?f1"/>
            <draw:equation draw:name="f111" draw:formula="0 - ?f110"/>
            <draw:equation draw:name="f112" draw:formula="cos(?f111)"/>
            <draw:equation draw:name="f113" draw:formula="0 - ?f112"/>
            <draw:equation draw:name="f114" draw:formula="?f113 * ?f12"/>
            <draw:equation draw:name="f115" draw:formula="sin(?f111)"/>
            <draw:equation draw:name="f116" draw:formula="0 - ?f115"/>
            <draw:equation draw:name="f117" draw:formula="?f116 * ?f12"/>
            <draw:equation draw:name="f118" draw:formula="sqrt(?f114 * ?f114 + ?f117 * ?f117 + 0 * 0)"/>
            <draw:equation draw:name="f119" draw:formula="?f12 * ?f12 / ?f118"/>
            <draw:equation draw:name="f120" draw:formula="?f116 * ?f119"/>
            <draw:equation draw:name="f121" draw:formula="?f4 - ?f120"/>
            <draw:equation draw:name="f122" draw:formula="?f113 * ?f119"/>
            <draw:equation draw:name="f123" draw:formula="?f14 - ?f122"/>
            <draw:equation draw:name="f124" draw:formula="?f121 - ?f12"/>
            <draw:equation draw:name="f125" draw:formula="?f123 - ?f12"/>
            <draw:equation draw:name="f126" draw:formula="?f121 + ?f12"/>
            <draw:equation draw:name="f127" draw:formula="?f123 + ?f12"/>
            <draw:equation draw:name="f128" draw:formula="?f108 + ?f2"/>
            <draw:equation draw:name="f129" draw:formula="?f128 * ?f10 / ?f1"/>
            <draw:equation draw:name="f130" draw:formula="0 - ?f129"/>
            <draw:equation draw:name="f131" draw:formula="cos(?f130)"/>
            <draw:equation draw:name="f132" draw:formula="0 - ?f131"/>
            <draw:equation draw:name="f133" draw:formula="?f132 * ?f12"/>
            <draw:equation draw:name="f134" draw:formula="sin(?f130)"/>
            <draw:equation draw:name="f135" draw:formula="0 - ?f134"/>
            <draw:equation draw:name="f136" draw:formula="?f135 * ?f12"/>
            <draw:equation draw:name="f137" draw:formula="sqrt(?f133 * ?f133 + ?f136 * ?f136 + 0 * 0)"/>
            <draw:equation draw:name="f138" draw:formula="?f12 * ?f12 / ?f137"/>
            <draw:equation draw:name="f139" draw:formula="?f135 * ?f138"/>
            <draw:equation draw:name="f140" draw:formula="?f121 + ?f139"/>
            <draw:equation draw:name="f141" draw:formula="?f132 * ?f138"/>
            <draw:equation draw:name="f142" draw:formula="?f123 + ?f141"/>
            <draw:equation draw:name="f143" draw:formula="if(?f21, ?f4, ?f124)"/>
            <draw:equation draw:name="f144" draw:formula="if(?f21, ?f14, ?f125)"/>
            <draw:equation draw:name="f145" draw:formula="if(?f21, ?f4, ?f126)"/>
            <draw:equation draw:name="f146" draw:formula="if(?f21, ?f14, ?f127)"/>
            <draw:equation draw:name="f147" draw:formula="if(?f21, ?f124, ?f140)"/>
            <draw:equation draw:name="f148" draw:formula="if(?f21, ?f125, ?f142)"/>
            <draw:equation draw:name="f149" draw:formula="if(?f21, ?f126, ?f140)"/>
            <draw:equation draw:name="f150" draw:formula="if(?f21, ?f127, ?f142)"/>
            <draw:equation draw:name="f151" draw:formula="?f2 + ?f21"/>
            <draw:equation draw:name="f152" draw:formula="?f2 + ?f2"/>
            <draw:equation draw:name="f153" draw:formula="?f152 * ?f10 / ?f1"/>
            <draw:equation draw:name="f154" draw:formula="0 - ?f153"/>
            <draw:equation draw:name="f155" draw:formula="cos(?f154)"/>
            <draw:equation draw:name="f156" draw:formula="0 - ?f155"/>
            <draw:equation draw:name="f157" draw:formula="?f156 * ?f12"/>
            <draw:equation draw:name="f158" draw:formula="sin(?f154)"/>
            <draw:equation draw:name="f159" draw:formula="0 - ?f158"/>
            <draw:equation draw:name="f160" draw:formula="?f159 * ?f12"/>
            <draw:equation draw:name="f161" draw:formula="sqrt(?f157 * ?f157 + ?f160 * ?f160 + 0 * 0)"/>
            <draw:equation draw:name="f162" draw:formula="?f12 * ?f12 / ?f161"/>
            <draw:equation draw:name="f163" draw:formula="?f159 * ?f162"/>
            <draw:equation draw:name="f164" draw:formula="?f12 - ?f163"/>
            <draw:equation draw:name="f165" draw:formula="?f156 * ?f162"/>
            <draw:equation draw:name="f166" draw:formula="?f6 - ?f165"/>
            <draw:equation draw:name="f167" draw:formula="?f164 - ?f12"/>
            <draw:equation draw:name="f168" draw:formula="?f166 - ?f12"/>
            <draw:equation draw:name="f169" draw:formula="?f164 + ?f12"/>
            <draw:equation draw:name="f170" draw:formula="?f166 + ?f12"/>
            <draw:equation draw:name="f171" draw:formula="?f151 + ?f2"/>
            <draw:equation draw:name="f172" draw:formula="?f171 * ?f10 / ?f1"/>
            <draw:equation draw:name="f173" draw:formula="0 - ?f172"/>
            <draw:equation draw:name="f174" draw:formula="cos(?f173)"/>
            <draw:equation draw:name="f175" draw:formula="0 - ?f174"/>
            <draw:equation draw:name="f176" draw:formula="?f175 * ?f12"/>
            <draw:equation draw:name="f177" draw:formula="sin(?f173)"/>
            <draw:equation draw:name="f178" draw:formula="0 - ?f177"/>
            <draw:equation draw:name="f179" draw:formula="?f178 * ?f12"/>
            <draw:equation draw:name="f180" draw:formula="sqrt(?f176 * ?f176 + ?f179 * ?f179 + 0 * 0)"/>
            <draw:equation draw:name="f181" draw:formula="?f12 * ?f12 / ?f180"/>
            <draw:equation draw:name="f182" draw:formula="?f178 * ?f181"/>
            <draw:equation draw:name="f183" draw:formula="?f164 + ?f182"/>
            <draw:equation draw:name="f184" draw:formula="?f175 * ?f181"/>
            <draw:equation draw:name="f185" draw:formula="?f166 + ?f184"/>
            <draw:equation draw:name="f186" draw:formula="if(?f21, ?f12, ?f167)"/>
            <draw:equation draw:name="f187" draw:formula="if(?f21, ?f6, ?f168)"/>
            <draw:equation draw:name="f188" draw:formula="if(?f21, ?f12, ?f169)"/>
            <draw:equation draw:name="f189" draw:formula="if(?f21, ?f6, ?f170)"/>
            <draw:equation draw:name="f190" draw:formula="if(?f21, ?f167, ?f183)"/>
            <draw:equation draw:name="f191" draw:formula="if(?f21, ?f168, ?f185)"/>
            <draw:equation draw:name="f192" draw:formula="if(?f21, ?f169, ?f183)"/>
            <draw:equation draw:name="f193" draw:formula="if(?f21, ?f170, ?f185)"/>
          </draw:enhanced-geometry>
        </draw:custom-shape>
        <draw:connector draw:name="연결선: 꺾임 43" draw:style-name="gr25" draw:text-style-name="P1" xml:id="id10" draw:id="id10" draw:layer="layout" svg:x1="8.244cm" svg:y1="13.226cm" svg:x2="8.244cm" svg:y2="5.965cm" draw:start-shape="id7" draw:start-glue-point="3" draw:end-shape="id8" draw:end-glue-point="3" svg:d="M8244 13226h-518v-7261h518" svg:viewBox="0 0 519 7262">
          <text:p/>
        </draw:connector>
        <draw:connector draw:name="직선 연결선 46" draw:style-name="gr25" draw:text-style-name="P1" draw:layer="layout" draw:type="line" svg:x1="5.467cm" svg:y1="9.635cm" svg:x2="7.726cm" svg:y2="9.595cm" draw:start-shape="id9" draw:start-glue-point="1" draw:end-shape="id10" draw:end-glue-point="0" svg:d="M5467 9635l2259-40" svg:viewBox="0 0 2260 41">
          <text:p/>
        </draw:connector>
        <draw:connector draw:name="직선 화살표 연결선 52" draw:style-name="gr26" draw:text-style-name="P1" draw:layer="layout" draw:type="line" svg:x1="11.753cm" svg:y1="9.494cm" svg:x2="14.913cm" svg:y2="9.494cm" svg:d="M11753 9494h3160" svg:viewBox="0 0 3161 1">
          <text:p/>
        </draw:connector>
        <draw:frame draw:name="TextBox 2" draw:style-name="gr15" draw:text-style-name="P17" draw:layer="layout" svg:width="3.298cm" svg:height="1.026cm" svg:x="0.181cm" svg:y="0.127cm">
          <draw:text-box>
            <text:p text:style-name="P16"><text:span text:style-name="T6">PROCESS</text:span></text:p>
          </draw:text-box>
        </draw:frame>
        <draw:connector draw:style-name="gr27" draw:text-style-name="P6" draw:layer="layout" svg:x1="11.244cm" svg:y1="5.965cm" svg:x2="11.244cm" svg:y2="13.226cm" draw:start-shape="id8" draw:start-glue-point="1" draw:end-shape="id7" draw:end-glue-point="1" svg:d="M11244 5965h519v7261h-519" svg:viewBox="0 0 520 7262">
          <text:p/>
        </draw:connector>
        <draw:custom-shape draw:name="자유형: 도형 78" draw:style-name="gr28" draw:text-style-name="P23" draw:layer="layout" svg:width="3cm" svg:height="1cm" svg:x="8.245cm" svg:y="9.027cm">
          <text:p text:style-name="P11"><text:span text:style-name="T5">판매자</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79" draw:style-name="gr29" draw:text-style-name="P24" draw:layer="layout" svg:width="7.712cm" svg:height="1.25cm" svg:x="9.844cm" svg:y="3.373cm">
          <text:p text:style-name="P11"><text:span text:style-name="T10">일반 회원</text:span><text:span text:style-name="T11">/ </text:span><text:span text:style-name="T10">판매자</text:span><text:span text:style-name="T12">/ </text:span><text:span text:style-name="T12">관리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style-name="gr19" draw:text-style-name="P18" draw:layer="layout" svg:width="27.5cm" svg:height="0.9cm" svg:x="0.3cm" svg:y="1.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323cm">
          <draw:text-box>
            <text:p><text:span text:style-name="T7">프로세스 명</text:span></text:p>
          </draw:text-box>
        </draw:frame>
        <draw:frame draw:style-name="gr20" draw:text-style-name="P19" draw:layer="layout" svg:width="2.568cm" svg:height="0.759cm" svg:x="23.3cm" svg:y="1.324cm">
          <draw:text-box>
            <text:p><text:span text:style-name="T7">로그인 화면</text:span></text:p>
          </draw:text-box>
        </draw:frame>
        <draw:line draw:style-name="gr21" draw:text-style-name="P15" draw:layer="layout" svg:x1="21.5cm" svg:y1="1.2cm" svg:x2="21.5cm" svg:y2="2.1cm">
          <text:p/>
        </draw:line>
        <draw:line draw:style-name="gr21" draw:text-style-name="P15" draw:layer="layout" svg:x1="14cm" svg:y1="1.2cm" svg:x2="14cm" svg:y2="2.1cm">
          <text:p/>
        </draw:line>
        <draw:line draw:style-name="gr21" draw:text-style-name="P15" draw:layer="layout" svg:x1="6.9cm" svg:y1="1.2cm" svg:x2="6.9cm" svg:y2="2.1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3">
          <draw:frame draw:name="슬라이드 번호 개체 틀 6"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1" draw:style-name="gr10" draw:layer="layout" svg:width="19.786cm" svg:height="11.135cm" svg:x="0.604cm" svg:y="2.258cm" draw:page-number="3" presentation:class="page"/>
          <draw:frame draw:name="슬라이드 노트 개체 틀 2" presentation:style-name="pr1" draw:text-style-name="P21" draw:layer="layout" svg:width="16.799cm" svg:height="13.364cm" svg:x="2.1cm" svg:y="14.107cm" presentation:class="notes" presentation:placeholder="true">
            <draw:text-box/>
          </draw:frame>
        </presentation:notes>
      </draw:page>
      <draw:page draw:name="page4" draw:style-name="dp1" draw:master-page-name="Master2-Layout2-blank-빈-화면" presentation:presentation-page-layout-name="AL1T14">
        <draw:frame draw:name="그림 40" draw:style-name="gr1" draw:text-style-name="P1" draw:layer="layout" svg:width="28.002cm" svg:height="15.751cm" svg:x="0cm" svg:y="0cm">
          <draw:image xlink:href="Pictures/10000000000007800000043898828C6C.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1" draw:style-name="gr2" draw:text-style-name="P17" draw:layer="layout" svg:width="6.5cm" svg:height="1cm" svg:x="0.958cm" svg:y="14.5cm">
          <draw:text-box>
            <text:p text:style-name="P25"><text:span text:style-name="T1"><text:date style:data-style-name="D1" text:date-value="2026-01-15">1/15/26</text:date></text:span></text:p>
          </draw:text-box>
        </draw:frame>
        <draw:frame draw:name="슬라이드 번호 개체 틀 3" draw:style-name="gr2" draw:text-style-name="P17" draw:layer="layout" svg:width="6.5cm" svg:height="1cm" svg:x="20.5cm" svg:y="14.5cm">
          <draw:text-box>
            <text:p text:style-name="P20"><text:span text:style-name="T1"><text:page-number>&lt;숫자&gt;</text:page-number></text:span></text:p>
          </draw:text-box>
        </draw:frame>
        <draw:custom-shape draw:name="자유형: 도형 1" draw:style-name="gr23" draw:text-style-name="P14" draw:layer="layout" svg:width="3.5cm" svg:height="1cm" svg:x="8.516cm" svg:y="4.051cm">
          <text:p text:style-name="P11"><text:span text:style-name="T13">아이디 </text:span><text:span text:style-name="T14">/</text:span><text:span text:style-name="T13">비밀번호</text:span></text:p>
          <text:p text:style-name="P11"><text:span text:style-name="T13">입력</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2" draw:style-name="gr23" draw:text-style-name="P14" draw:layer="layout" svg:width="3.5cm" svg:height="1cm" svg:x="2.016cm" svg:y="4.051cm">
          <text:p text:style-name="P11"><text:span text:style-name="T5">로그인 화면</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3" draw:style-name="gr23" draw:text-style-name="P14" xml:id="id11" draw:id="id11" draw:layer="layout" svg:width="3.5cm" svg:height="1cm" svg:x="14.016cm" svg:y="4.051cm">
          <text:p text:style-name="P11"><text:span text:style-name="T5">로그인</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4" draw:style-name="gr23" draw:text-style-name="P14" xml:id="id12" draw:id="id12" draw:layer="layout" svg:width="3.5cm" svg:height="1cm" svg:x="20.727cm" svg:y="4.051cm">
          <text:p text:style-name="P11"><text:span text:style-name="T5">메인화면 출력</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5" draw:style-name="gr23" draw:text-style-name="P14" draw:layer="layout" svg:width="3.5cm" svg:height="1cm" svg:x="8.493cm" svg:y="8.217cm">
          <text:p text:style-name="P11"><text:span text:style-name="T5">아이디 찾기 화면</text:span></text:p>
          <text:p text:style-name="P11"><text:span text:style-name="T5">출력</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6" draw:style-name="gr23" draw:text-style-name="P14" draw:layer="layout" svg:width="3.5cm" svg:height="1cm" svg:x="2.034cm" svg:y="8.204cm">
          <text:p text:style-name="P11"><text:span text:style-name="T5">아이디 찾기 선택</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7" draw:style-name="gr23" draw:text-style-name="P14" draw:layer="layout" svg:width="3.5cm" svg:height="1cm" svg:x="14.036cm" svg:y="8.217cm">
          <text:p text:style-name="P11"><text:span text:style-name="T5">이름 </text:span><text:span text:style-name="T8">/ </text:span><text:span text:style-name="T5">이메일</text:span></text:p>
          <text:p text:style-name="P11"><text:span text:style-name="T5">입력</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8" draw:style-name="gr23" draw:text-style-name="P14" draw:layer="layout" svg:width="3.5cm" svg:height="1cm" svg:x="19.086cm" svg:y="8.204cm">
          <text:p text:style-name="P11"><text:span text:style-name="T5">이메일 인증번호</text:span></text:p>
          <text:p text:style-name="P11"><text:span text:style-name="T5">확인</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9" draw:style-name="gr23" draw:text-style-name="P14" draw:layer="layout" svg:width="3.5cm" svg:height="1cm" svg:x="8.514cm" svg:y="12.63cm">
          <text:p text:style-name="P11"><text:span text:style-name="T5">비밀번호 찾기 화면</text:span></text:p>
          <text:p text:style-name="P11"><text:span text:style-name="T5">출력</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10" draw:style-name="gr23" draw:text-style-name="P14" draw:layer="layout" svg:width="3.5cm" svg:height="1cm" svg:x="2.014cm" svg:y="12.63cm">
          <text:p text:style-name="P11"><text:span text:style-name="T5">비밀번호 찾기</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11" draw:style-name="gr23" draw:text-style-name="P14" draw:layer="layout" svg:width="3.5cm" svg:height="1cm" svg:x="23.87cm" svg:y="8.204cm">
          <text:p text:style-name="P11"><text:span text:style-name="T5">아이디 <text:s/>출력</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12" draw:style-name="gr23" draw:text-style-name="P14" draw:layer="layout" svg:width="3.5cm" svg:height="1cm" svg:x="14cm" svg:y="12.63cm">
          <text:p text:style-name="P11"><text:span text:style-name="T5">이름 </text:span><text:span text:style-name="T8">/ </text:span><text:span text:style-name="T5">이메일</text:span></text:p>
          <text:p text:style-name="P11"><text:span text:style-name="T5">입력</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13" draw:style-name="gr23" draw:text-style-name="P14" draw:layer="layout" svg:width="3.5cm" svg:height="1cm" svg:x="19.1cm" svg:y="12.63cm">
          <text:p text:style-name="P11"><text:span text:style-name="T5">이메일 인증번호</text:span></text:p>
          <text:p text:style-name="P11"><text:span text:style-name="T5">확인</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14" draw:style-name="gr23" draw:text-style-name="P14" draw:layer="layout" svg:width="3.5cm" svg:height="1cm" svg:x="23.87cm" svg:y="12.63cm">
          <text:p text:style-name="P11"><text:span text:style-name="T5">비밀번호 변경</text:span></text:p>
          <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draw:name="자유형: 도형 15" draw:style-name="gr30" draw:text-style-name="P14" draw:layer="layout" svg:width="4.5cm" svg:height="2.5cm" svg:x="13.5cm" svg:y="5.357cm">
          <text:p text:style-name="P11"><text:span text:style-name="T5">아이디</text:span><text:span text:style-name="T8">/ </text:span><text:span text:style-name="T5">비밀번호</text:span></text:p>
          <text:p text:style-name="P11"><text:span text:style-name="T5">오류시</text:span></text:p>
          <text:p text:style-name="P11"><text:span text:style-name="T5">경고창 출력</text:span></text:p>
          <draw:enhanced-geometry svg:viewBox="0 0 21600 21600" draw:text-areas="?f379 ?f415 ?f381 ?f416" draw:type="non-primitive" draw:modifiers="2500" draw:enhanced-path="M ?f383 ?f417 L ?f385 ?f418 ?f387 ?f419 ?f389 ?f420 ?f391 ?f421 ?f393 ?f422 ?f395 ?f423 ?f397 ?f424 ?f399 ?f425 ?f401 ?f426 ?f403 ?f427 ?f405 ?f428 ?f407 ?f429 ?f409 ?f430 ?f411 ?f431 ?f413 ?f432 ?f383 ?f417 Z N">
            <draw:equation draw:name="f0" draw:formula="10800000"/>
            <draw:equation draw:name="f1" draw:formula="5400000"/>
            <draw:equation draw:name="f2" draw:formula="left"/>
            <draw:equation draw:name="f3" draw:formula="right"/>
            <draw:equation draw:name="f4" draw:formula="?f3 - ?f2"/>
            <draw:equation draw:name="f5" draw:formula="5419351 / 1725033"/>
            <draw:equation draw:name="f6" draw:formula="?f4 / 21600"/>
            <draw:equation draw:name="f7" draw:formula="0"/>
            <draw:equation draw:name="f8" draw:formula="21600"/>
            <draw:equation draw:name="f9" draw:formula="10800 - 10800"/>
            <draw:equation draw:name="f10" draw:formula="0 - 10800"/>
            <draw:equation draw:name="f11" draw:formula="10800"/>
            <draw:equation draw:name="f12" draw:formula="?f5 / 180"/>
            <draw:equation draw:name="f13" draw:formula="$0"/>
            <draw:equation draw:name="f14" draw:formula="?f8 - ?f7"/>
            <draw:equation draw:name="f15" draw:formula="315 * ?f12"/>
            <draw:equation draw:name="f16" draw:formula="135 * ?f12"/>
            <draw:equation draw:name="f17" draw:formula="0 * ?f12"/>
            <draw:equation draw:name="f18" draw:formula="22 * ?f12"/>
            <draw:equation draw:name="f19" draw:formula="45 * ?f12"/>
            <draw:equation draw:name="f20" draw:formula="67 * ?f12"/>
            <draw:equation draw:name="f21" draw:formula="90 * ?f12"/>
            <draw:equation draw:name="f22" draw:formula="112 * ?f12"/>
            <draw:equation draw:name="f23" draw:formula="157 * ?f12"/>
            <draw:equation draw:name="f24" draw:formula="180 * ?f12"/>
            <draw:equation draw:name="f25" draw:formula="202 * ?f12"/>
            <draw:equation draw:name="f26" draw:formula="225 * ?f12"/>
            <draw:equation draw:name="f27" draw:formula="247 * ?f12"/>
            <draw:equation draw:name="f28" draw:formula="270 * ?f12"/>
            <draw:equation draw:name="f29" draw:formula="292 * ?f12"/>
            <draw:equation draw:name="f30" draw:formula="337 * ?f12"/>
            <draw:equation draw:name="f31" draw:formula="?f14 / 21600"/>
            <draw:equation draw:name="f32" draw:formula="?f13 - 10800"/>
            <draw:equation draw:name="f33" draw:formula="0 - ?f15"/>
            <draw:equation draw:name="f34" draw:formula="0 - ?f16"/>
            <draw:equation draw:name="f35" draw:formula="0 - ?f17"/>
            <draw:equation draw:name="f36" draw:formula="0 - ?f18"/>
            <draw:equation draw:name="f37" draw:formula="0 - ?f19"/>
            <draw:equation draw:name="f38" draw:formula="0 - ?f20"/>
            <draw:equation draw:name="f39" draw:formula="0 - ?f21"/>
            <draw:equation draw:name="f40" draw:formula="0 - ?f22"/>
            <draw:equation draw:name="f41" draw:formula="0 - ?f23"/>
            <draw:equation draw:name="f42" draw:formula="0 - ?f24"/>
            <draw:equation draw:name="f43" draw:formula="0 - ?f25"/>
            <draw:equation draw:name="f44" draw:formula="0 - ?f26"/>
            <draw:equation draw:name="f45" draw:formula="0 - ?f27"/>
            <draw:equation draw:name="f46" draw:formula="0 - ?f28"/>
            <draw:equation draw:name="f47" draw:formula="0 - ?f29"/>
            <draw:equation draw:name="f48" draw:formula="0 - ?f30"/>
            <draw:equation draw:name="f49" draw:formula="10800 * ?f31"/>
            <draw:equation draw:name="f50" draw:formula="?f33 * ?f0"/>
            <draw:equation draw:name="f51" draw:formula="?f34 * ?f0"/>
            <draw:equation draw:name="f52" draw:formula="?f35 * ?f0"/>
            <draw:equation draw:name="f53" draw:formula="?f36 * ?f0"/>
            <draw:equation draw:name="f54" draw:formula="?f37 * ?f0"/>
            <draw:equation draw:name="f55" draw:formula="?f38 * ?f0"/>
            <draw:equation draw:name="f56" draw:formula="?f39 * ?f0"/>
            <draw:equation draw:name="f57" draw:formula="?f40 * ?f0"/>
            <draw:equation draw:name="f58" draw:formula="?f41 * ?f0"/>
            <draw:equation draw:name="f59" draw:formula="?f42 * ?f0"/>
            <draw:equation draw:name="f60" draw:formula="?f43 * ?f0"/>
            <draw:equation draw:name="f61" draw:formula="?f44 * ?f0"/>
            <draw:equation draw:name="f62" draw:formula="?f45 * ?f0"/>
            <draw:equation draw:name="f63" draw:formula="?f46 * ?f0"/>
            <draw:equation draw:name="f64" draw:formula="?f47 * ?f0"/>
            <draw:equation draw:name="f65" draw:formula="?f48 * ?f0"/>
            <draw:equation draw:name="f66" draw:formula="?f50 / ?f5"/>
            <draw:equation draw:name="f67" draw:formula="?f51 / ?f5"/>
            <draw:equation draw:name="f68" draw:formula="?f52 / ?f5"/>
            <draw:equation draw:name="f69" draw:formula="?f53 / ?f5"/>
            <draw:equation draw:name="f70" draw:formula="?f54 / ?f5"/>
            <draw:equation draw:name="f71" draw:formula="?f55 / ?f5"/>
            <draw:equation draw:name="f72" draw:formula="?f56 / ?f5"/>
            <draw:equation draw:name="f73" draw:formula="?f57 / ?f5"/>
            <draw:equation draw:name="f74" draw:formula="?f58 / ?f5"/>
            <draw:equation draw:name="f75" draw:formula="?f59 / ?f5"/>
            <draw:equation draw:name="f76" draw:formula="?f60 / ?f5"/>
            <draw:equation draw:name="f77" draw:formula="?f61 / ?f5"/>
            <draw:equation draw:name="f78" draw:formula="?f62 / ?f5"/>
            <draw:equation draw:name="f79" draw:formula="?f63 / ?f5"/>
            <draw:equation draw:name="f80" draw:formula="?f64 / ?f5"/>
            <draw:equation draw:name="f81" draw:formula="?f65 / ?f5"/>
            <draw:equation draw:name="f82" draw:formula="?f49 / ?f31"/>
            <draw:equation draw:name="f83" draw:formula="?f66 - ?f1"/>
            <draw:equation draw:name="f84" draw:formula="?f67 - ?f1"/>
            <draw:equation draw:name="f85" draw:formula="?f68 - ?f1"/>
            <draw:equation draw:name="f86" draw:formula="?f69 - ?f1"/>
            <draw:equation draw:name="f87" draw:formula="?f70 - ?f1"/>
            <draw:equation draw:name="f88" draw:formula="?f71 - ?f1"/>
            <draw:equation draw:name="f89" draw:formula="?f72 - ?f1"/>
            <draw:equation draw:name="f90" draw:formula="?f73 - ?f1"/>
            <draw:equation draw:name="f91" draw:formula="?f74 - ?f1"/>
            <draw:equation draw:name="f92" draw:formula="?f75 - ?f1"/>
            <draw:equation draw:name="f93" draw:formula="?f76 - ?f1"/>
            <draw:equation draw:name="f94" draw:formula="?f77 - ?f1"/>
            <draw:equation draw:name="f95" draw:formula="?f78 - ?f1"/>
            <draw:equation draw:name="f96" draw:formula="?f79 - ?f1"/>
            <draw:equation draw:name="f97" draw:formula="?f80 - ?f1"/>
            <draw:equation draw:name="f98" draw:formula="?f81 - ?f1"/>
            <draw:equation draw:name="f99" draw:formula="?f83 + ?f1"/>
            <draw:equation draw:name="f100" draw:formula="?f99 * ?f5 / ?f0"/>
            <draw:equation draw:name="f101" draw:formula="0 - ?f100"/>
            <draw:equation draw:name="f102" draw:formula="cos(?f101)"/>
            <draw:equation draw:name="f103" draw:formula="0 - ?f102"/>
            <draw:equation draw:name="f104" draw:formula="?f103"/>
            <draw:equation draw:name="f105" draw:formula="sin(?f101)"/>
            <draw:equation draw:name="f106" draw:formula="0 - ?f105"/>
            <draw:equation draw:name="f107" draw:formula="?f106"/>
            <draw:equation draw:name="f108" draw:formula="?f84 + ?f1"/>
            <draw:equation draw:name="f109" draw:formula="?f108 * ?f5 / ?f0"/>
            <draw:equation draw:name="f110" draw:formula="0 - ?f109"/>
            <draw:equation draw:name="f111" draw:formula="cos(?f110)"/>
            <draw:equation draw:name="f112" draw:formula="0 - ?f111"/>
            <draw:equation draw:name="f113" draw:formula="?f112"/>
            <draw:equation draw:name="f114" draw:formula="sin(?f110)"/>
            <draw:equation draw:name="f115" draw:formula="0 - ?f114"/>
            <draw:equation draw:name="f116" draw:formula="?f115"/>
            <draw:equation draw:name="f117" draw:formula="?f85 + ?f1"/>
            <draw:equation draw:name="f118" draw:formula="?f117 * ?f5 / ?f0"/>
            <draw:equation draw:name="f119" draw:formula="0 - ?f118"/>
            <draw:equation draw:name="f120" draw:formula="cos(?f119)"/>
            <draw:equation draw:name="f121" draw:formula="0 - ?f120"/>
            <draw:equation draw:name="f122" draw:formula="?f121"/>
            <draw:equation draw:name="f123" draw:formula="sin(?f119)"/>
            <draw:equation draw:name="f124" draw:formula="0 - ?f123"/>
            <draw:equation draw:name="f125" draw:formula="?f124"/>
            <draw:equation draw:name="f126" draw:formula="?f86 + ?f1"/>
            <draw:equation draw:name="f127" draw:formula="?f126 * ?f5 / ?f0"/>
            <draw:equation draw:name="f128" draw:formula="0 - ?f127"/>
            <draw:equation draw:name="f129" draw:formula="cos(?f128)"/>
            <draw:equation draw:name="f130" draw:formula="0 - ?f129"/>
            <draw:equation draw:name="f131" draw:formula="?f130"/>
            <draw:equation draw:name="f132" draw:formula="sin(?f128)"/>
            <draw:equation draw:name="f133" draw:formula="0 - ?f132"/>
            <draw:equation draw:name="f134" draw:formula="?f133"/>
            <draw:equation draw:name="f135" draw:formula="?f87 + ?f1"/>
            <draw:equation draw:name="f136" draw:formula="?f135 * ?f5 / ?f0"/>
            <draw:equation draw:name="f137" draw:formula="0 - ?f136"/>
            <draw:equation draw:name="f138" draw:formula="cos(?f137)"/>
            <draw:equation draw:name="f139" draw:formula="0 - ?f138"/>
            <draw:equation draw:name="f140" draw:formula="?f139"/>
            <draw:equation draw:name="f141" draw:formula="sin(?f137)"/>
            <draw:equation draw:name="f142" draw:formula="0 - ?f141"/>
            <draw:equation draw:name="f143" draw:formula="?f142"/>
            <draw:equation draw:name="f144" draw:formula="?f88 + ?f1"/>
            <draw:equation draw:name="f145" draw:formula="?f144 * ?f5 / ?f0"/>
            <draw:equation draw:name="f146" draw:formula="0 - ?f145"/>
            <draw:equation draw:name="f147" draw:formula="cos(?f146)"/>
            <draw:equation draw:name="f148" draw:formula="0 - ?f147"/>
            <draw:equation draw:name="f149" draw:formula="?f148"/>
            <draw:equation draw:name="f150" draw:formula="sin(?f146)"/>
            <draw:equation draw:name="f151" draw:formula="0 - ?f150"/>
            <draw:equation draw:name="f152" draw:formula="?f151"/>
            <draw:equation draw:name="f153" draw:formula="?f89 + ?f1"/>
            <draw:equation draw:name="f154" draw:formula="?f153 * ?f5 / ?f0"/>
            <draw:equation draw:name="f155" draw:formula="0 - ?f154"/>
            <draw:equation draw:name="f156" draw:formula="cos(?f155)"/>
            <draw:equation draw:name="f157" draw:formula="0 - ?f156"/>
            <draw:equation draw:name="f158" draw:formula="?f157"/>
            <draw:equation draw:name="f159" draw:formula="sin(?f155)"/>
            <draw:equation draw:name="f160" draw:formula="0 - ?f159"/>
            <draw:equation draw:name="f161" draw:formula="?f160"/>
            <draw:equation draw:name="f162" draw:formula="?f90 + ?f1"/>
            <draw:equation draw:name="f163" draw:formula="?f162 * ?f5 / ?f0"/>
            <draw:equation draw:name="f164" draw:formula="0 - ?f163"/>
            <draw:equation draw:name="f165" draw:formula="cos(?f164)"/>
            <draw:equation draw:name="f166" draw:formula="0 - ?f165"/>
            <draw:equation draw:name="f167" draw:formula="?f166"/>
            <draw:equation draw:name="f168" draw:formula="sin(?f164)"/>
            <draw:equation draw:name="f169" draw:formula="0 - ?f168"/>
            <draw:equation draw:name="f170" draw:formula="?f169"/>
            <draw:equation draw:name="f171" draw:formula="?f91 + ?f1"/>
            <draw:equation draw:name="f172" draw:formula="?f171 * ?f5 / ?f0"/>
            <draw:equation draw:name="f173" draw:formula="0 - ?f172"/>
            <draw:equation draw:name="f174" draw:formula="cos(?f173)"/>
            <draw:equation draw:name="f175" draw:formula="0 - ?f174"/>
            <draw:equation draw:name="f176" draw:formula="?f175"/>
            <draw:equation draw:name="f177" draw:formula="sin(?f173)"/>
            <draw:equation draw:name="f178" draw:formula="0 - ?f177"/>
            <draw:equation draw:name="f179" draw:formula="?f178"/>
            <draw:equation draw:name="f180" draw:formula="?f92 + ?f1"/>
            <draw:equation draw:name="f181" draw:formula="?f180 * ?f5 / ?f0"/>
            <draw:equation draw:name="f182" draw:formula="0 - ?f181"/>
            <draw:equation draw:name="f183" draw:formula="cos(?f182)"/>
            <draw:equation draw:name="f184" draw:formula="0 - ?f183"/>
            <draw:equation draw:name="f185" draw:formula="?f184"/>
            <draw:equation draw:name="f186" draw:formula="sin(?f182)"/>
            <draw:equation draw:name="f187" draw:formula="0 - ?f186"/>
            <draw:equation draw:name="f188" draw:formula="?f187"/>
            <draw:equation draw:name="f189" draw:formula="?f93 + ?f1"/>
            <draw:equation draw:name="f190" draw:formula="?f189 * ?f5 / ?f0"/>
            <draw:equation draw:name="f191" draw:formula="0 - ?f190"/>
            <draw:equation draw:name="f192" draw:formula="cos(?f191)"/>
            <draw:equation draw:name="f193" draw:formula="0 - ?f192"/>
            <draw:equation draw:name="f194" draw:formula="?f193"/>
            <draw:equation draw:name="f195" draw:formula="sin(?f191)"/>
            <draw:equation draw:name="f196" draw:formula="0 - ?f195"/>
            <draw:equation draw:name="f197" draw:formula="?f196"/>
            <draw:equation draw:name="f198" draw:formula="?f94 + ?f1"/>
            <draw:equation draw:name="f199" draw:formula="?f198 * ?f5 / ?f0"/>
            <draw:equation draw:name="f200" draw:formula="0 - ?f199"/>
            <draw:equation draw:name="f201" draw:formula="cos(?f200)"/>
            <draw:equation draw:name="f202" draw:formula="0 - ?f201"/>
            <draw:equation draw:name="f203" draw:formula="?f202"/>
            <draw:equation draw:name="f204" draw:formula="sin(?f200)"/>
            <draw:equation draw:name="f205" draw:formula="0 - ?f204"/>
            <draw:equation draw:name="f206" draw:formula="?f205"/>
            <draw:equation draw:name="f207" draw:formula="?f95 + ?f1"/>
            <draw:equation draw:name="f208" draw:formula="?f207 * ?f5 / ?f0"/>
            <draw:equation draw:name="f209" draw:formula="0 - ?f208"/>
            <draw:equation draw:name="f210" draw:formula="cos(?f209)"/>
            <draw:equation draw:name="f211" draw:formula="0 - ?f210"/>
            <draw:equation draw:name="f212" draw:formula="?f211"/>
            <draw:equation draw:name="f213" draw:formula="sin(?f209)"/>
            <draw:equation draw:name="f214" draw:formula="0 - ?f213"/>
            <draw:equation draw:name="f215" draw:formula="?f214"/>
            <draw:equation draw:name="f216" draw:formula="?f96 + ?f1"/>
            <draw:equation draw:name="f217" draw:formula="?f216 * ?f5 / ?f0"/>
            <draw:equation draw:name="f218" draw:formula="0 - ?f217"/>
            <draw:equation draw:name="f219" draw:formula="cos(?f218)"/>
            <draw:equation draw:name="f220" draw:formula="0 - ?f219"/>
            <draw:equation draw:name="f221" draw:formula="?f220"/>
            <draw:equation draw:name="f222" draw:formula="sin(?f218)"/>
            <draw:equation draw:name="f223" draw:formula="0 - ?f222"/>
            <draw:equation draw:name="f224" draw:formula="?f223"/>
            <draw:equation draw:name="f225" draw:formula="?f97 + ?f1"/>
            <draw:equation draw:name="f226" draw:formula="?f225 * ?f5 / ?f0"/>
            <draw:equation draw:name="f227" draw:formula="0 - ?f226"/>
            <draw:equation draw:name="f228" draw:formula="cos(?f227)"/>
            <draw:equation draw:name="f229" draw:formula="0 - ?f228"/>
            <draw:equation draw:name="f230" draw:formula="?f229"/>
            <draw:equation draw:name="f231" draw:formula="sin(?f227)"/>
            <draw:equation draw:name="f232" draw:formula="0 - ?f231"/>
            <draw:equation draw:name="f233" draw:formula="?f232"/>
            <draw:equation draw:name="f234" draw:formula="?f98 + ?f1"/>
            <draw:equation draw:name="f235" draw:formula="?f234 * ?f5 / ?f0"/>
            <draw:equation draw:name="f236" draw:formula="0 - ?f235"/>
            <draw:equation draw:name="f237" draw:formula="cos(?f236)"/>
            <draw:equation draw:name="f238" draw:formula="0 - ?f237"/>
            <draw:equation draw:name="f239" draw:formula="?f238"/>
            <draw:equation draw:name="f240" draw:formula="sin(?f236)"/>
            <draw:equation draw:name="f241" draw:formula="0 - ?f240"/>
            <draw:equation draw:name="f242" draw:formula="?f241"/>
            <draw:equation draw:name="f243" draw:formula="0 - ?f104"/>
            <draw:equation draw:name="f244" draw:formula="0 - ?f107"/>
            <draw:equation draw:name="f245" draw:formula="0 - ?f113"/>
            <draw:equation draw:name="f246" draw:formula="0 - ?f116"/>
            <draw:equation draw:name="f247" draw:formula="0 - ?f122"/>
            <draw:equation draw:name="f248" draw:formula="0 - ?f125"/>
            <draw:equation draw:name="f249" draw:formula="0 - ?f131"/>
            <draw:equation draw:name="f250" draw:formula="0 - ?f134"/>
            <draw:equation draw:name="f251" draw:formula="0 - ?f140"/>
            <draw:equation draw:name="f252" draw:formula="0 - ?f143"/>
            <draw:equation draw:name="f253" draw:formula="0 - ?f149"/>
            <draw:equation draw:name="f254" draw:formula="0 - ?f152"/>
            <draw:equation draw:name="f255" draw:formula="0 - ?f158"/>
            <draw:equation draw:name="f256" draw:formula="0 - ?f161"/>
            <draw:equation draw:name="f257" draw:formula="0 - ?f167"/>
            <draw:equation draw:name="f258" draw:formula="0 - ?f170"/>
            <draw:equation draw:name="f259" draw:formula="0 - ?f176"/>
            <draw:equation draw:name="f260" draw:formula="0 - ?f179"/>
            <draw:equation draw:name="f261" draw:formula="0 - ?f185"/>
            <draw:equation draw:name="f262" draw:formula="0 - ?f188"/>
            <draw:equation draw:name="f263" draw:formula="0 - ?f194"/>
            <draw:equation draw:name="f264" draw:formula="0 - ?f197"/>
            <draw:equation draw:name="f265" draw:formula="0 - ?f203"/>
            <draw:equation draw:name="f266" draw:formula="0 - ?f206"/>
            <draw:equation draw:name="f267" draw:formula="0 - ?f212"/>
            <draw:equation draw:name="f268" draw:formula="0 - ?f215"/>
            <draw:equation draw:name="f269" draw:formula="0 - ?f221"/>
            <draw:equation draw:name="f270" draw:formula="0 - ?f224"/>
            <draw:equation draw:name="f271" draw:formula="0 - ?f230"/>
            <draw:equation draw:name="f272" draw:formula="0 - ?f233"/>
            <draw:equation draw:name="f273" draw:formula="0 - ?f239"/>
            <draw:equation draw:name="f274" draw:formula="0 - ?f242"/>
            <draw:equation draw:name="f275" draw:formula="?f243 * ?f32"/>
            <draw:equation draw:name="f276" draw:formula="?f244 * ?f9"/>
            <draw:equation draw:name="f277" draw:formula="?f244 * ?f32"/>
            <draw:equation draw:name="f278" draw:formula="?f243 * ?f9"/>
            <draw:equation draw:name="f279" draw:formula="?f245 * ?f32"/>
            <draw:equation draw:name="f280" draw:formula="?f246 * ?f9"/>
            <draw:equation draw:name="f281" draw:formula="?f246 * ?f32"/>
            <draw:equation draw:name="f282" draw:formula="?f245 * ?f9"/>
            <draw:equation draw:name="f283" draw:formula="?f247 * ?f10"/>
            <draw:equation draw:name="f284" draw:formula="?f248 * ?f9"/>
            <draw:equation draw:name="f285" draw:formula="?f248 * ?f10"/>
            <draw:equation draw:name="f286" draw:formula="?f247 * ?f9"/>
            <draw:equation draw:name="f287" draw:formula="?f249 * ?f32"/>
            <draw:equation draw:name="f288" draw:formula="?f250 * ?f9"/>
            <draw:equation draw:name="f289" draw:formula="?f250 * ?f32"/>
            <draw:equation draw:name="f290" draw:formula="?f249 * ?f9"/>
            <draw:equation draw:name="f291" draw:formula="?f251 * ?f10"/>
            <draw:equation draw:name="f292" draw:formula="?f252 * ?f9"/>
            <draw:equation draw:name="f293" draw:formula="?f252 * ?f10"/>
            <draw:equation draw:name="f294" draw:formula="?f251 * ?f9"/>
            <draw:equation draw:name="f295" draw:formula="?f253 * ?f32"/>
            <draw:equation draw:name="f296" draw:formula="?f254 * ?f9"/>
            <draw:equation draw:name="f297" draw:formula="?f254 * ?f32"/>
            <draw:equation draw:name="f298" draw:formula="?f253 * ?f9"/>
            <draw:equation draw:name="f299" draw:formula="?f255 * ?f10"/>
            <draw:equation draw:name="f300" draw:formula="?f256 * ?f9"/>
            <draw:equation draw:name="f301" draw:formula="?f256 * ?f10"/>
            <draw:equation draw:name="f302" draw:formula="?f255 * ?f9"/>
            <draw:equation draw:name="f303" draw:formula="?f257 * ?f32"/>
            <draw:equation draw:name="f304" draw:formula="?f258 * ?f9"/>
            <draw:equation draw:name="f305" draw:formula="?f258 * ?f32"/>
            <draw:equation draw:name="f306" draw:formula="?f257 * ?f9"/>
            <draw:equation draw:name="f307" draw:formula="?f245 * ?f10"/>
            <draw:equation draw:name="f308" draw:formula="?f246 * ?f10"/>
            <draw:equation draw:name="f309" draw:formula="?f259 * ?f32"/>
            <draw:equation draw:name="f310" draw:formula="?f260 * ?f9"/>
            <draw:equation draw:name="f311" draw:formula="?f260 * ?f32"/>
            <draw:equation draw:name="f312" draw:formula="?f259 * ?f9"/>
            <draw:equation draw:name="f313" draw:formula="?f261 * ?f10"/>
            <draw:equation draw:name="f314" draw:formula="?f262 * ?f9"/>
            <draw:equation draw:name="f315" draw:formula="?f262 * ?f10"/>
            <draw:equation draw:name="f316" draw:formula="?f261 * ?f9"/>
            <draw:equation draw:name="f317" draw:formula="?f263 * ?f32"/>
            <draw:equation draw:name="f318" draw:formula="?f264 * ?f9"/>
            <draw:equation draw:name="f319" draw:formula="?f264 * ?f32"/>
            <draw:equation draw:name="f320" draw:formula="?f263 * ?f9"/>
            <draw:equation draw:name="f321" draw:formula="?f265 * ?f10"/>
            <draw:equation draw:name="f322" draw:formula="?f266 * ?f9"/>
            <draw:equation draw:name="f323" draw:formula="?f266 * ?f10"/>
            <draw:equation draw:name="f324" draw:formula="?f265 * ?f9"/>
            <draw:equation draw:name="f325" draw:formula="?f267 * ?f32"/>
            <draw:equation draw:name="f326" draw:formula="?f268 * ?f9"/>
            <draw:equation draw:name="f327" draw:formula="?f268 * ?f32"/>
            <draw:equation draw:name="f328" draw:formula="?f267 * ?f9"/>
            <draw:equation draw:name="f329" draw:formula="?f269 * ?f10"/>
            <draw:equation draw:name="f330" draw:formula="?f270 * ?f9"/>
            <draw:equation draw:name="f331" draw:formula="?f270 * ?f10"/>
            <draw:equation draw:name="f332" draw:formula="?f269 * ?f9"/>
            <draw:equation draw:name="f333" draw:formula="?f271 * ?f32"/>
            <draw:equation draw:name="f334" draw:formula="?f272 * ?f9"/>
            <draw:equation draw:name="f335" draw:formula="?f272 * ?f32"/>
            <draw:equation draw:name="f336" draw:formula="?f271 * ?f9"/>
            <draw:equation draw:name="f337" draw:formula="?f243 * ?f10"/>
            <draw:equation draw:name="f338" draw:formula="?f244 * ?f10"/>
            <draw:equation draw:name="f339" draw:formula="?f273 * ?f32"/>
            <draw:equation draw:name="f340" draw:formula="?f274 * ?f9"/>
            <draw:equation draw:name="f341" draw:formula="?f274 * ?f32"/>
            <draw:equation draw:name="f342" draw:formula="?f273 * ?f9"/>
            <draw:equation draw:name="f343" draw:formula="?f275 + ?f276"/>
            <draw:equation draw:name="f344" draw:formula="?f277 - ?f278"/>
            <draw:equation draw:name="f345" draw:formula="?f279 + ?f280"/>
            <draw:equation draw:name="f346" draw:formula="?f281 - ?f282"/>
            <draw:equation draw:name="f347" draw:formula="?f283 + ?f284"/>
            <draw:equation draw:name="f348" draw:formula="?f285 - ?f286"/>
            <draw:equation draw:name="f349" draw:formula="?f287 + ?f288"/>
            <draw:equation draw:name="f350" draw:formula="?f289 - ?f290"/>
            <draw:equation draw:name="f351" draw:formula="?f291 + ?f292"/>
            <draw:equation draw:name="f352" draw:formula="?f293 - ?f294"/>
            <draw:equation draw:name="f353" draw:formula="?f295 + ?f296"/>
            <draw:equation draw:name="f354" draw:formula="?f297 - ?f298"/>
            <draw:equation draw:name="f355" draw:formula="?f299 + ?f300"/>
            <draw:equation draw:name="f356" draw:formula="?f301 - ?f302"/>
            <draw:equation draw:name="f357" draw:formula="?f303 + ?f304"/>
            <draw:equation draw:name="f358" draw:formula="?f305 - ?f306"/>
            <draw:equation draw:name="f359" draw:formula="?f307 + ?f280"/>
            <draw:equation draw:name="f360" draw:formula="?f308 - ?f282"/>
            <draw:equation draw:name="f361" draw:formula="?f309 + ?f310"/>
            <draw:equation draw:name="f362" draw:formula="?f311 - ?f312"/>
            <draw:equation draw:name="f363" draw:formula="?f313 + ?f314"/>
            <draw:equation draw:name="f364" draw:formula="?f315 - ?f316"/>
            <draw:equation draw:name="f365" draw:formula="?f317 + ?f318"/>
            <draw:equation draw:name="f366" draw:formula="?f319 - ?f320"/>
            <draw:equation draw:name="f367" draw:formula="?f321 + ?f322"/>
            <draw:equation draw:name="f368" draw:formula="?f323 - ?f324"/>
            <draw:equation draw:name="f369" draw:formula="?f325 + ?f326"/>
            <draw:equation draw:name="f370" draw:formula="?f327 - ?f328"/>
            <draw:equation draw:name="f371" draw:formula="?f329 + ?f330"/>
            <draw:equation draw:name="f372" draw:formula="?f331 - ?f332"/>
            <draw:equation draw:name="f373" draw:formula="?f333 + ?f334"/>
            <draw:equation draw:name="f374" draw:formula="?f335 - ?f336"/>
            <draw:equation draw:name="f375" draw:formula="?f337 + ?f276"/>
            <draw:equation draw:name="f376" draw:formula="?f338 - ?f278"/>
            <draw:equation draw:name="f377" draw:formula="?f339 + ?f340"/>
            <draw:equation draw:name="f378" draw:formula="?f341 - ?f342"/>
            <draw:equation draw:name="f379" draw:formula="?f343 + 10800"/>
            <draw:equation draw:name="f380" draw:formula="0 - ?f344"/>
            <draw:equation draw:name="f381" draw:formula="?f345 + 10800"/>
            <draw:equation draw:name="f382" draw:formula="0 - ?f346"/>
            <draw:equation draw:name="f383" draw:formula="?f347 + 10800"/>
            <draw:equation draw:name="f384" draw:formula="0 - ?f348"/>
            <draw:equation draw:name="f385" draw:formula="?f349 + 10800"/>
            <draw:equation draw:name="f386" draw:formula="0 - ?f350"/>
            <draw:equation draw:name="f387" draw:formula="?f351 + 10800"/>
            <draw:equation draw:name="f388" draw:formula="0 - ?f352"/>
            <draw:equation draw:name="f389" draw:formula="?f353 + 10800"/>
            <draw:equation draw:name="f390" draw:formula="0 - ?f354"/>
            <draw:equation draw:name="f391" draw:formula="?f355 + 10800"/>
            <draw:equation draw:name="f392" draw:formula="0 - ?f356"/>
            <draw:equation draw:name="f393" draw:formula="?f357 + 10800"/>
            <draw:equation draw:name="f394" draw:formula="0 - ?f358"/>
            <draw:equation draw:name="f395" draw:formula="?f359 + 10800"/>
            <draw:equation draw:name="f396" draw:formula="0 - ?f360"/>
            <draw:equation draw:name="f397" draw:formula="?f361 + 10800"/>
            <draw:equation draw:name="f398" draw:formula="0 - ?f362"/>
            <draw:equation draw:name="f399" draw:formula="?f363 + 10800"/>
            <draw:equation draw:name="f400" draw:formula="0 - ?f364"/>
            <draw:equation draw:name="f401" draw:formula="?f365 + 10800"/>
            <draw:equation draw:name="f402" draw:formula="0 - ?f366"/>
            <draw:equation draw:name="f403" draw:formula="?f367 + 10800"/>
            <draw:equation draw:name="f404" draw:formula="0 - ?f368"/>
            <draw:equation draw:name="f405" draw:formula="?f369 + 10800"/>
            <draw:equation draw:name="f406" draw:formula="0 - ?f370"/>
            <draw:equation draw:name="f407" draw:formula="?f371 + 10800"/>
            <draw:equation draw:name="f408" draw:formula="0 - ?f372"/>
            <draw:equation draw:name="f409" draw:formula="?f373 + 10800"/>
            <draw:equation draw:name="f410" draw:formula="0 - ?f374"/>
            <draw:equation draw:name="f411" draw:formula="?f375 + 10800"/>
            <draw:equation draw:name="f412" draw:formula="0 - ?f376"/>
            <draw:equation draw:name="f413" draw:formula="?f377 + 10800"/>
            <draw:equation draw:name="f414" draw:formula="0 - ?f378"/>
            <draw:equation draw:name="f415" draw:formula="?f380 + 10800"/>
            <draw:equation draw:name="f416" draw:formula="?f382 + 10800"/>
            <draw:equation draw:name="f417" draw:formula="?f384 + 10800"/>
            <draw:equation draw:name="f418" draw:formula="?f386 + 10800"/>
            <draw:equation draw:name="f419" draw:formula="?f388 + 10800"/>
            <draw:equation draw:name="f420" draw:formula="?f390 + 10800"/>
            <draw:equation draw:name="f421" draw:formula="?f392 + 10800"/>
            <draw:equation draw:name="f422" draw:formula="?f394 + 10800"/>
            <draw:equation draw:name="f423" draw:formula="?f396 + 10800"/>
            <draw:equation draw:name="f424" draw:formula="?f398 + 10800"/>
            <draw:equation draw:name="f425" draw:formula="?f400 + 10800"/>
            <draw:equation draw:name="f426" draw:formula="?f402 + 10800"/>
            <draw:equation draw:name="f427" draw:formula="?f404 + 10800"/>
            <draw:equation draw:name="f428" draw:formula="?f406 + 10800"/>
            <draw:equation draw:name="f429" draw:formula="?f408 + 10800"/>
            <draw:equation draw:name="f430" draw:formula="?f410 + 10800"/>
            <draw:equation draw:name="f431" draw:formula="?f412 + 10800"/>
            <draw:equation draw:name="f432" draw:formula="?f414 + 10800"/>
            <draw:equation draw:name="f433" draw:formula="$0 / ?f6"/>
            <draw:handle draw:handle-position="$0 ?f82" draw:handle-range-x-minimum="0" draw:handle-range-x-maximum="10800"/>
          </draw:enhanced-geometry>
        </draw:custom-shape>
        <draw:custom-shape draw:name="자유형: 도형 16" draw:style-name="gr30" draw:text-style-name="P14" draw:layer="layout" svg:width="4.5cm" svg:height="2.5cm" svg:x="13.5cm" svg:y="9.622cm">
          <text:p text:style-name="P11"><text:span text:style-name="T5">입력 정보</text:span></text:p>
          <text:p text:style-name="P11"><text:span text:style-name="T5">오류시</text:span></text:p>
          <text:p text:style-name="P11"><text:span text:style-name="T5">경고창 출력</text:span></text:p>
          <draw:enhanced-geometry svg:viewBox="0 0 21600 21600" draw:text-areas="?f379 ?f415 ?f381 ?f416" draw:type="non-primitive" draw:modifiers="2500" draw:enhanced-path="M ?f383 ?f417 L ?f385 ?f418 ?f387 ?f419 ?f389 ?f420 ?f391 ?f421 ?f393 ?f422 ?f395 ?f423 ?f397 ?f424 ?f399 ?f425 ?f401 ?f426 ?f403 ?f427 ?f405 ?f428 ?f407 ?f429 ?f409 ?f430 ?f411 ?f431 ?f413 ?f432 ?f383 ?f417 Z N">
            <draw:equation draw:name="f0" draw:formula="10800000"/>
            <draw:equation draw:name="f1" draw:formula="5400000"/>
            <draw:equation draw:name="f2" draw:formula="left"/>
            <draw:equation draw:name="f3" draw:formula="right"/>
            <draw:equation draw:name="f4" draw:formula="?f3 - ?f2"/>
            <draw:equation draw:name="f5" draw:formula="5419351 / 1725033"/>
            <draw:equation draw:name="f6" draw:formula="?f4 / 21600"/>
            <draw:equation draw:name="f7" draw:formula="0"/>
            <draw:equation draw:name="f8" draw:formula="21600"/>
            <draw:equation draw:name="f9" draw:formula="10800 - 10800"/>
            <draw:equation draw:name="f10" draw:formula="0 - 10800"/>
            <draw:equation draw:name="f11" draw:formula="10800"/>
            <draw:equation draw:name="f12" draw:formula="?f5 / 180"/>
            <draw:equation draw:name="f13" draw:formula="$0"/>
            <draw:equation draw:name="f14" draw:formula="?f8 - ?f7"/>
            <draw:equation draw:name="f15" draw:formula="315 * ?f12"/>
            <draw:equation draw:name="f16" draw:formula="135 * ?f12"/>
            <draw:equation draw:name="f17" draw:formula="0 * ?f12"/>
            <draw:equation draw:name="f18" draw:formula="22 * ?f12"/>
            <draw:equation draw:name="f19" draw:formula="45 * ?f12"/>
            <draw:equation draw:name="f20" draw:formula="67 * ?f12"/>
            <draw:equation draw:name="f21" draw:formula="90 * ?f12"/>
            <draw:equation draw:name="f22" draw:formula="112 * ?f12"/>
            <draw:equation draw:name="f23" draw:formula="157 * ?f12"/>
            <draw:equation draw:name="f24" draw:formula="180 * ?f12"/>
            <draw:equation draw:name="f25" draw:formula="202 * ?f12"/>
            <draw:equation draw:name="f26" draw:formula="225 * ?f12"/>
            <draw:equation draw:name="f27" draw:formula="247 * ?f12"/>
            <draw:equation draw:name="f28" draw:formula="270 * ?f12"/>
            <draw:equation draw:name="f29" draw:formula="292 * ?f12"/>
            <draw:equation draw:name="f30" draw:formula="337 * ?f12"/>
            <draw:equation draw:name="f31" draw:formula="?f14 / 21600"/>
            <draw:equation draw:name="f32" draw:formula="?f13 - 10800"/>
            <draw:equation draw:name="f33" draw:formula="0 - ?f15"/>
            <draw:equation draw:name="f34" draw:formula="0 - ?f16"/>
            <draw:equation draw:name="f35" draw:formula="0 - ?f17"/>
            <draw:equation draw:name="f36" draw:formula="0 - ?f18"/>
            <draw:equation draw:name="f37" draw:formula="0 - ?f19"/>
            <draw:equation draw:name="f38" draw:formula="0 - ?f20"/>
            <draw:equation draw:name="f39" draw:formula="0 - ?f21"/>
            <draw:equation draw:name="f40" draw:formula="0 - ?f22"/>
            <draw:equation draw:name="f41" draw:formula="0 - ?f23"/>
            <draw:equation draw:name="f42" draw:formula="0 - ?f24"/>
            <draw:equation draw:name="f43" draw:formula="0 - ?f25"/>
            <draw:equation draw:name="f44" draw:formula="0 - ?f26"/>
            <draw:equation draw:name="f45" draw:formula="0 - ?f27"/>
            <draw:equation draw:name="f46" draw:formula="0 - ?f28"/>
            <draw:equation draw:name="f47" draw:formula="0 - ?f29"/>
            <draw:equation draw:name="f48" draw:formula="0 - ?f30"/>
            <draw:equation draw:name="f49" draw:formula="10800 * ?f31"/>
            <draw:equation draw:name="f50" draw:formula="?f33 * ?f0"/>
            <draw:equation draw:name="f51" draw:formula="?f34 * ?f0"/>
            <draw:equation draw:name="f52" draw:formula="?f35 * ?f0"/>
            <draw:equation draw:name="f53" draw:formula="?f36 * ?f0"/>
            <draw:equation draw:name="f54" draw:formula="?f37 * ?f0"/>
            <draw:equation draw:name="f55" draw:formula="?f38 * ?f0"/>
            <draw:equation draw:name="f56" draw:formula="?f39 * ?f0"/>
            <draw:equation draw:name="f57" draw:formula="?f40 * ?f0"/>
            <draw:equation draw:name="f58" draw:formula="?f41 * ?f0"/>
            <draw:equation draw:name="f59" draw:formula="?f42 * ?f0"/>
            <draw:equation draw:name="f60" draw:formula="?f43 * ?f0"/>
            <draw:equation draw:name="f61" draw:formula="?f44 * ?f0"/>
            <draw:equation draw:name="f62" draw:formula="?f45 * ?f0"/>
            <draw:equation draw:name="f63" draw:formula="?f46 * ?f0"/>
            <draw:equation draw:name="f64" draw:formula="?f47 * ?f0"/>
            <draw:equation draw:name="f65" draw:formula="?f48 * ?f0"/>
            <draw:equation draw:name="f66" draw:formula="?f50 / ?f5"/>
            <draw:equation draw:name="f67" draw:formula="?f51 / ?f5"/>
            <draw:equation draw:name="f68" draw:formula="?f52 / ?f5"/>
            <draw:equation draw:name="f69" draw:formula="?f53 / ?f5"/>
            <draw:equation draw:name="f70" draw:formula="?f54 / ?f5"/>
            <draw:equation draw:name="f71" draw:formula="?f55 / ?f5"/>
            <draw:equation draw:name="f72" draw:formula="?f56 / ?f5"/>
            <draw:equation draw:name="f73" draw:formula="?f57 / ?f5"/>
            <draw:equation draw:name="f74" draw:formula="?f58 / ?f5"/>
            <draw:equation draw:name="f75" draw:formula="?f59 / ?f5"/>
            <draw:equation draw:name="f76" draw:formula="?f60 / ?f5"/>
            <draw:equation draw:name="f77" draw:formula="?f61 / ?f5"/>
            <draw:equation draw:name="f78" draw:formula="?f62 / ?f5"/>
            <draw:equation draw:name="f79" draw:formula="?f63 / ?f5"/>
            <draw:equation draw:name="f80" draw:formula="?f64 / ?f5"/>
            <draw:equation draw:name="f81" draw:formula="?f65 / ?f5"/>
            <draw:equation draw:name="f82" draw:formula="?f49 / ?f31"/>
            <draw:equation draw:name="f83" draw:formula="?f66 - ?f1"/>
            <draw:equation draw:name="f84" draw:formula="?f67 - ?f1"/>
            <draw:equation draw:name="f85" draw:formula="?f68 - ?f1"/>
            <draw:equation draw:name="f86" draw:formula="?f69 - ?f1"/>
            <draw:equation draw:name="f87" draw:formula="?f70 - ?f1"/>
            <draw:equation draw:name="f88" draw:formula="?f71 - ?f1"/>
            <draw:equation draw:name="f89" draw:formula="?f72 - ?f1"/>
            <draw:equation draw:name="f90" draw:formula="?f73 - ?f1"/>
            <draw:equation draw:name="f91" draw:formula="?f74 - ?f1"/>
            <draw:equation draw:name="f92" draw:formula="?f75 - ?f1"/>
            <draw:equation draw:name="f93" draw:formula="?f76 - ?f1"/>
            <draw:equation draw:name="f94" draw:formula="?f77 - ?f1"/>
            <draw:equation draw:name="f95" draw:formula="?f78 - ?f1"/>
            <draw:equation draw:name="f96" draw:formula="?f79 - ?f1"/>
            <draw:equation draw:name="f97" draw:formula="?f80 - ?f1"/>
            <draw:equation draw:name="f98" draw:formula="?f81 - ?f1"/>
            <draw:equation draw:name="f99" draw:formula="?f83 + ?f1"/>
            <draw:equation draw:name="f100" draw:formula="?f99 * ?f5 / ?f0"/>
            <draw:equation draw:name="f101" draw:formula="0 - ?f100"/>
            <draw:equation draw:name="f102" draw:formula="cos(?f101)"/>
            <draw:equation draw:name="f103" draw:formula="0 - ?f102"/>
            <draw:equation draw:name="f104" draw:formula="?f103"/>
            <draw:equation draw:name="f105" draw:formula="sin(?f101)"/>
            <draw:equation draw:name="f106" draw:formula="0 - ?f105"/>
            <draw:equation draw:name="f107" draw:formula="?f106"/>
            <draw:equation draw:name="f108" draw:formula="?f84 + ?f1"/>
            <draw:equation draw:name="f109" draw:formula="?f108 * ?f5 / ?f0"/>
            <draw:equation draw:name="f110" draw:formula="0 - ?f109"/>
            <draw:equation draw:name="f111" draw:formula="cos(?f110)"/>
            <draw:equation draw:name="f112" draw:formula="0 - ?f111"/>
            <draw:equation draw:name="f113" draw:formula="?f112"/>
            <draw:equation draw:name="f114" draw:formula="sin(?f110)"/>
            <draw:equation draw:name="f115" draw:formula="0 - ?f114"/>
            <draw:equation draw:name="f116" draw:formula="?f115"/>
            <draw:equation draw:name="f117" draw:formula="?f85 + ?f1"/>
            <draw:equation draw:name="f118" draw:formula="?f117 * ?f5 / ?f0"/>
            <draw:equation draw:name="f119" draw:formula="0 - ?f118"/>
            <draw:equation draw:name="f120" draw:formula="cos(?f119)"/>
            <draw:equation draw:name="f121" draw:formula="0 - ?f120"/>
            <draw:equation draw:name="f122" draw:formula="?f121"/>
            <draw:equation draw:name="f123" draw:formula="sin(?f119)"/>
            <draw:equation draw:name="f124" draw:formula="0 - ?f123"/>
            <draw:equation draw:name="f125" draw:formula="?f124"/>
            <draw:equation draw:name="f126" draw:formula="?f86 + ?f1"/>
            <draw:equation draw:name="f127" draw:formula="?f126 * ?f5 / ?f0"/>
            <draw:equation draw:name="f128" draw:formula="0 - ?f127"/>
            <draw:equation draw:name="f129" draw:formula="cos(?f128)"/>
            <draw:equation draw:name="f130" draw:formula="0 - ?f129"/>
            <draw:equation draw:name="f131" draw:formula="?f130"/>
            <draw:equation draw:name="f132" draw:formula="sin(?f128)"/>
            <draw:equation draw:name="f133" draw:formula="0 - ?f132"/>
            <draw:equation draw:name="f134" draw:formula="?f133"/>
            <draw:equation draw:name="f135" draw:formula="?f87 + ?f1"/>
            <draw:equation draw:name="f136" draw:formula="?f135 * ?f5 / ?f0"/>
            <draw:equation draw:name="f137" draw:formula="0 - ?f136"/>
            <draw:equation draw:name="f138" draw:formula="cos(?f137)"/>
            <draw:equation draw:name="f139" draw:formula="0 - ?f138"/>
            <draw:equation draw:name="f140" draw:formula="?f139"/>
            <draw:equation draw:name="f141" draw:formula="sin(?f137)"/>
            <draw:equation draw:name="f142" draw:formula="0 - ?f141"/>
            <draw:equation draw:name="f143" draw:formula="?f142"/>
            <draw:equation draw:name="f144" draw:formula="?f88 + ?f1"/>
            <draw:equation draw:name="f145" draw:formula="?f144 * ?f5 / ?f0"/>
            <draw:equation draw:name="f146" draw:formula="0 - ?f145"/>
            <draw:equation draw:name="f147" draw:formula="cos(?f146)"/>
            <draw:equation draw:name="f148" draw:formula="0 - ?f147"/>
            <draw:equation draw:name="f149" draw:formula="?f148"/>
            <draw:equation draw:name="f150" draw:formula="sin(?f146)"/>
            <draw:equation draw:name="f151" draw:formula="0 - ?f150"/>
            <draw:equation draw:name="f152" draw:formula="?f151"/>
            <draw:equation draw:name="f153" draw:formula="?f89 + ?f1"/>
            <draw:equation draw:name="f154" draw:formula="?f153 * ?f5 / ?f0"/>
            <draw:equation draw:name="f155" draw:formula="0 - ?f154"/>
            <draw:equation draw:name="f156" draw:formula="cos(?f155)"/>
            <draw:equation draw:name="f157" draw:formula="0 - ?f156"/>
            <draw:equation draw:name="f158" draw:formula="?f157"/>
            <draw:equation draw:name="f159" draw:formula="sin(?f155)"/>
            <draw:equation draw:name="f160" draw:formula="0 - ?f159"/>
            <draw:equation draw:name="f161" draw:formula="?f160"/>
            <draw:equation draw:name="f162" draw:formula="?f90 + ?f1"/>
            <draw:equation draw:name="f163" draw:formula="?f162 * ?f5 / ?f0"/>
            <draw:equation draw:name="f164" draw:formula="0 - ?f163"/>
            <draw:equation draw:name="f165" draw:formula="cos(?f164)"/>
            <draw:equation draw:name="f166" draw:formula="0 - ?f165"/>
            <draw:equation draw:name="f167" draw:formula="?f166"/>
            <draw:equation draw:name="f168" draw:formula="sin(?f164)"/>
            <draw:equation draw:name="f169" draw:formula="0 - ?f168"/>
            <draw:equation draw:name="f170" draw:formula="?f169"/>
            <draw:equation draw:name="f171" draw:formula="?f91 + ?f1"/>
            <draw:equation draw:name="f172" draw:formula="?f171 * ?f5 / ?f0"/>
            <draw:equation draw:name="f173" draw:formula="0 - ?f172"/>
            <draw:equation draw:name="f174" draw:formula="cos(?f173)"/>
            <draw:equation draw:name="f175" draw:formula="0 - ?f174"/>
            <draw:equation draw:name="f176" draw:formula="?f175"/>
            <draw:equation draw:name="f177" draw:formula="sin(?f173)"/>
            <draw:equation draw:name="f178" draw:formula="0 - ?f177"/>
            <draw:equation draw:name="f179" draw:formula="?f178"/>
            <draw:equation draw:name="f180" draw:formula="?f92 + ?f1"/>
            <draw:equation draw:name="f181" draw:formula="?f180 * ?f5 / ?f0"/>
            <draw:equation draw:name="f182" draw:formula="0 - ?f181"/>
            <draw:equation draw:name="f183" draw:formula="cos(?f182)"/>
            <draw:equation draw:name="f184" draw:formula="0 - ?f183"/>
            <draw:equation draw:name="f185" draw:formula="?f184"/>
            <draw:equation draw:name="f186" draw:formula="sin(?f182)"/>
            <draw:equation draw:name="f187" draw:formula="0 - ?f186"/>
            <draw:equation draw:name="f188" draw:formula="?f187"/>
            <draw:equation draw:name="f189" draw:formula="?f93 + ?f1"/>
            <draw:equation draw:name="f190" draw:formula="?f189 * ?f5 / ?f0"/>
            <draw:equation draw:name="f191" draw:formula="0 - ?f190"/>
            <draw:equation draw:name="f192" draw:formula="cos(?f191)"/>
            <draw:equation draw:name="f193" draw:formula="0 - ?f192"/>
            <draw:equation draw:name="f194" draw:formula="?f193"/>
            <draw:equation draw:name="f195" draw:formula="sin(?f191)"/>
            <draw:equation draw:name="f196" draw:formula="0 - ?f195"/>
            <draw:equation draw:name="f197" draw:formula="?f196"/>
            <draw:equation draw:name="f198" draw:formula="?f94 + ?f1"/>
            <draw:equation draw:name="f199" draw:formula="?f198 * ?f5 / ?f0"/>
            <draw:equation draw:name="f200" draw:formula="0 - ?f199"/>
            <draw:equation draw:name="f201" draw:formula="cos(?f200)"/>
            <draw:equation draw:name="f202" draw:formula="0 - ?f201"/>
            <draw:equation draw:name="f203" draw:formula="?f202"/>
            <draw:equation draw:name="f204" draw:formula="sin(?f200)"/>
            <draw:equation draw:name="f205" draw:formula="0 - ?f204"/>
            <draw:equation draw:name="f206" draw:formula="?f205"/>
            <draw:equation draw:name="f207" draw:formula="?f95 + ?f1"/>
            <draw:equation draw:name="f208" draw:formula="?f207 * ?f5 / ?f0"/>
            <draw:equation draw:name="f209" draw:formula="0 - ?f208"/>
            <draw:equation draw:name="f210" draw:formula="cos(?f209)"/>
            <draw:equation draw:name="f211" draw:formula="0 - ?f210"/>
            <draw:equation draw:name="f212" draw:formula="?f211"/>
            <draw:equation draw:name="f213" draw:formula="sin(?f209)"/>
            <draw:equation draw:name="f214" draw:formula="0 - ?f213"/>
            <draw:equation draw:name="f215" draw:formula="?f214"/>
            <draw:equation draw:name="f216" draw:formula="?f96 + ?f1"/>
            <draw:equation draw:name="f217" draw:formula="?f216 * ?f5 / ?f0"/>
            <draw:equation draw:name="f218" draw:formula="0 - ?f217"/>
            <draw:equation draw:name="f219" draw:formula="cos(?f218)"/>
            <draw:equation draw:name="f220" draw:formula="0 - ?f219"/>
            <draw:equation draw:name="f221" draw:formula="?f220"/>
            <draw:equation draw:name="f222" draw:formula="sin(?f218)"/>
            <draw:equation draw:name="f223" draw:formula="0 - ?f222"/>
            <draw:equation draw:name="f224" draw:formula="?f223"/>
            <draw:equation draw:name="f225" draw:formula="?f97 + ?f1"/>
            <draw:equation draw:name="f226" draw:formula="?f225 * ?f5 / ?f0"/>
            <draw:equation draw:name="f227" draw:formula="0 - ?f226"/>
            <draw:equation draw:name="f228" draw:formula="cos(?f227)"/>
            <draw:equation draw:name="f229" draw:formula="0 - ?f228"/>
            <draw:equation draw:name="f230" draw:formula="?f229"/>
            <draw:equation draw:name="f231" draw:formula="sin(?f227)"/>
            <draw:equation draw:name="f232" draw:formula="0 - ?f231"/>
            <draw:equation draw:name="f233" draw:formula="?f232"/>
            <draw:equation draw:name="f234" draw:formula="?f98 + ?f1"/>
            <draw:equation draw:name="f235" draw:formula="?f234 * ?f5 / ?f0"/>
            <draw:equation draw:name="f236" draw:formula="0 - ?f235"/>
            <draw:equation draw:name="f237" draw:formula="cos(?f236)"/>
            <draw:equation draw:name="f238" draw:formula="0 - ?f237"/>
            <draw:equation draw:name="f239" draw:formula="?f238"/>
            <draw:equation draw:name="f240" draw:formula="sin(?f236)"/>
            <draw:equation draw:name="f241" draw:formula="0 - ?f240"/>
            <draw:equation draw:name="f242" draw:formula="?f241"/>
            <draw:equation draw:name="f243" draw:formula="0 - ?f104"/>
            <draw:equation draw:name="f244" draw:formula="0 - ?f107"/>
            <draw:equation draw:name="f245" draw:formula="0 - ?f113"/>
            <draw:equation draw:name="f246" draw:formula="0 - ?f116"/>
            <draw:equation draw:name="f247" draw:formula="0 - ?f122"/>
            <draw:equation draw:name="f248" draw:formula="0 - ?f125"/>
            <draw:equation draw:name="f249" draw:formula="0 - ?f131"/>
            <draw:equation draw:name="f250" draw:formula="0 - ?f134"/>
            <draw:equation draw:name="f251" draw:formula="0 - ?f140"/>
            <draw:equation draw:name="f252" draw:formula="0 - ?f143"/>
            <draw:equation draw:name="f253" draw:formula="0 - ?f149"/>
            <draw:equation draw:name="f254" draw:formula="0 - ?f152"/>
            <draw:equation draw:name="f255" draw:formula="0 - ?f158"/>
            <draw:equation draw:name="f256" draw:formula="0 - ?f161"/>
            <draw:equation draw:name="f257" draw:formula="0 - ?f167"/>
            <draw:equation draw:name="f258" draw:formula="0 - ?f170"/>
            <draw:equation draw:name="f259" draw:formula="0 - ?f176"/>
            <draw:equation draw:name="f260" draw:formula="0 - ?f179"/>
            <draw:equation draw:name="f261" draw:formula="0 - ?f185"/>
            <draw:equation draw:name="f262" draw:formula="0 - ?f188"/>
            <draw:equation draw:name="f263" draw:formula="0 - ?f194"/>
            <draw:equation draw:name="f264" draw:formula="0 - ?f197"/>
            <draw:equation draw:name="f265" draw:formula="0 - ?f203"/>
            <draw:equation draw:name="f266" draw:formula="0 - ?f206"/>
            <draw:equation draw:name="f267" draw:formula="0 - ?f212"/>
            <draw:equation draw:name="f268" draw:formula="0 - ?f215"/>
            <draw:equation draw:name="f269" draw:formula="0 - ?f221"/>
            <draw:equation draw:name="f270" draw:formula="0 - ?f224"/>
            <draw:equation draw:name="f271" draw:formula="0 - ?f230"/>
            <draw:equation draw:name="f272" draw:formula="0 - ?f233"/>
            <draw:equation draw:name="f273" draw:formula="0 - ?f239"/>
            <draw:equation draw:name="f274" draw:formula="0 - ?f242"/>
            <draw:equation draw:name="f275" draw:formula="?f243 * ?f32"/>
            <draw:equation draw:name="f276" draw:formula="?f244 * ?f9"/>
            <draw:equation draw:name="f277" draw:formula="?f244 * ?f32"/>
            <draw:equation draw:name="f278" draw:formula="?f243 * ?f9"/>
            <draw:equation draw:name="f279" draw:formula="?f245 * ?f32"/>
            <draw:equation draw:name="f280" draw:formula="?f246 * ?f9"/>
            <draw:equation draw:name="f281" draw:formula="?f246 * ?f32"/>
            <draw:equation draw:name="f282" draw:formula="?f245 * ?f9"/>
            <draw:equation draw:name="f283" draw:formula="?f247 * ?f10"/>
            <draw:equation draw:name="f284" draw:formula="?f248 * ?f9"/>
            <draw:equation draw:name="f285" draw:formula="?f248 * ?f10"/>
            <draw:equation draw:name="f286" draw:formula="?f247 * ?f9"/>
            <draw:equation draw:name="f287" draw:formula="?f249 * ?f32"/>
            <draw:equation draw:name="f288" draw:formula="?f250 * ?f9"/>
            <draw:equation draw:name="f289" draw:formula="?f250 * ?f32"/>
            <draw:equation draw:name="f290" draw:formula="?f249 * ?f9"/>
            <draw:equation draw:name="f291" draw:formula="?f251 * ?f10"/>
            <draw:equation draw:name="f292" draw:formula="?f252 * ?f9"/>
            <draw:equation draw:name="f293" draw:formula="?f252 * ?f10"/>
            <draw:equation draw:name="f294" draw:formula="?f251 * ?f9"/>
            <draw:equation draw:name="f295" draw:formula="?f253 * ?f32"/>
            <draw:equation draw:name="f296" draw:formula="?f254 * ?f9"/>
            <draw:equation draw:name="f297" draw:formula="?f254 * ?f32"/>
            <draw:equation draw:name="f298" draw:formula="?f253 * ?f9"/>
            <draw:equation draw:name="f299" draw:formula="?f255 * ?f10"/>
            <draw:equation draw:name="f300" draw:formula="?f256 * ?f9"/>
            <draw:equation draw:name="f301" draw:formula="?f256 * ?f10"/>
            <draw:equation draw:name="f302" draw:formula="?f255 * ?f9"/>
            <draw:equation draw:name="f303" draw:formula="?f257 * ?f32"/>
            <draw:equation draw:name="f304" draw:formula="?f258 * ?f9"/>
            <draw:equation draw:name="f305" draw:formula="?f258 * ?f32"/>
            <draw:equation draw:name="f306" draw:formula="?f257 * ?f9"/>
            <draw:equation draw:name="f307" draw:formula="?f245 * ?f10"/>
            <draw:equation draw:name="f308" draw:formula="?f246 * ?f10"/>
            <draw:equation draw:name="f309" draw:formula="?f259 * ?f32"/>
            <draw:equation draw:name="f310" draw:formula="?f260 * ?f9"/>
            <draw:equation draw:name="f311" draw:formula="?f260 * ?f32"/>
            <draw:equation draw:name="f312" draw:formula="?f259 * ?f9"/>
            <draw:equation draw:name="f313" draw:formula="?f261 * ?f10"/>
            <draw:equation draw:name="f314" draw:formula="?f262 * ?f9"/>
            <draw:equation draw:name="f315" draw:formula="?f262 * ?f10"/>
            <draw:equation draw:name="f316" draw:formula="?f261 * ?f9"/>
            <draw:equation draw:name="f317" draw:formula="?f263 * ?f32"/>
            <draw:equation draw:name="f318" draw:formula="?f264 * ?f9"/>
            <draw:equation draw:name="f319" draw:formula="?f264 * ?f32"/>
            <draw:equation draw:name="f320" draw:formula="?f263 * ?f9"/>
            <draw:equation draw:name="f321" draw:formula="?f265 * ?f10"/>
            <draw:equation draw:name="f322" draw:formula="?f266 * ?f9"/>
            <draw:equation draw:name="f323" draw:formula="?f266 * ?f10"/>
            <draw:equation draw:name="f324" draw:formula="?f265 * ?f9"/>
            <draw:equation draw:name="f325" draw:formula="?f267 * ?f32"/>
            <draw:equation draw:name="f326" draw:formula="?f268 * ?f9"/>
            <draw:equation draw:name="f327" draw:formula="?f268 * ?f32"/>
            <draw:equation draw:name="f328" draw:formula="?f267 * ?f9"/>
            <draw:equation draw:name="f329" draw:formula="?f269 * ?f10"/>
            <draw:equation draw:name="f330" draw:formula="?f270 * ?f9"/>
            <draw:equation draw:name="f331" draw:formula="?f270 * ?f10"/>
            <draw:equation draw:name="f332" draw:formula="?f269 * ?f9"/>
            <draw:equation draw:name="f333" draw:formula="?f271 * ?f32"/>
            <draw:equation draw:name="f334" draw:formula="?f272 * ?f9"/>
            <draw:equation draw:name="f335" draw:formula="?f272 * ?f32"/>
            <draw:equation draw:name="f336" draw:formula="?f271 * ?f9"/>
            <draw:equation draw:name="f337" draw:formula="?f243 * ?f10"/>
            <draw:equation draw:name="f338" draw:formula="?f244 * ?f10"/>
            <draw:equation draw:name="f339" draw:formula="?f273 * ?f32"/>
            <draw:equation draw:name="f340" draw:formula="?f274 * ?f9"/>
            <draw:equation draw:name="f341" draw:formula="?f274 * ?f32"/>
            <draw:equation draw:name="f342" draw:formula="?f273 * ?f9"/>
            <draw:equation draw:name="f343" draw:formula="?f275 + ?f276"/>
            <draw:equation draw:name="f344" draw:formula="?f277 - ?f278"/>
            <draw:equation draw:name="f345" draw:formula="?f279 + ?f280"/>
            <draw:equation draw:name="f346" draw:formula="?f281 - ?f282"/>
            <draw:equation draw:name="f347" draw:formula="?f283 + ?f284"/>
            <draw:equation draw:name="f348" draw:formula="?f285 - ?f286"/>
            <draw:equation draw:name="f349" draw:formula="?f287 + ?f288"/>
            <draw:equation draw:name="f350" draw:formula="?f289 - ?f290"/>
            <draw:equation draw:name="f351" draw:formula="?f291 + ?f292"/>
            <draw:equation draw:name="f352" draw:formula="?f293 - ?f294"/>
            <draw:equation draw:name="f353" draw:formula="?f295 + ?f296"/>
            <draw:equation draw:name="f354" draw:formula="?f297 - ?f298"/>
            <draw:equation draw:name="f355" draw:formula="?f299 + ?f300"/>
            <draw:equation draw:name="f356" draw:formula="?f301 - ?f302"/>
            <draw:equation draw:name="f357" draw:formula="?f303 + ?f304"/>
            <draw:equation draw:name="f358" draw:formula="?f305 - ?f306"/>
            <draw:equation draw:name="f359" draw:formula="?f307 + ?f280"/>
            <draw:equation draw:name="f360" draw:formula="?f308 - ?f282"/>
            <draw:equation draw:name="f361" draw:formula="?f309 + ?f310"/>
            <draw:equation draw:name="f362" draw:formula="?f311 - ?f312"/>
            <draw:equation draw:name="f363" draw:formula="?f313 + ?f314"/>
            <draw:equation draw:name="f364" draw:formula="?f315 - ?f316"/>
            <draw:equation draw:name="f365" draw:formula="?f317 + ?f318"/>
            <draw:equation draw:name="f366" draw:formula="?f319 - ?f320"/>
            <draw:equation draw:name="f367" draw:formula="?f321 + ?f322"/>
            <draw:equation draw:name="f368" draw:formula="?f323 - ?f324"/>
            <draw:equation draw:name="f369" draw:formula="?f325 + ?f326"/>
            <draw:equation draw:name="f370" draw:formula="?f327 - ?f328"/>
            <draw:equation draw:name="f371" draw:formula="?f329 + ?f330"/>
            <draw:equation draw:name="f372" draw:formula="?f331 - ?f332"/>
            <draw:equation draw:name="f373" draw:formula="?f333 + ?f334"/>
            <draw:equation draw:name="f374" draw:formula="?f335 - ?f336"/>
            <draw:equation draw:name="f375" draw:formula="?f337 + ?f276"/>
            <draw:equation draw:name="f376" draw:formula="?f338 - ?f278"/>
            <draw:equation draw:name="f377" draw:formula="?f339 + ?f340"/>
            <draw:equation draw:name="f378" draw:formula="?f341 - ?f342"/>
            <draw:equation draw:name="f379" draw:formula="?f343 + 10800"/>
            <draw:equation draw:name="f380" draw:formula="0 - ?f344"/>
            <draw:equation draw:name="f381" draw:formula="?f345 + 10800"/>
            <draw:equation draw:name="f382" draw:formula="0 - ?f346"/>
            <draw:equation draw:name="f383" draw:formula="?f347 + 10800"/>
            <draw:equation draw:name="f384" draw:formula="0 - ?f348"/>
            <draw:equation draw:name="f385" draw:formula="?f349 + 10800"/>
            <draw:equation draw:name="f386" draw:formula="0 - ?f350"/>
            <draw:equation draw:name="f387" draw:formula="?f351 + 10800"/>
            <draw:equation draw:name="f388" draw:formula="0 - ?f352"/>
            <draw:equation draw:name="f389" draw:formula="?f353 + 10800"/>
            <draw:equation draw:name="f390" draw:formula="0 - ?f354"/>
            <draw:equation draw:name="f391" draw:formula="?f355 + 10800"/>
            <draw:equation draw:name="f392" draw:formula="0 - ?f356"/>
            <draw:equation draw:name="f393" draw:formula="?f357 + 10800"/>
            <draw:equation draw:name="f394" draw:formula="0 - ?f358"/>
            <draw:equation draw:name="f395" draw:formula="?f359 + 10800"/>
            <draw:equation draw:name="f396" draw:formula="0 - ?f360"/>
            <draw:equation draw:name="f397" draw:formula="?f361 + 10800"/>
            <draw:equation draw:name="f398" draw:formula="0 - ?f362"/>
            <draw:equation draw:name="f399" draw:formula="?f363 + 10800"/>
            <draw:equation draw:name="f400" draw:formula="0 - ?f364"/>
            <draw:equation draw:name="f401" draw:formula="?f365 + 10800"/>
            <draw:equation draw:name="f402" draw:formula="0 - ?f366"/>
            <draw:equation draw:name="f403" draw:formula="?f367 + 10800"/>
            <draw:equation draw:name="f404" draw:formula="0 - ?f368"/>
            <draw:equation draw:name="f405" draw:formula="?f369 + 10800"/>
            <draw:equation draw:name="f406" draw:formula="0 - ?f370"/>
            <draw:equation draw:name="f407" draw:formula="?f371 + 10800"/>
            <draw:equation draw:name="f408" draw:formula="0 - ?f372"/>
            <draw:equation draw:name="f409" draw:formula="?f373 + 10800"/>
            <draw:equation draw:name="f410" draw:formula="0 - ?f374"/>
            <draw:equation draw:name="f411" draw:formula="?f375 + 10800"/>
            <draw:equation draw:name="f412" draw:formula="0 - ?f376"/>
            <draw:equation draw:name="f413" draw:formula="?f377 + 10800"/>
            <draw:equation draw:name="f414" draw:formula="0 - ?f378"/>
            <draw:equation draw:name="f415" draw:formula="?f380 + 10800"/>
            <draw:equation draw:name="f416" draw:formula="?f382 + 10800"/>
            <draw:equation draw:name="f417" draw:formula="?f384 + 10800"/>
            <draw:equation draw:name="f418" draw:formula="?f386 + 10800"/>
            <draw:equation draw:name="f419" draw:formula="?f388 + 10800"/>
            <draw:equation draw:name="f420" draw:formula="?f390 + 10800"/>
            <draw:equation draw:name="f421" draw:formula="?f392 + 10800"/>
            <draw:equation draw:name="f422" draw:formula="?f394 + 10800"/>
            <draw:equation draw:name="f423" draw:formula="?f396 + 10800"/>
            <draw:equation draw:name="f424" draw:formula="?f398 + 10800"/>
            <draw:equation draw:name="f425" draw:formula="?f400 + 10800"/>
            <draw:equation draw:name="f426" draw:formula="?f402 + 10800"/>
            <draw:equation draw:name="f427" draw:formula="?f404 + 10800"/>
            <draw:equation draw:name="f428" draw:formula="?f406 + 10800"/>
            <draw:equation draw:name="f429" draw:formula="?f408 + 10800"/>
            <draw:equation draw:name="f430" draw:formula="?f410 + 10800"/>
            <draw:equation draw:name="f431" draw:formula="?f412 + 10800"/>
            <draw:equation draw:name="f432" draw:formula="?f414 + 10800"/>
            <draw:equation draw:name="f433" draw:formula="$0 / ?f6"/>
            <draw:handle draw:handle-position="$0 ?f82" draw:handle-range-x-minimum="0" draw:handle-range-x-maximum="10800"/>
          </draw:enhanced-geometry>
        </draw:custom-shape>
        <draw:custom-shape draw:name="자유형: 도형 18" draw:style-name="gr30" draw:text-style-name="P14" draw:layer="layout" svg:width="4.5cm" svg:height="2.5cm" svg:x="18.745cm" svg:y="9.64cm">
          <text:p text:style-name="P11"><text:span text:style-name="T5">인증번호</text:span></text:p>
          <text:p text:style-name="P11"><text:span text:style-name="T5">오류시</text:span></text:p>
          <text:p text:style-name="P11"><text:span text:style-name="T5">경고창 출력</text:span></text:p>
          <draw:enhanced-geometry svg:viewBox="0 0 21600 21600" draw:text-areas="?f379 ?f415 ?f381 ?f416" draw:type="non-primitive" draw:modifiers="2500" draw:enhanced-path="M ?f383 ?f417 L ?f385 ?f418 ?f387 ?f419 ?f389 ?f420 ?f391 ?f421 ?f393 ?f422 ?f395 ?f423 ?f397 ?f424 ?f399 ?f425 ?f401 ?f426 ?f403 ?f427 ?f405 ?f428 ?f407 ?f429 ?f409 ?f430 ?f411 ?f431 ?f413 ?f432 ?f383 ?f417 Z N">
            <draw:equation draw:name="f0" draw:formula="10800000"/>
            <draw:equation draw:name="f1" draw:formula="5400000"/>
            <draw:equation draw:name="f2" draw:formula="left"/>
            <draw:equation draw:name="f3" draw:formula="right"/>
            <draw:equation draw:name="f4" draw:formula="?f3 - ?f2"/>
            <draw:equation draw:name="f5" draw:formula="5419351 / 1725033"/>
            <draw:equation draw:name="f6" draw:formula="?f4 / 21600"/>
            <draw:equation draw:name="f7" draw:formula="0"/>
            <draw:equation draw:name="f8" draw:formula="21600"/>
            <draw:equation draw:name="f9" draw:formula="10800 - 10800"/>
            <draw:equation draw:name="f10" draw:formula="0 - 10800"/>
            <draw:equation draw:name="f11" draw:formula="10800"/>
            <draw:equation draw:name="f12" draw:formula="?f5 / 180"/>
            <draw:equation draw:name="f13" draw:formula="$0"/>
            <draw:equation draw:name="f14" draw:formula="?f8 - ?f7"/>
            <draw:equation draw:name="f15" draw:formula="315 * ?f12"/>
            <draw:equation draw:name="f16" draw:formula="135 * ?f12"/>
            <draw:equation draw:name="f17" draw:formula="0 * ?f12"/>
            <draw:equation draw:name="f18" draw:formula="22 * ?f12"/>
            <draw:equation draw:name="f19" draw:formula="45 * ?f12"/>
            <draw:equation draw:name="f20" draw:formula="67 * ?f12"/>
            <draw:equation draw:name="f21" draw:formula="90 * ?f12"/>
            <draw:equation draw:name="f22" draw:formula="112 * ?f12"/>
            <draw:equation draw:name="f23" draw:formula="157 * ?f12"/>
            <draw:equation draw:name="f24" draw:formula="180 * ?f12"/>
            <draw:equation draw:name="f25" draw:formula="202 * ?f12"/>
            <draw:equation draw:name="f26" draw:formula="225 * ?f12"/>
            <draw:equation draw:name="f27" draw:formula="247 * ?f12"/>
            <draw:equation draw:name="f28" draw:formula="270 * ?f12"/>
            <draw:equation draw:name="f29" draw:formula="292 * ?f12"/>
            <draw:equation draw:name="f30" draw:formula="337 * ?f12"/>
            <draw:equation draw:name="f31" draw:formula="?f14 / 21600"/>
            <draw:equation draw:name="f32" draw:formula="?f13 - 10800"/>
            <draw:equation draw:name="f33" draw:formula="0 - ?f15"/>
            <draw:equation draw:name="f34" draw:formula="0 - ?f16"/>
            <draw:equation draw:name="f35" draw:formula="0 - ?f17"/>
            <draw:equation draw:name="f36" draw:formula="0 - ?f18"/>
            <draw:equation draw:name="f37" draw:formula="0 - ?f19"/>
            <draw:equation draw:name="f38" draw:formula="0 - ?f20"/>
            <draw:equation draw:name="f39" draw:formula="0 - ?f21"/>
            <draw:equation draw:name="f40" draw:formula="0 - ?f22"/>
            <draw:equation draw:name="f41" draw:formula="0 - ?f23"/>
            <draw:equation draw:name="f42" draw:formula="0 - ?f24"/>
            <draw:equation draw:name="f43" draw:formula="0 - ?f25"/>
            <draw:equation draw:name="f44" draw:formula="0 - ?f26"/>
            <draw:equation draw:name="f45" draw:formula="0 - ?f27"/>
            <draw:equation draw:name="f46" draw:formula="0 - ?f28"/>
            <draw:equation draw:name="f47" draw:formula="0 - ?f29"/>
            <draw:equation draw:name="f48" draw:formula="0 - ?f30"/>
            <draw:equation draw:name="f49" draw:formula="10800 * ?f31"/>
            <draw:equation draw:name="f50" draw:formula="?f33 * ?f0"/>
            <draw:equation draw:name="f51" draw:formula="?f34 * ?f0"/>
            <draw:equation draw:name="f52" draw:formula="?f35 * ?f0"/>
            <draw:equation draw:name="f53" draw:formula="?f36 * ?f0"/>
            <draw:equation draw:name="f54" draw:formula="?f37 * ?f0"/>
            <draw:equation draw:name="f55" draw:formula="?f38 * ?f0"/>
            <draw:equation draw:name="f56" draw:formula="?f39 * ?f0"/>
            <draw:equation draw:name="f57" draw:formula="?f40 * ?f0"/>
            <draw:equation draw:name="f58" draw:formula="?f41 * ?f0"/>
            <draw:equation draw:name="f59" draw:formula="?f42 * ?f0"/>
            <draw:equation draw:name="f60" draw:formula="?f43 * ?f0"/>
            <draw:equation draw:name="f61" draw:formula="?f44 * ?f0"/>
            <draw:equation draw:name="f62" draw:formula="?f45 * ?f0"/>
            <draw:equation draw:name="f63" draw:formula="?f46 * ?f0"/>
            <draw:equation draw:name="f64" draw:formula="?f47 * ?f0"/>
            <draw:equation draw:name="f65" draw:formula="?f48 * ?f0"/>
            <draw:equation draw:name="f66" draw:formula="?f50 / ?f5"/>
            <draw:equation draw:name="f67" draw:formula="?f51 / ?f5"/>
            <draw:equation draw:name="f68" draw:formula="?f52 / ?f5"/>
            <draw:equation draw:name="f69" draw:formula="?f53 / ?f5"/>
            <draw:equation draw:name="f70" draw:formula="?f54 / ?f5"/>
            <draw:equation draw:name="f71" draw:formula="?f55 / ?f5"/>
            <draw:equation draw:name="f72" draw:formula="?f56 / ?f5"/>
            <draw:equation draw:name="f73" draw:formula="?f57 / ?f5"/>
            <draw:equation draw:name="f74" draw:formula="?f58 / ?f5"/>
            <draw:equation draw:name="f75" draw:formula="?f59 / ?f5"/>
            <draw:equation draw:name="f76" draw:formula="?f60 / ?f5"/>
            <draw:equation draw:name="f77" draw:formula="?f61 / ?f5"/>
            <draw:equation draw:name="f78" draw:formula="?f62 / ?f5"/>
            <draw:equation draw:name="f79" draw:formula="?f63 / ?f5"/>
            <draw:equation draw:name="f80" draw:formula="?f64 / ?f5"/>
            <draw:equation draw:name="f81" draw:formula="?f65 / ?f5"/>
            <draw:equation draw:name="f82" draw:formula="?f49 / ?f31"/>
            <draw:equation draw:name="f83" draw:formula="?f66 - ?f1"/>
            <draw:equation draw:name="f84" draw:formula="?f67 - ?f1"/>
            <draw:equation draw:name="f85" draw:formula="?f68 - ?f1"/>
            <draw:equation draw:name="f86" draw:formula="?f69 - ?f1"/>
            <draw:equation draw:name="f87" draw:formula="?f70 - ?f1"/>
            <draw:equation draw:name="f88" draw:formula="?f71 - ?f1"/>
            <draw:equation draw:name="f89" draw:formula="?f72 - ?f1"/>
            <draw:equation draw:name="f90" draw:formula="?f73 - ?f1"/>
            <draw:equation draw:name="f91" draw:formula="?f74 - ?f1"/>
            <draw:equation draw:name="f92" draw:formula="?f75 - ?f1"/>
            <draw:equation draw:name="f93" draw:formula="?f76 - ?f1"/>
            <draw:equation draw:name="f94" draw:formula="?f77 - ?f1"/>
            <draw:equation draw:name="f95" draw:formula="?f78 - ?f1"/>
            <draw:equation draw:name="f96" draw:formula="?f79 - ?f1"/>
            <draw:equation draw:name="f97" draw:formula="?f80 - ?f1"/>
            <draw:equation draw:name="f98" draw:formula="?f81 - ?f1"/>
            <draw:equation draw:name="f99" draw:formula="?f83 + ?f1"/>
            <draw:equation draw:name="f100" draw:formula="?f99 * ?f5 / ?f0"/>
            <draw:equation draw:name="f101" draw:formula="0 - ?f100"/>
            <draw:equation draw:name="f102" draw:formula="cos(?f101)"/>
            <draw:equation draw:name="f103" draw:formula="0 - ?f102"/>
            <draw:equation draw:name="f104" draw:formula="?f103"/>
            <draw:equation draw:name="f105" draw:formula="sin(?f101)"/>
            <draw:equation draw:name="f106" draw:formula="0 - ?f105"/>
            <draw:equation draw:name="f107" draw:formula="?f106"/>
            <draw:equation draw:name="f108" draw:formula="?f84 + ?f1"/>
            <draw:equation draw:name="f109" draw:formula="?f108 * ?f5 / ?f0"/>
            <draw:equation draw:name="f110" draw:formula="0 - ?f109"/>
            <draw:equation draw:name="f111" draw:formula="cos(?f110)"/>
            <draw:equation draw:name="f112" draw:formula="0 - ?f111"/>
            <draw:equation draw:name="f113" draw:formula="?f112"/>
            <draw:equation draw:name="f114" draw:formula="sin(?f110)"/>
            <draw:equation draw:name="f115" draw:formula="0 - ?f114"/>
            <draw:equation draw:name="f116" draw:formula="?f115"/>
            <draw:equation draw:name="f117" draw:formula="?f85 + ?f1"/>
            <draw:equation draw:name="f118" draw:formula="?f117 * ?f5 / ?f0"/>
            <draw:equation draw:name="f119" draw:formula="0 - ?f118"/>
            <draw:equation draw:name="f120" draw:formula="cos(?f119)"/>
            <draw:equation draw:name="f121" draw:formula="0 - ?f120"/>
            <draw:equation draw:name="f122" draw:formula="?f121"/>
            <draw:equation draw:name="f123" draw:formula="sin(?f119)"/>
            <draw:equation draw:name="f124" draw:formula="0 - ?f123"/>
            <draw:equation draw:name="f125" draw:formula="?f124"/>
            <draw:equation draw:name="f126" draw:formula="?f86 + ?f1"/>
            <draw:equation draw:name="f127" draw:formula="?f126 * ?f5 / ?f0"/>
            <draw:equation draw:name="f128" draw:formula="0 - ?f127"/>
            <draw:equation draw:name="f129" draw:formula="cos(?f128)"/>
            <draw:equation draw:name="f130" draw:formula="0 - ?f129"/>
            <draw:equation draw:name="f131" draw:formula="?f130"/>
            <draw:equation draw:name="f132" draw:formula="sin(?f128)"/>
            <draw:equation draw:name="f133" draw:formula="0 - ?f132"/>
            <draw:equation draw:name="f134" draw:formula="?f133"/>
            <draw:equation draw:name="f135" draw:formula="?f87 + ?f1"/>
            <draw:equation draw:name="f136" draw:formula="?f135 * ?f5 / ?f0"/>
            <draw:equation draw:name="f137" draw:formula="0 - ?f136"/>
            <draw:equation draw:name="f138" draw:formula="cos(?f137)"/>
            <draw:equation draw:name="f139" draw:formula="0 - ?f138"/>
            <draw:equation draw:name="f140" draw:formula="?f139"/>
            <draw:equation draw:name="f141" draw:formula="sin(?f137)"/>
            <draw:equation draw:name="f142" draw:formula="0 - ?f141"/>
            <draw:equation draw:name="f143" draw:formula="?f142"/>
            <draw:equation draw:name="f144" draw:formula="?f88 + ?f1"/>
            <draw:equation draw:name="f145" draw:formula="?f144 * ?f5 / ?f0"/>
            <draw:equation draw:name="f146" draw:formula="0 - ?f145"/>
            <draw:equation draw:name="f147" draw:formula="cos(?f146)"/>
            <draw:equation draw:name="f148" draw:formula="0 - ?f147"/>
            <draw:equation draw:name="f149" draw:formula="?f148"/>
            <draw:equation draw:name="f150" draw:formula="sin(?f146)"/>
            <draw:equation draw:name="f151" draw:formula="0 - ?f150"/>
            <draw:equation draw:name="f152" draw:formula="?f151"/>
            <draw:equation draw:name="f153" draw:formula="?f89 + ?f1"/>
            <draw:equation draw:name="f154" draw:formula="?f153 * ?f5 / ?f0"/>
            <draw:equation draw:name="f155" draw:formula="0 - ?f154"/>
            <draw:equation draw:name="f156" draw:formula="cos(?f155)"/>
            <draw:equation draw:name="f157" draw:formula="0 - ?f156"/>
            <draw:equation draw:name="f158" draw:formula="?f157"/>
            <draw:equation draw:name="f159" draw:formula="sin(?f155)"/>
            <draw:equation draw:name="f160" draw:formula="0 - ?f159"/>
            <draw:equation draw:name="f161" draw:formula="?f160"/>
            <draw:equation draw:name="f162" draw:formula="?f90 + ?f1"/>
            <draw:equation draw:name="f163" draw:formula="?f162 * ?f5 / ?f0"/>
            <draw:equation draw:name="f164" draw:formula="0 - ?f163"/>
            <draw:equation draw:name="f165" draw:formula="cos(?f164)"/>
            <draw:equation draw:name="f166" draw:formula="0 - ?f165"/>
            <draw:equation draw:name="f167" draw:formula="?f166"/>
            <draw:equation draw:name="f168" draw:formula="sin(?f164)"/>
            <draw:equation draw:name="f169" draw:formula="0 - ?f168"/>
            <draw:equation draw:name="f170" draw:formula="?f169"/>
            <draw:equation draw:name="f171" draw:formula="?f91 + ?f1"/>
            <draw:equation draw:name="f172" draw:formula="?f171 * ?f5 / ?f0"/>
            <draw:equation draw:name="f173" draw:formula="0 - ?f172"/>
            <draw:equation draw:name="f174" draw:formula="cos(?f173)"/>
            <draw:equation draw:name="f175" draw:formula="0 - ?f174"/>
            <draw:equation draw:name="f176" draw:formula="?f175"/>
            <draw:equation draw:name="f177" draw:formula="sin(?f173)"/>
            <draw:equation draw:name="f178" draw:formula="0 - ?f177"/>
            <draw:equation draw:name="f179" draw:formula="?f178"/>
            <draw:equation draw:name="f180" draw:formula="?f92 + ?f1"/>
            <draw:equation draw:name="f181" draw:formula="?f180 * ?f5 / ?f0"/>
            <draw:equation draw:name="f182" draw:formula="0 - ?f181"/>
            <draw:equation draw:name="f183" draw:formula="cos(?f182)"/>
            <draw:equation draw:name="f184" draw:formula="0 - ?f183"/>
            <draw:equation draw:name="f185" draw:formula="?f184"/>
            <draw:equation draw:name="f186" draw:formula="sin(?f182)"/>
            <draw:equation draw:name="f187" draw:formula="0 - ?f186"/>
            <draw:equation draw:name="f188" draw:formula="?f187"/>
            <draw:equation draw:name="f189" draw:formula="?f93 + ?f1"/>
            <draw:equation draw:name="f190" draw:formula="?f189 * ?f5 / ?f0"/>
            <draw:equation draw:name="f191" draw:formula="0 - ?f190"/>
            <draw:equation draw:name="f192" draw:formula="cos(?f191)"/>
            <draw:equation draw:name="f193" draw:formula="0 - ?f192"/>
            <draw:equation draw:name="f194" draw:formula="?f193"/>
            <draw:equation draw:name="f195" draw:formula="sin(?f191)"/>
            <draw:equation draw:name="f196" draw:formula="0 - ?f195"/>
            <draw:equation draw:name="f197" draw:formula="?f196"/>
            <draw:equation draw:name="f198" draw:formula="?f94 + ?f1"/>
            <draw:equation draw:name="f199" draw:formula="?f198 * ?f5 / ?f0"/>
            <draw:equation draw:name="f200" draw:formula="0 - ?f199"/>
            <draw:equation draw:name="f201" draw:formula="cos(?f200)"/>
            <draw:equation draw:name="f202" draw:formula="0 - ?f201"/>
            <draw:equation draw:name="f203" draw:formula="?f202"/>
            <draw:equation draw:name="f204" draw:formula="sin(?f200)"/>
            <draw:equation draw:name="f205" draw:formula="0 - ?f204"/>
            <draw:equation draw:name="f206" draw:formula="?f205"/>
            <draw:equation draw:name="f207" draw:formula="?f95 + ?f1"/>
            <draw:equation draw:name="f208" draw:formula="?f207 * ?f5 / ?f0"/>
            <draw:equation draw:name="f209" draw:formula="0 - ?f208"/>
            <draw:equation draw:name="f210" draw:formula="cos(?f209)"/>
            <draw:equation draw:name="f211" draw:formula="0 - ?f210"/>
            <draw:equation draw:name="f212" draw:formula="?f211"/>
            <draw:equation draw:name="f213" draw:formula="sin(?f209)"/>
            <draw:equation draw:name="f214" draw:formula="0 - ?f213"/>
            <draw:equation draw:name="f215" draw:formula="?f214"/>
            <draw:equation draw:name="f216" draw:formula="?f96 + ?f1"/>
            <draw:equation draw:name="f217" draw:formula="?f216 * ?f5 / ?f0"/>
            <draw:equation draw:name="f218" draw:formula="0 - ?f217"/>
            <draw:equation draw:name="f219" draw:formula="cos(?f218)"/>
            <draw:equation draw:name="f220" draw:formula="0 - ?f219"/>
            <draw:equation draw:name="f221" draw:formula="?f220"/>
            <draw:equation draw:name="f222" draw:formula="sin(?f218)"/>
            <draw:equation draw:name="f223" draw:formula="0 - ?f222"/>
            <draw:equation draw:name="f224" draw:formula="?f223"/>
            <draw:equation draw:name="f225" draw:formula="?f97 + ?f1"/>
            <draw:equation draw:name="f226" draw:formula="?f225 * ?f5 / ?f0"/>
            <draw:equation draw:name="f227" draw:formula="0 - ?f226"/>
            <draw:equation draw:name="f228" draw:formula="cos(?f227)"/>
            <draw:equation draw:name="f229" draw:formula="0 - ?f228"/>
            <draw:equation draw:name="f230" draw:formula="?f229"/>
            <draw:equation draw:name="f231" draw:formula="sin(?f227)"/>
            <draw:equation draw:name="f232" draw:formula="0 - ?f231"/>
            <draw:equation draw:name="f233" draw:formula="?f232"/>
            <draw:equation draw:name="f234" draw:formula="?f98 + ?f1"/>
            <draw:equation draw:name="f235" draw:formula="?f234 * ?f5 / ?f0"/>
            <draw:equation draw:name="f236" draw:formula="0 - ?f235"/>
            <draw:equation draw:name="f237" draw:formula="cos(?f236)"/>
            <draw:equation draw:name="f238" draw:formula="0 - ?f237"/>
            <draw:equation draw:name="f239" draw:formula="?f238"/>
            <draw:equation draw:name="f240" draw:formula="sin(?f236)"/>
            <draw:equation draw:name="f241" draw:formula="0 - ?f240"/>
            <draw:equation draw:name="f242" draw:formula="?f241"/>
            <draw:equation draw:name="f243" draw:formula="0 - ?f104"/>
            <draw:equation draw:name="f244" draw:formula="0 - ?f107"/>
            <draw:equation draw:name="f245" draw:formula="0 - ?f113"/>
            <draw:equation draw:name="f246" draw:formula="0 - ?f116"/>
            <draw:equation draw:name="f247" draw:formula="0 - ?f122"/>
            <draw:equation draw:name="f248" draw:formula="0 - ?f125"/>
            <draw:equation draw:name="f249" draw:formula="0 - ?f131"/>
            <draw:equation draw:name="f250" draw:formula="0 - ?f134"/>
            <draw:equation draw:name="f251" draw:formula="0 - ?f140"/>
            <draw:equation draw:name="f252" draw:formula="0 - ?f143"/>
            <draw:equation draw:name="f253" draw:formula="0 - ?f149"/>
            <draw:equation draw:name="f254" draw:formula="0 - ?f152"/>
            <draw:equation draw:name="f255" draw:formula="0 - ?f158"/>
            <draw:equation draw:name="f256" draw:formula="0 - ?f161"/>
            <draw:equation draw:name="f257" draw:formula="0 - ?f167"/>
            <draw:equation draw:name="f258" draw:formula="0 - ?f170"/>
            <draw:equation draw:name="f259" draw:formula="0 - ?f176"/>
            <draw:equation draw:name="f260" draw:formula="0 - ?f179"/>
            <draw:equation draw:name="f261" draw:formula="0 - ?f185"/>
            <draw:equation draw:name="f262" draw:formula="0 - ?f188"/>
            <draw:equation draw:name="f263" draw:formula="0 - ?f194"/>
            <draw:equation draw:name="f264" draw:formula="0 - ?f197"/>
            <draw:equation draw:name="f265" draw:formula="0 - ?f203"/>
            <draw:equation draw:name="f266" draw:formula="0 - ?f206"/>
            <draw:equation draw:name="f267" draw:formula="0 - ?f212"/>
            <draw:equation draw:name="f268" draw:formula="0 - ?f215"/>
            <draw:equation draw:name="f269" draw:formula="0 - ?f221"/>
            <draw:equation draw:name="f270" draw:formula="0 - ?f224"/>
            <draw:equation draw:name="f271" draw:formula="0 - ?f230"/>
            <draw:equation draw:name="f272" draw:formula="0 - ?f233"/>
            <draw:equation draw:name="f273" draw:formula="0 - ?f239"/>
            <draw:equation draw:name="f274" draw:formula="0 - ?f242"/>
            <draw:equation draw:name="f275" draw:formula="?f243 * ?f32"/>
            <draw:equation draw:name="f276" draw:formula="?f244 * ?f9"/>
            <draw:equation draw:name="f277" draw:formula="?f244 * ?f32"/>
            <draw:equation draw:name="f278" draw:formula="?f243 * ?f9"/>
            <draw:equation draw:name="f279" draw:formula="?f245 * ?f32"/>
            <draw:equation draw:name="f280" draw:formula="?f246 * ?f9"/>
            <draw:equation draw:name="f281" draw:formula="?f246 * ?f32"/>
            <draw:equation draw:name="f282" draw:formula="?f245 * ?f9"/>
            <draw:equation draw:name="f283" draw:formula="?f247 * ?f10"/>
            <draw:equation draw:name="f284" draw:formula="?f248 * ?f9"/>
            <draw:equation draw:name="f285" draw:formula="?f248 * ?f10"/>
            <draw:equation draw:name="f286" draw:formula="?f247 * ?f9"/>
            <draw:equation draw:name="f287" draw:formula="?f249 * ?f32"/>
            <draw:equation draw:name="f288" draw:formula="?f250 * ?f9"/>
            <draw:equation draw:name="f289" draw:formula="?f250 * ?f32"/>
            <draw:equation draw:name="f290" draw:formula="?f249 * ?f9"/>
            <draw:equation draw:name="f291" draw:formula="?f251 * ?f10"/>
            <draw:equation draw:name="f292" draw:formula="?f252 * ?f9"/>
            <draw:equation draw:name="f293" draw:formula="?f252 * ?f10"/>
            <draw:equation draw:name="f294" draw:formula="?f251 * ?f9"/>
            <draw:equation draw:name="f295" draw:formula="?f253 * ?f32"/>
            <draw:equation draw:name="f296" draw:formula="?f254 * ?f9"/>
            <draw:equation draw:name="f297" draw:formula="?f254 * ?f32"/>
            <draw:equation draw:name="f298" draw:formula="?f253 * ?f9"/>
            <draw:equation draw:name="f299" draw:formula="?f255 * ?f10"/>
            <draw:equation draw:name="f300" draw:formula="?f256 * ?f9"/>
            <draw:equation draw:name="f301" draw:formula="?f256 * ?f10"/>
            <draw:equation draw:name="f302" draw:formula="?f255 * ?f9"/>
            <draw:equation draw:name="f303" draw:formula="?f257 * ?f32"/>
            <draw:equation draw:name="f304" draw:formula="?f258 * ?f9"/>
            <draw:equation draw:name="f305" draw:formula="?f258 * ?f32"/>
            <draw:equation draw:name="f306" draw:formula="?f257 * ?f9"/>
            <draw:equation draw:name="f307" draw:formula="?f245 * ?f10"/>
            <draw:equation draw:name="f308" draw:formula="?f246 * ?f10"/>
            <draw:equation draw:name="f309" draw:formula="?f259 * ?f32"/>
            <draw:equation draw:name="f310" draw:formula="?f260 * ?f9"/>
            <draw:equation draw:name="f311" draw:formula="?f260 * ?f32"/>
            <draw:equation draw:name="f312" draw:formula="?f259 * ?f9"/>
            <draw:equation draw:name="f313" draw:formula="?f261 * ?f10"/>
            <draw:equation draw:name="f314" draw:formula="?f262 * ?f9"/>
            <draw:equation draw:name="f315" draw:formula="?f262 * ?f10"/>
            <draw:equation draw:name="f316" draw:formula="?f261 * ?f9"/>
            <draw:equation draw:name="f317" draw:formula="?f263 * ?f32"/>
            <draw:equation draw:name="f318" draw:formula="?f264 * ?f9"/>
            <draw:equation draw:name="f319" draw:formula="?f264 * ?f32"/>
            <draw:equation draw:name="f320" draw:formula="?f263 * ?f9"/>
            <draw:equation draw:name="f321" draw:formula="?f265 * ?f10"/>
            <draw:equation draw:name="f322" draw:formula="?f266 * ?f9"/>
            <draw:equation draw:name="f323" draw:formula="?f266 * ?f10"/>
            <draw:equation draw:name="f324" draw:formula="?f265 * ?f9"/>
            <draw:equation draw:name="f325" draw:formula="?f267 * ?f32"/>
            <draw:equation draw:name="f326" draw:formula="?f268 * ?f9"/>
            <draw:equation draw:name="f327" draw:formula="?f268 * ?f32"/>
            <draw:equation draw:name="f328" draw:formula="?f267 * ?f9"/>
            <draw:equation draw:name="f329" draw:formula="?f269 * ?f10"/>
            <draw:equation draw:name="f330" draw:formula="?f270 * ?f9"/>
            <draw:equation draw:name="f331" draw:formula="?f270 * ?f10"/>
            <draw:equation draw:name="f332" draw:formula="?f269 * ?f9"/>
            <draw:equation draw:name="f333" draw:formula="?f271 * ?f32"/>
            <draw:equation draw:name="f334" draw:formula="?f272 * ?f9"/>
            <draw:equation draw:name="f335" draw:formula="?f272 * ?f32"/>
            <draw:equation draw:name="f336" draw:formula="?f271 * ?f9"/>
            <draw:equation draw:name="f337" draw:formula="?f243 * ?f10"/>
            <draw:equation draw:name="f338" draw:formula="?f244 * ?f10"/>
            <draw:equation draw:name="f339" draw:formula="?f273 * ?f32"/>
            <draw:equation draw:name="f340" draw:formula="?f274 * ?f9"/>
            <draw:equation draw:name="f341" draw:formula="?f274 * ?f32"/>
            <draw:equation draw:name="f342" draw:formula="?f273 * ?f9"/>
            <draw:equation draw:name="f343" draw:formula="?f275 + ?f276"/>
            <draw:equation draw:name="f344" draw:formula="?f277 - ?f278"/>
            <draw:equation draw:name="f345" draw:formula="?f279 + ?f280"/>
            <draw:equation draw:name="f346" draw:formula="?f281 - ?f282"/>
            <draw:equation draw:name="f347" draw:formula="?f283 + ?f284"/>
            <draw:equation draw:name="f348" draw:formula="?f285 - ?f286"/>
            <draw:equation draw:name="f349" draw:formula="?f287 + ?f288"/>
            <draw:equation draw:name="f350" draw:formula="?f289 - ?f290"/>
            <draw:equation draw:name="f351" draw:formula="?f291 + ?f292"/>
            <draw:equation draw:name="f352" draw:formula="?f293 - ?f294"/>
            <draw:equation draw:name="f353" draw:formula="?f295 + ?f296"/>
            <draw:equation draw:name="f354" draw:formula="?f297 - ?f298"/>
            <draw:equation draw:name="f355" draw:formula="?f299 + ?f300"/>
            <draw:equation draw:name="f356" draw:formula="?f301 - ?f302"/>
            <draw:equation draw:name="f357" draw:formula="?f303 + ?f304"/>
            <draw:equation draw:name="f358" draw:formula="?f305 - ?f306"/>
            <draw:equation draw:name="f359" draw:formula="?f307 + ?f280"/>
            <draw:equation draw:name="f360" draw:formula="?f308 - ?f282"/>
            <draw:equation draw:name="f361" draw:formula="?f309 + ?f310"/>
            <draw:equation draw:name="f362" draw:formula="?f311 - ?f312"/>
            <draw:equation draw:name="f363" draw:formula="?f313 + ?f314"/>
            <draw:equation draw:name="f364" draw:formula="?f315 - ?f316"/>
            <draw:equation draw:name="f365" draw:formula="?f317 + ?f318"/>
            <draw:equation draw:name="f366" draw:formula="?f319 - ?f320"/>
            <draw:equation draw:name="f367" draw:formula="?f321 + ?f322"/>
            <draw:equation draw:name="f368" draw:formula="?f323 - ?f324"/>
            <draw:equation draw:name="f369" draw:formula="?f325 + ?f326"/>
            <draw:equation draw:name="f370" draw:formula="?f327 - ?f328"/>
            <draw:equation draw:name="f371" draw:formula="?f329 + ?f330"/>
            <draw:equation draw:name="f372" draw:formula="?f331 - ?f332"/>
            <draw:equation draw:name="f373" draw:formula="?f333 + ?f334"/>
            <draw:equation draw:name="f374" draw:formula="?f335 - ?f336"/>
            <draw:equation draw:name="f375" draw:formula="?f337 + ?f276"/>
            <draw:equation draw:name="f376" draw:formula="?f338 - ?f278"/>
            <draw:equation draw:name="f377" draw:formula="?f339 + ?f340"/>
            <draw:equation draw:name="f378" draw:formula="?f341 - ?f342"/>
            <draw:equation draw:name="f379" draw:formula="?f343 + 10800"/>
            <draw:equation draw:name="f380" draw:formula="0 - ?f344"/>
            <draw:equation draw:name="f381" draw:formula="?f345 + 10800"/>
            <draw:equation draw:name="f382" draw:formula="0 - ?f346"/>
            <draw:equation draw:name="f383" draw:formula="?f347 + 10800"/>
            <draw:equation draw:name="f384" draw:formula="0 - ?f348"/>
            <draw:equation draw:name="f385" draw:formula="?f349 + 10800"/>
            <draw:equation draw:name="f386" draw:formula="0 - ?f350"/>
            <draw:equation draw:name="f387" draw:formula="?f351 + 10800"/>
            <draw:equation draw:name="f388" draw:formula="0 - ?f352"/>
            <draw:equation draw:name="f389" draw:formula="?f353 + 10800"/>
            <draw:equation draw:name="f390" draw:formula="0 - ?f354"/>
            <draw:equation draw:name="f391" draw:formula="?f355 + 10800"/>
            <draw:equation draw:name="f392" draw:formula="0 - ?f356"/>
            <draw:equation draw:name="f393" draw:formula="?f357 + 10800"/>
            <draw:equation draw:name="f394" draw:formula="0 - ?f358"/>
            <draw:equation draw:name="f395" draw:formula="?f359 + 10800"/>
            <draw:equation draw:name="f396" draw:formula="0 - ?f360"/>
            <draw:equation draw:name="f397" draw:formula="?f361 + 10800"/>
            <draw:equation draw:name="f398" draw:formula="0 - ?f362"/>
            <draw:equation draw:name="f399" draw:formula="?f363 + 10800"/>
            <draw:equation draw:name="f400" draw:formula="0 - ?f364"/>
            <draw:equation draw:name="f401" draw:formula="?f365 + 10800"/>
            <draw:equation draw:name="f402" draw:formula="0 - ?f366"/>
            <draw:equation draw:name="f403" draw:formula="?f367 + 10800"/>
            <draw:equation draw:name="f404" draw:formula="0 - ?f368"/>
            <draw:equation draw:name="f405" draw:formula="?f369 + 10800"/>
            <draw:equation draw:name="f406" draw:formula="0 - ?f370"/>
            <draw:equation draw:name="f407" draw:formula="?f371 + 10800"/>
            <draw:equation draw:name="f408" draw:formula="0 - ?f372"/>
            <draw:equation draw:name="f409" draw:formula="?f373 + 10800"/>
            <draw:equation draw:name="f410" draw:formula="0 - ?f374"/>
            <draw:equation draw:name="f411" draw:formula="?f375 + 10800"/>
            <draw:equation draw:name="f412" draw:formula="0 - ?f376"/>
            <draw:equation draw:name="f413" draw:formula="?f377 + 10800"/>
            <draw:equation draw:name="f414" draw:formula="0 - ?f378"/>
            <draw:equation draw:name="f415" draw:formula="?f380 + 10800"/>
            <draw:equation draw:name="f416" draw:formula="?f382 + 10800"/>
            <draw:equation draw:name="f417" draw:formula="?f384 + 10800"/>
            <draw:equation draw:name="f418" draw:formula="?f386 + 10800"/>
            <draw:equation draw:name="f419" draw:formula="?f388 + 10800"/>
            <draw:equation draw:name="f420" draw:formula="?f390 + 10800"/>
            <draw:equation draw:name="f421" draw:formula="?f392 + 10800"/>
            <draw:equation draw:name="f422" draw:formula="?f394 + 10800"/>
            <draw:equation draw:name="f423" draw:formula="?f396 + 10800"/>
            <draw:equation draw:name="f424" draw:formula="?f398 + 10800"/>
            <draw:equation draw:name="f425" draw:formula="?f400 + 10800"/>
            <draw:equation draw:name="f426" draw:formula="?f402 + 10800"/>
            <draw:equation draw:name="f427" draw:formula="?f404 + 10800"/>
            <draw:equation draw:name="f428" draw:formula="?f406 + 10800"/>
            <draw:equation draw:name="f429" draw:formula="?f408 + 10800"/>
            <draw:equation draw:name="f430" draw:formula="?f410 + 10800"/>
            <draw:equation draw:name="f431" draw:formula="?f412 + 10800"/>
            <draw:equation draw:name="f432" draw:formula="?f414 + 10800"/>
            <draw:equation draw:name="f433" draw:formula="$0 / ?f6"/>
            <draw:handle draw:handle-position="$0 ?f82" draw:handle-range-x-minimum="0" draw:handle-range-x-maximum="10800"/>
          </draw:enhanced-geometry>
        </draw:custom-shape>
        <draw:custom-shape draw:name="직선 연결선 20" draw:style-name="gr31" draw:text-style-name="P26" draw:layer="layout" svg:width="3cm" svg:height="0.001cm" svg:x="5.493cm" svg:y="13.1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직선 연결선 21" draw:style-name="gr32" draw:text-style-name="P26" draw:layer="layout" svg:width="3cm" svg:height="0.001cm" svg:x="5.509cm" svg:y="4.562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직선 연결선 22" draw:style-name="gr33" draw:text-style-name="P26" draw:layer="layout" svg:width="2cm" svg:height="0.001cm" svg:x="12.014cm" svg:y="8.71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직선 연결선 23" draw:style-name="gr34" draw:text-style-name="P26" draw:layer="layout" svg:width="2cm" svg:height="0.001cm" svg:x="12cm" svg:y="13.12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직선 연결선 24" draw:style-name="gr35" draw:text-style-name="P26" draw:layer="layout" svg:width="2cm" svg:height="0.001cm" svg:x="12.031cm" svg:y="4.55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직선 연결선 25" draw:style-name="gr36" draw:text-style-name="P26" draw:layer="layout" svg:width="1.6cm" svg:height="0.001cm" svg:x="17.486cm" svg:y="8.769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직선 연결선 26" draw:style-name="gr37" draw:text-style-name="P26" draw:layer="layout" svg:width="1.6cm" svg:height="0.001cm" svg:x="17.486cm" svg:y="13.12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자유형: 도형 32" draw:style-name="gr38" draw:text-style-name="P27" draw:layer="layout" svg:width="7.712cm" svg:height="1.25cm" svg:x="9.644cm" svg:y="2.372cm">
          <text:p text:style-name="P11"><text:span text:style-name="T10">일반 회원</text:span><text:span text:style-name="T11">/ </text:span><text:span text:style-name="T10">판매자</text:span><text:span text:style-name="T12">/ </text:span><text:span text:style-name="T12">관리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name="직선 화살표 연결선 46" draw:style-name="gr39" draw:text-style-name="P1" draw:layer="layout" draw:type="line" svg:x1="17.516cm" svg:y1="4.551cm" svg:x2="20.727cm" svg:y2="4.551cm" draw:start-shape="id11" draw:start-glue-point="1" draw:end-shape="id12" draw:end-glue-point="3" svg:d="M17516 4551h3211" svg:viewBox="0 0 3212 1">
          <text:p/>
        </draw:connector>
        <draw:custom-shape draw:name="직선 연결선 20" draw:style-name="gr40" draw:text-style-name="P26" draw:layer="layout" svg:width="3cm" svg:height="0.001cm" svg:x="5.534cm" svg:y="8.70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48" draw:style-name="gr15" draw:text-style-name="P17" draw:layer="layout" svg:width="3.298cm" svg:height="1.026cm" svg:x="0.181cm" svg:y="0.127cm">
          <draw:text-box>
            <text:p text:style-name="P16"><text:span text:style-name="T6">PROCESS</text:span></text:p>
          </draw:text-box>
        </draw:frame>
        <draw:custom-shape draw:style-name="gr19" draw:text-style-name="P18" draw:layer="layout" svg:width="27.5cm" svg:height="0.9cm" svg:x="0.3cm" svg:y="1.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323cm">
          <draw:text-box>
            <text:p><text:span text:style-name="T7">프로세스 명</text:span></text:p>
          </draw:text-box>
        </draw:frame>
        <draw:frame draw:style-name="gr41" draw:text-style-name="P19" draw:layer="layout" svg:width="1.67cm" svg:height="0.759cm" svg:x="23.9cm" svg:y="1.324cm">
          <draw:text-box>
            <text:p><text:span text:style-name="T7">로그인</text:span></text:p>
          </draw:text-box>
        </draw:frame>
        <draw:line draw:style-name="gr21" draw:text-style-name="P15" draw:layer="layout" svg:x1="21.5cm" svg:y1="1.2cm" svg:x2="21.5cm" svg:y2="2.1cm">
          <text:p/>
        </draw:line>
        <draw:line draw:style-name="gr21" draw:text-style-name="P15" draw:layer="layout" svg:x1="14.1cm" svg:y1="1.2cm" svg:x2="14.1cm" svg:y2="2.1cm">
          <text:p/>
        </draw:line>
        <draw:line draw:style-name="gr21" draw:text-style-name="P15" draw:layer="layout" svg:x1="6.9cm" svg:y1="1.2cm" svg:x2="6.9cm" svg:y2="2.1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3">
          <draw:frame draw:name="슬라이드 번호 개체 틀 6"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1" draw:style-name="gr10" draw:layer="layout" svg:width="19.786cm" svg:height="11.135cm" svg:x="0.604cm" svg:y="2.258cm" draw:page-number="4" presentation:class="page"/>
          <draw:frame draw:name="슬라이드 노트 개체 틀 2" presentation:style-name="pr1" draw:text-style-name="P21" draw:layer="layout" svg:width="16.799cm" svg:height="13.364cm" svg:x="2.1cm" svg:y="14.107cm" presentation:class="notes" presentation:placeholder="true">
            <draw:text-box/>
          </draw:frame>
        </presentation:notes>
      </draw:page>
      <draw:page draw:name="page6" draw:style-name="dp1" draw:master-page-name="Master2-Layout2-blank-빈-화면" presentation:presentation-page-layout-name="AL1T14">
        <draw:frame draw:name="그림 25"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1" draw:style-name="gr42" draw:text-style-name="P17" draw:layer="layout" svg:width="6.5cm" svg:height="1cm" svg:x="1.136cm" svg:y="15.063cm">
          <draw:text-box>
            <text:p/>
          </draw:text-box>
        </draw:frame>
        <draw:custom-shape draw:name="자유형: 도형 1" draw:style-name="gr23" draw:text-style-name="P14" xml:id="id13" draw:id="id13" draw:layer="layout" svg:width="3cm" svg:height="1cm" svg:x="1.136cm" svg:y="8.576cm">
          <text:p text:style-name="P11"><text:span text:style-name="T5">회원 가입</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2" draw:style-name="gr23" draw:text-style-name="P14" draw:layer="layout" svg:width="3cm" svg:height="1cm" svg:x="7.636cm" svg:y="10.528cm">
          <text:p text:style-name="P11"><text:span text:style-name="T5">판매자</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3" draw:style-name="gr23" draw:text-style-name="P14" xml:id="id14" draw:id="id14" draw:layer="layout" svg:width="3cm" svg:height="1cm" svg:x="7.636cm" svg:y="6.088cm">
          <text:p text:style-name="P11"><text:span text:style-name="T5">일반 </text:span><text:span text:style-name="T8"><text:s/></text:span><text:span text:style-name="T5">회원</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 draw:style-name="gr23" draw:text-style-name="P14" draw:layer="layout" svg:width="4cm" svg:height="1cm" svg:x="14.536cm" svg:y="3.063cm">
          <text:p text:style-name="P11"><text:span text:style-name="T5">아이디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 draw:style-name="gr23" draw:text-style-name="P14" draw:layer="layout" svg:width="4cm" svg:height="1cm" svg:x="14.536cm" svg:y="4.476cm">
          <text:p text:style-name="P11"><text:span text:style-name="T5">비밀번호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6" draw:style-name="gr23" draw:text-style-name="P14" draw:layer="layout" svg:width="4cm" svg:height="1cm" svg:x="14.536cm" svg:y="5.876cm">
          <text:p text:style-name="P11"><text:span text:style-name="T5">비밀번호 확인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7" draw:style-name="gr23" draw:text-style-name="P14" draw:layer="layout" svg:width="4cm" svg:height="1cm" svg:x="14.536cm" svg:y="7.376cm">
          <text:p text:style-name="P11"><text:span text:style-name="T5">이름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8" draw:style-name="gr23" draw:text-style-name="P14" draw:layer="layout" svg:width="4cm" svg:height="1cm" svg:x="14.536cm" svg:y="8.776cm">
          <text:p text:style-name="P11"><text:span text:style-name="T5">생년월일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9" draw:style-name="gr23" draw:text-style-name="P14" draw:layer="layout" svg:width="4cm" svg:height="1cm" svg:x="14.536cm" svg:y="10.176cm">
          <text:p text:style-name="P11"><text:span text:style-name="T5">이메일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0" draw:style-name="gr23" draw:text-style-name="P14" draw:layer="layout" svg:width="4cm" svg:height="1cm" svg:x="14.536cm" svg:y="11.576cm">
          <text:p text:style-name="P11"><text:span text:style-name="T5">기수 번호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 draw:style-name="gr23" draw:text-style-name="P14" draw:layer="layout" svg:width="4cm" svg:height="1cm" svg:x="14.536cm" svg:y="13.076cm">
          <text:p text:style-name="P11"><text:span text:style-name="T5">캡차 </text:span><text:span text:style-name="T8">API</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2" draw:style-name="gr23" draw:text-style-name="P14" xml:id="id16" draw:id="id16" draw:layer="layout" svg:width="3cm" svg:height="1cm" svg:x="23.336cm" svg:y="8.363cm">
          <text:p text:style-name="P11"><text:span text:style-name="T5">가입 완료</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24" draw:style-name="gr38" draw:text-style-name="P27" draw:layer="layout" svg:width="7.038cm" svg:height="1.25cm" svg:x="0.462cm" svg:y="2.675cm">
          <text:p text:style-name="P11"><text:span text:style-name="T10">일반 회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name="연결선: 꺾임 29" draw:style-name="gr43" draw:text-style-name="P1" draw:layer="layout" svg:x1="4.136cm" svg:y1="9.076cm" svg:x2="7.636cm" svg:y2="6.588cm" draw:start-shape="id13" draw:start-glue-point="1" draw:end-shape="id14" draw:end-glue-point="3" svg:d="M4136 9076h1751v-2488h1749" svg:viewBox="0 0 3501 2489">
          <text:p/>
        </draw:connector>
        <draw:connector draw:name="연결선: 꺾임 50" draw:style-name="gr44" draw:text-style-name="P1" draw:layer="layout" svg:x1="10.636cm" svg:y1="6.588cm" svg:x2="12.897cm" svg:y2="8.763cm" svg:d="M10636 6588h1131v2175h1130" svg:viewBox="0 0 2262 2176">
          <text:p/>
        </draw:connector>
        <draw:connector draw:name="직선 화살표 연결선 52" draw:style-name="gr45" draw:text-style-name="P1" draw:layer="layout" draw:type="line" svg:x1="19.8cm" svg:y1="8.904cm" svg:x2="23.336cm" svg:y2="8.863cm" draw:start-shape="id15" draw:start-glue-point="1" draw:end-shape="id16" draw:end-glue-point="3" svg:d="M19800 8904l3536-41" svg:viewBox="0 0 3537 42">
          <text:p/>
        </draw:connector>
        <draw:frame draw:name="TextBox 3" draw:style-name="gr15" draw:text-style-name="P17" draw:layer="layout" svg:width="3.298cm" svg:height="1.026cm" svg:x="0.181cm" svg:y="0.127cm">
          <draw:text-box>
            <text:p text:style-name="P16"><text:span text:style-name="T6">PROCESS</text:span></text:p>
          </draw:text-box>
        </draw:frame>
        <draw:custom-shape draw:name="양쪽 대괄호 1" draw:style-name="gr46" draw:text-style-name="P22" xml:id="id15" draw:id="id15" draw:layer="layout" svg:width="6.603cm" svg:height="9.192cm" svg:x="13.197cm" svg:y="4.308cm">
          <text:p/>
          <draw:enhanced-geometry svg:viewBox="0 0 21600 21600" draw:path-stretchpoint-x="21600" draw:path-stretchpoint-y="21600" draw:text-areas="?f15 ?f15 ?f16 ?f17" draw:type="non-primitive" draw:modifiers="16667"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9 * ?f11 / 100000"/>
            <draw:equation draw:name="f13" draw:formula="?f4 - ?f12"/>
            <draw:equation draw:name="f14" draw:formula="?f6 - ?f12"/>
            <draw:equation draw:name="f15" draw:formula="?f12 * 29289 / 100000"/>
            <draw:equation draw:name="f16" draw:formula="?f4 - ?f15"/>
            <draw:equation draw:name="f17" draw:formula="?f6 - ?f15"/>
            <draw:equation draw:name="f18" draw:formula="21550000 - ?f2"/>
            <draw:equation draw:name="f19" draw:formula="if(?f18, ?f2, 21550000)"/>
            <draw:equation draw:name="f20" draw:formula="-21550000 - ?f19"/>
            <draw:equation draw:name="f21" draw:formula="if(?f20, -21550000, ?f19)"/>
            <draw:equation draw:name="f22" draw:formula="?f1 + ?f21"/>
            <draw:equation draw:name="f23" draw:formula="?f1 + ?f2"/>
            <draw:equation draw:name="f24" draw:formula="?f23 * ?f10 / ?f1"/>
            <draw:equation draw:name="f25" draw:formula="0 - ?f24"/>
            <draw:equation draw:name="f26" draw:formula="cos(?f25)"/>
            <draw:equation draw:name="f27" draw:formula="0 - ?f26"/>
            <draw:equation draw:name="f28" draw:formula="?f27 * ?f12"/>
            <draw:equation draw:name="f29" draw:formula="sin(?f25)"/>
            <draw:equation draw:name="f30" draw:formula="0 - ?f29"/>
            <draw:equation draw:name="f31" draw:formula="?f30 * ?f12"/>
            <draw:equation draw:name="f32" draw:formula="sqrt(?f28 * ?f28 + ?f31 * ?f31 + 0 * 0)"/>
            <draw:equation draw:name="f33" draw:formula="?f12 * ?f12 / ?f32"/>
            <draw:equation draw:name="f34" draw:formula="?f30 * ?f33"/>
            <draw:equation draw:name="f35" draw:formula="?f3 - ?f34"/>
            <draw:equation draw:name="f36" draw:formula="?f27 * ?f33"/>
            <draw:equation draw:name="f37" draw:formula="?f12 - ?f36"/>
            <draw:equation draw:name="f38" draw:formula="?f35 - ?f12"/>
            <draw:equation draw:name="f39" draw:formula="?f37 - ?f12"/>
            <draw:equation draw:name="f40" draw:formula="?f35 + ?f12"/>
            <draw:equation draw:name="f41" draw:formula="?f37 + ?f12"/>
            <draw:equation draw:name="f42" draw:formula="?f22 + ?f2"/>
            <draw:equation draw:name="f43" draw:formula="?f42 * ?f10 / ?f1"/>
            <draw:equation draw:name="f44" draw:formula="0 - ?f43"/>
            <draw:equation draw:name="f45" draw:formula="cos(?f44)"/>
            <draw:equation draw:name="f46" draw:formula="0 - ?f45"/>
            <draw:equation draw:name="f47" draw:formula="?f46 * ?f12"/>
            <draw:equation draw:name="f48" draw:formula="sin(?f44)"/>
            <draw:equation draw:name="f49" draw:formula="0 - ?f48"/>
            <draw:equation draw:name="f50" draw:formula="?f49 * ?f12"/>
            <draw:equation draw:name="f51" draw:formula="sqrt(?f47 * ?f47 + ?f50 * ?f50 + 0 * 0)"/>
            <draw:equation draw:name="f52" draw:formula="?f12 * ?f12 / ?f51"/>
            <draw:equation draw:name="f53" draw:formula="?f49 * ?f52"/>
            <draw:equation draw:name="f54" draw:formula="?f35 + ?f53"/>
            <draw:equation draw:name="f55" draw:formula="?f46 * ?f52"/>
            <draw:equation draw:name="f56" draw:formula="?f37 + ?f55"/>
            <draw:equation draw:name="f57" draw:formula="if(?f21, ?f3, ?f38)"/>
            <draw:equation draw:name="f58" draw:formula="if(?f21, ?f12, ?f39)"/>
            <draw:equation draw:name="f59" draw:formula="if(?f21, ?f3, ?f40)"/>
            <draw:equation draw:name="f60" draw:formula="if(?f21, ?f12, ?f41)"/>
            <draw:equation draw:name="f61" draw:formula="if(?f21, ?f38, ?f54)"/>
            <draw:equation draw:name="f62" draw:formula="if(?f21, ?f39, ?f56)"/>
            <draw:equation draw:name="f63" draw:formula="if(?f21, ?f40, ?f54)"/>
            <draw:equation draw:name="f64" draw:formula="if(?f21, ?f41, ?f56)"/>
            <draw:equation draw:name="f65" draw:formula="?f0 + ?f21"/>
            <draw:equation draw:name="f66" draw:formula="?f0 + ?f2"/>
            <draw:equation draw:name="f67" draw:formula="?f66 * ?f10 / ?f1"/>
            <draw:equation draw:name="f68" draw:formula="0 - ?f67"/>
            <draw:equation draw:name="f69" draw:formula="cos(?f68)"/>
            <draw:equation draw:name="f70" draw:formula="0 - ?f69"/>
            <draw:equation draw:name="f71" draw:formula="?f70 * ?f12"/>
            <draw:equation draw:name="f72" draw:formula="sin(?f68)"/>
            <draw:equation draw:name="f73" draw:formula="0 - ?f72"/>
            <draw:equation draw:name="f74" draw:formula="?f73 * ?f12"/>
            <draw:equation draw:name="f75" draw:formula="sqrt(?f71 * ?f71 + ?f74 * ?f74 + 0 * 0)"/>
            <draw:equation draw:name="f76" draw:formula="?f12 * ?f12 / ?f75"/>
            <draw:equation draw:name="f77" draw:formula="?f73 * ?f76"/>
            <draw:equation draw:name="f78" draw:formula="?f13 - ?f77"/>
            <draw:equation draw:name="f79" draw:formula="?f70 * ?f76"/>
            <draw:equation draw:name="f80" draw:formula="?f5 - ?f79"/>
            <draw:equation draw:name="f81" draw:formula="?f78 - ?f12"/>
            <draw:equation draw:name="f82" draw:formula="?f80 - ?f12"/>
            <draw:equation draw:name="f83" draw:formula="?f78 + ?f12"/>
            <draw:equation draw:name="f84" draw:formula="?f80 + ?f12"/>
            <draw:equation draw:name="f85" draw:formula="?f65 + ?f2"/>
            <draw:equation draw:name="f86" draw:formula="?f85 * ?f10 / ?f1"/>
            <draw:equation draw:name="f87" draw:formula="0 - ?f86"/>
            <draw:equation draw:name="f88" draw:formula="cos(?f87)"/>
            <draw:equation draw:name="f89" draw:formula="0 - ?f88"/>
            <draw:equation draw:name="f90" draw:formula="?f89 * ?f12"/>
            <draw:equation draw:name="f91" draw:formula="sin(?f87)"/>
            <draw:equation draw:name="f92" draw:formula="0 - ?f91"/>
            <draw:equation draw:name="f93" draw:formula="?f92 * ?f12"/>
            <draw:equation draw:name="f94" draw:formula="sqrt(?f90 * ?f90 + ?f93 * ?f93 + 0 * 0)"/>
            <draw:equation draw:name="f95" draw:formula="?f12 * ?f12 / ?f94"/>
            <draw:equation draw:name="f96" draw:formula="?f92 * ?f95"/>
            <draw:equation draw:name="f97" draw:formula="?f78 + ?f96"/>
            <draw:equation draw:name="f98" draw:formula="?f89 * ?f95"/>
            <draw:equation draw:name="f99" draw:formula="?f80 + ?f98"/>
            <draw:equation draw:name="f100" draw:formula="if(?f21, ?f13, ?f81)"/>
            <draw:equation draw:name="f101" draw:formula="if(?f21, ?f5, ?f82)"/>
            <draw:equation draw:name="f102" draw:formula="if(?f21, ?f13, ?f83)"/>
            <draw:equation draw:name="f103" draw:formula="if(?f21, ?f5, ?f84)"/>
            <draw:equation draw:name="f104" draw:formula="if(?f21, ?f81, ?f97)"/>
            <draw:equation draw:name="f105" draw:formula="if(?f21, ?f82, ?f99)"/>
            <draw:equation draw:name="f106" draw:formula="if(?f21, ?f83, ?f97)"/>
            <draw:equation draw:name="f107" draw:formula="if(?f21, ?f84, ?f99)"/>
            <draw:equation draw:name="f108" draw:formula="0 + ?f21"/>
            <draw:equation draw:name="f109" draw:formula="0 + ?f2"/>
            <draw:equation draw:name="f110" draw:formula="?f109 * ?f10 / ?f1"/>
            <draw:equation draw:name="f111" draw:formula="0 - ?f110"/>
            <draw:equation draw:name="f112" draw:formula="cos(?f111)"/>
            <draw:equation draw:name="f113" draw:formula="0 - ?f112"/>
            <draw:equation draw:name="f114" draw:formula="?f113 * ?f12"/>
            <draw:equation draw:name="f115" draw:formula="sin(?f111)"/>
            <draw:equation draw:name="f116" draw:formula="0 - ?f115"/>
            <draw:equation draw:name="f117" draw:formula="?f116 * ?f12"/>
            <draw:equation draw:name="f118" draw:formula="sqrt(?f114 * ?f114 + ?f117 * ?f117 + 0 * 0)"/>
            <draw:equation draw:name="f119" draw:formula="?f12 * ?f12 / ?f118"/>
            <draw:equation draw:name="f120" draw:formula="?f116 * ?f119"/>
            <draw:equation draw:name="f121" draw:formula="?f4 - ?f120"/>
            <draw:equation draw:name="f122" draw:formula="?f113 * ?f119"/>
            <draw:equation draw:name="f123" draw:formula="?f14 - ?f122"/>
            <draw:equation draw:name="f124" draw:formula="?f121 - ?f12"/>
            <draw:equation draw:name="f125" draw:formula="?f123 - ?f12"/>
            <draw:equation draw:name="f126" draw:formula="?f121 + ?f12"/>
            <draw:equation draw:name="f127" draw:formula="?f123 + ?f12"/>
            <draw:equation draw:name="f128" draw:formula="?f108 + ?f2"/>
            <draw:equation draw:name="f129" draw:formula="?f128 * ?f10 / ?f1"/>
            <draw:equation draw:name="f130" draw:formula="0 - ?f129"/>
            <draw:equation draw:name="f131" draw:formula="cos(?f130)"/>
            <draw:equation draw:name="f132" draw:formula="0 - ?f131"/>
            <draw:equation draw:name="f133" draw:formula="?f132 * ?f12"/>
            <draw:equation draw:name="f134" draw:formula="sin(?f130)"/>
            <draw:equation draw:name="f135" draw:formula="0 - ?f134"/>
            <draw:equation draw:name="f136" draw:formula="?f135 * ?f12"/>
            <draw:equation draw:name="f137" draw:formula="sqrt(?f133 * ?f133 + ?f136 * ?f136 + 0 * 0)"/>
            <draw:equation draw:name="f138" draw:formula="?f12 * ?f12 / ?f137"/>
            <draw:equation draw:name="f139" draw:formula="?f135 * ?f138"/>
            <draw:equation draw:name="f140" draw:formula="?f121 + ?f139"/>
            <draw:equation draw:name="f141" draw:formula="?f132 * ?f138"/>
            <draw:equation draw:name="f142" draw:formula="?f123 + ?f141"/>
            <draw:equation draw:name="f143" draw:formula="if(?f21, ?f4, ?f124)"/>
            <draw:equation draw:name="f144" draw:formula="if(?f21, ?f14, ?f125)"/>
            <draw:equation draw:name="f145" draw:formula="if(?f21, ?f4, ?f126)"/>
            <draw:equation draw:name="f146" draw:formula="if(?f21, ?f14, ?f127)"/>
            <draw:equation draw:name="f147" draw:formula="if(?f21, ?f124, ?f140)"/>
            <draw:equation draw:name="f148" draw:formula="if(?f21, ?f125, ?f142)"/>
            <draw:equation draw:name="f149" draw:formula="if(?f21, ?f126, ?f140)"/>
            <draw:equation draw:name="f150" draw:formula="if(?f21, ?f127, ?f142)"/>
            <draw:equation draw:name="f151" draw:formula="?f2 + ?f21"/>
            <draw:equation draw:name="f152" draw:formula="?f2 + ?f2"/>
            <draw:equation draw:name="f153" draw:formula="?f152 * ?f10 / ?f1"/>
            <draw:equation draw:name="f154" draw:formula="0 - ?f153"/>
            <draw:equation draw:name="f155" draw:formula="cos(?f154)"/>
            <draw:equation draw:name="f156" draw:formula="0 - ?f155"/>
            <draw:equation draw:name="f157" draw:formula="?f156 * ?f12"/>
            <draw:equation draw:name="f158" draw:formula="sin(?f154)"/>
            <draw:equation draw:name="f159" draw:formula="0 - ?f158"/>
            <draw:equation draw:name="f160" draw:formula="?f159 * ?f12"/>
            <draw:equation draw:name="f161" draw:formula="sqrt(?f157 * ?f157 + ?f160 * ?f160 + 0 * 0)"/>
            <draw:equation draw:name="f162" draw:formula="?f12 * ?f12 / ?f161"/>
            <draw:equation draw:name="f163" draw:formula="?f159 * ?f162"/>
            <draw:equation draw:name="f164" draw:formula="?f12 - ?f163"/>
            <draw:equation draw:name="f165" draw:formula="?f156 * ?f162"/>
            <draw:equation draw:name="f166" draw:formula="?f6 - ?f165"/>
            <draw:equation draw:name="f167" draw:formula="?f164 - ?f12"/>
            <draw:equation draw:name="f168" draw:formula="?f166 - ?f12"/>
            <draw:equation draw:name="f169" draw:formula="?f164 + ?f12"/>
            <draw:equation draw:name="f170" draw:formula="?f166 + ?f12"/>
            <draw:equation draw:name="f171" draw:formula="?f151 + ?f2"/>
            <draw:equation draw:name="f172" draw:formula="?f171 * ?f10 / ?f1"/>
            <draw:equation draw:name="f173" draw:formula="0 - ?f172"/>
            <draw:equation draw:name="f174" draw:formula="cos(?f173)"/>
            <draw:equation draw:name="f175" draw:formula="0 - ?f174"/>
            <draw:equation draw:name="f176" draw:formula="?f175 * ?f12"/>
            <draw:equation draw:name="f177" draw:formula="sin(?f173)"/>
            <draw:equation draw:name="f178" draw:formula="0 - ?f177"/>
            <draw:equation draw:name="f179" draw:formula="?f178 * ?f12"/>
            <draw:equation draw:name="f180" draw:formula="sqrt(?f176 * ?f176 + ?f179 * ?f179 + 0 * 0)"/>
            <draw:equation draw:name="f181" draw:formula="?f12 * ?f12 / ?f180"/>
            <draw:equation draw:name="f182" draw:formula="?f178 * ?f181"/>
            <draw:equation draw:name="f183" draw:formula="?f164 + ?f182"/>
            <draw:equation draw:name="f184" draw:formula="?f175 * ?f181"/>
            <draw:equation draw:name="f185" draw:formula="?f166 + ?f184"/>
            <draw:equation draw:name="f186" draw:formula="if(?f21, ?f12, ?f167)"/>
            <draw:equation draw:name="f187" draw:formula="if(?f21, ?f6, ?f168)"/>
            <draw:equation draw:name="f188" draw:formula="if(?f21, ?f12, ?f169)"/>
            <draw:equation draw:name="f189" draw:formula="if(?f21, ?f6, ?f170)"/>
            <draw:equation draw:name="f190" draw:formula="if(?f21, ?f167, ?f183)"/>
            <draw:equation draw:name="f191" draw:formula="if(?f21, ?f168, ?f185)"/>
            <draw:equation draw:name="f192" draw:formula="if(?f21, ?f169, ?f183)"/>
            <draw:equation draw:name="f193" draw:formula="if(?f21, ?f170, ?f185)"/>
          </draw:enhanced-geometry>
        </draw:custom-shape>
        <draw:custom-shape draw:name="자유형: 도형 15" draw:style-name="gr30" draw:text-style-name="P14" draw:layer="layout" svg:width="5.324cm" svg:height="1cm" svg:x="19.136cm" svg:y="3.063cm">
          <text:p text:style-name="P11"><text:span text:style-name="T5">아이디 존재 시 경고 출력</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16" draw:style-name="gr30" draw:text-style-name="P14" draw:layer="layout" svg:width="5.324cm" svg:height="1cm" svg:x="19.136cm" svg:y="5.894cm">
          <text:p text:style-name="P11"><text:span text:style-name="T5">비밀번호 확인 틀릴 시 경고 출력</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16" draw:style-name="gr30" draw:text-style-name="P14" draw:layer="layout" svg:width="5.324cm" svg:height="2.349cm" svg:x="18.841cm" svg:y="10.901cm">
          <text:p text:style-name="P11"><text:span text:style-name="T15">생년월일</text:span><text:span text:style-name="T15">, </text:span><text:span text:style-name="T15">기수번호</text:span></text:p>
          <text:p text:style-name="P11"><text:span text:style-name="T15"><text:s/></text:span><text:span text:style-name="T15">다를 </text:span><text:span text:style-name="T16">시 경고 <text:s/>출력 </text:span></text:p>
          <draw:enhanced-geometry svg:viewBox="0 0 21600 21600" draw:path-stretchpoint-x="21600" draw:path-stretchpoint-y="21600" draw:text-areas="?f33 ?f37 ?f36 ?f40" draw:glue-points="?f21 ?f26 ?f20 ?f26 ?f20 ?f25 ?f21 ?f25" draw:type="non-primitive" draw:modifiers="37500" draw:enhanced-path="M ?f2 ?f8 L ?f33 ?f38 ?f20 ?f25 ?f34 ?f37 ?f11 ?f4 ?f35 ?f37 ?f21 ?f25 ?f36 ?f38 ?f3 ?f8 ?f36 ?f39 ?f21 ?f26 ?f35 ?f40 ?f11 ?f5 ?f34 ?f40 ?f20 ?f26 ?f33 ?f3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0"/>
            <draw:equation draw:name="f14" draw:formula="2700000 + ?f1"/>
            <draw:equation draw:name="f15" draw:formula="?f14 * ?f12 / ?f0"/>
            <draw:equation draw:name="f16" draw:formula="0 - ?f15"/>
            <draw:equation draw:name="f17" draw:formula="sin(?f16)"/>
            <draw:equation draw:name="f18" draw:formula="0 - ?f17"/>
            <draw:equation draw:name="f19" draw:formula="?f18 * ?f10"/>
            <draw:equation draw:name="f20" draw:formula="?f11 - ?f19"/>
            <draw:equation draw:name="f21" draw:formula="?f11 + ?f19"/>
            <draw:equation draw:name="f22" draw:formula="cos(?f16)"/>
            <draw:equation draw:name="f23" draw:formula="0 - ?f22"/>
            <draw:equation draw:name="f24" draw:formula="?f23 * ?f7"/>
            <draw:equation draw:name="f25" draw:formula="?f8 - ?f24"/>
            <draw:equation draw:name="f26" draw:formula="?f8 + ?f24"/>
            <draw:equation draw:name="f27" draw:formula="?f10 * ?f13 / 50000"/>
            <draw:equation draw:name="f28" draw:formula="?f7 * ?f13 / 50000"/>
            <draw:equation draw:name="f29" draw:formula="?f27 * 92388 / 100000"/>
            <draw:equation draw:name="f30" draw:formula="?f27 * 38268 / 100000"/>
            <draw:equation draw:name="f31" draw:formula="?f28 * 92388 / 100000"/>
            <draw:equation draw:name="f32" draw:formula="?f28 * 38268 / 100000"/>
            <draw:equation draw:name="f33" draw:formula="?f11 - ?f29"/>
            <draw:equation draw:name="f34" draw:formula="?f11 - ?f30"/>
            <draw:equation draw:name="f35" draw:formula="?f11 + ?f30"/>
            <draw:equation draw:name="f36" draw:formula="?f11 + ?f29"/>
            <draw:equation draw:name="f37" draw:formula="?f8 - ?f31"/>
            <draw:equation draw:name="f38" draw:formula="?f8 - ?f32"/>
            <draw:equation draw:name="f39" draw:formula="?f8 + ?f32"/>
            <draw:equation draw:name="f40" draw:formula="?f8 + ?f31"/>
          </draw:enhanced-geometry>
        </draw:custom-shape>
        <draw:custom-shape draw:style-name="gr19" draw:text-style-name="P18" draw:layer="layout" svg:width="27.5cm" svg:height="0.9cm" svg:x="0.3cm" svg:y="1.3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3cm">
          <draw:text-box>
            <text:p><text:span text:style-name="T7">프로세스 명</text:span></text:p>
          </draw:text-box>
        </draw:frame>
        <draw:frame draw:style-name="gr47" draw:text-style-name="P19" draw:layer="layout" svg:width="4.2cm" svg:height="1.267cm" svg:x="22.8cm" svg:y="1.17cm">
          <draw:text-box>
            <text:p><text:span text:style-name="T7">회원가입</text:span><text:span text:style-name="T7">(</text:span><text:span text:style-name="T7">일반 회원</text:span><text:span text:style-name="T7">)</text:span></text:p>
          </draw:text-box>
        </draw:frame>
        <draw:line draw:style-name="gr21" draw:text-style-name="P15" draw:layer="layout" svg:x1="14.1cm" svg:y1="1.3cm" svg:x2="14.1cm" svg:y2="2.2cm">
          <text:p/>
        </draw:line>
        <draw:line draw:style-name="gr21" draw:text-style-name="P15" draw:layer="layout" svg:x1="6.9cm" svg:y1="1.3cm" svg:x2="6.9cm" svg:y2="2.2cm">
          <text:p/>
        </draw:line>
        <draw:line draw:style-name="gr21" draw:text-style-name="P15" draw:layer="layout" svg:x1="21.5cm" svg:y1="1.3cm" svg:x2="21.5cm" svg:y2="2.2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3">
          <draw:frame draw:name="슬라이드 번호 개체 틀 6"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1" draw:style-name="gr10" draw:layer="layout" svg:width="19.786cm" svg:height="11.135cm" svg:x="0.604cm" svg:y="2.258cm" draw:page-number="5" presentation:class="page"/>
          <draw:frame draw:name="슬라이드 노트 개체 틀 2" presentation:style-name="pr1" draw:text-style-name="P21" draw:layer="layout" svg:width="16.799cm" svg:height="13.364cm" svg:x="2.1cm" svg:y="14.107cm" presentation:class="notes" presentation:placeholder="true">
            <draw:text-box/>
          </draw:frame>
        </presentation:notes>
      </draw:page>
      <draw:page draw:name="page6" draw:style-name="dp1" draw:master-page-name="Master2-Layout2-blank-빈-화면" presentation:presentation-page-layout-name="AL1T14">
        <draw:frame draw:name="그림 25"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1" draw:style-name="gr42" draw:text-style-name="P17" draw:layer="layout" svg:width="6.5cm" svg:height="1cm" svg:x="1cm" svg:y="14.5cm">
          <draw:text-box>
            <text:p/>
          </draw:text-box>
        </draw:frame>
        <draw:custom-shape draw:name="자유형: 도형 1" draw:style-name="gr23" draw:text-style-name="P14" draw:layer="layout" svg:width="2.568cm" svg:height="1cm" svg:x="1cm" svg:y="8cm">
          <text:p text:style-name="P11"><text:span text:style-name="T5">회원 가입</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2" draw:style-name="gr23" draw:text-style-name="P14" xml:id="id17" draw:id="id17" draw:layer="layout" svg:width="3cm" svg:height="1cm" svg:x="5.268cm" svg:y="6.425cm">
          <text:p text:style-name="P11"><text:span text:style-name="T5">판매자</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3" draw:style-name="gr23" draw:text-style-name="P14" draw:layer="layout" svg:width="3cm" svg:height="1cm" svg:x="5.268cm" svg:y="10.224cm">
          <text:p text:style-name="P11"><text:span text:style-name="T5">일반 </text:span><text:span text:style-name="T8"><text:s/></text:span><text:span text:style-name="T5">회원</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 draw:style-name="gr23" draw:text-style-name="P14" draw:layer="layout" svg:width="4cm" svg:height="1cm" svg:x="10.421cm" svg:y="4.934cm">
          <text:p text:style-name="P11"><text:span text:style-name="T5">아이디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 draw:style-name="gr23" draw:text-style-name="P14" draw:layer="layout" svg:width="4cm" svg:height="1cm" svg:x="10.421cm" svg:y="6.234cm">
          <text:p text:style-name="P11"><text:span text:style-name="T5">비밀번호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6" draw:style-name="gr23" draw:text-style-name="P14" draw:layer="layout" svg:width="4cm" svg:height="1cm" svg:x="10.421cm" svg:y="7.534cm">
          <text:p text:style-name="P11"><text:span text:style-name="T5">비밀번호 확인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7" draw:style-name="gr23" draw:text-style-name="P14" draw:layer="layout" svg:width="4cm" svg:height="1cm" svg:x="10.421cm" svg:y="8.834cm">
          <text:p text:style-name="P11"><text:span text:style-name="T5">이름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0" draw:style-name="gr23" draw:text-style-name="P14" draw:layer="layout" svg:width="4cm" svg:height="1cm" svg:x="10.421cm" svg:y="11.413cm">
          <text:p text:style-name="P11"><text:span text:style-name="T5">이메일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 draw:style-name="gr23" draw:text-style-name="P14" draw:layer="layout" svg:width="4cm" svg:height="1cm" svg:x="10.421cm" svg:y="12.813cm">
          <text:p text:style-name="P11"><text:span text:style-name="T5">캡차 </text:span><text:span text:style-name="T8">API</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2" draw:style-name="gr23" draw:text-style-name="P14" xml:id="id23" draw:id="id23" draw:layer="layout" svg:width="2.394cm" svg:height="1.085cm" svg:x="25.002cm" svg:y="7.744cm">
          <text:p text:style-name="P11"><text:span text:style-name="T5">가입 완료</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24" draw:style-name="gr38" draw:text-style-name="P27" draw:layer="layout" svg:width="7.038cm" svg:height="1.25cm" svg:x="0.462cm" svg:y="2.575cm">
          <text:p text:style-name="P11"><text:span text:style-name="T10">일반 회원</text:span><text:span text:style-name="T11">/ </text:span><text:span text:style-name="T10">판매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8" draw:style-name="gr23" draw:text-style-name="P14" draw:layer="layout" svg:width="4cm" svg:height="1cm" svg:x="10.421cm" svg:y="10.063cm">
          <text:p text:style-name="P11"><text:span text:style-name="T5">생년월일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name="연결선: 꺾임 31" draw:style-name="gr48" draw:text-style-name="P1" draw:layer="layout" svg:x1="3.568cm" svg:y1="8.55cm" svg:x2="5.268cm" svg:y2="6.947cm" svg:d="M3568 8550h850v-1603h850" svg:viewBox="0 0 1701 1604">
          <text:p/>
        </draw:connector>
        <draw:connector draw:name="연결선: 꺾임 40" draw:style-name="gr49" draw:text-style-name="P1" draw:layer="layout" svg:x1="8.268cm" svg:y1="6.925cm" svg:x2="9.697cm" svg:y2="9.387cm" draw:start-shape="id17" draw:start-glue-point="1" draw:end-shape="id18" draw:end-glue-point="3" svg:d="M8268 6925h715v2462h714" svg:viewBox="0 0 1430 2463">
          <text:p/>
        </draw:connector>
        <draw:frame draw:name="TextBox 41" draw:style-name="gr50" draw:text-style-name="P17" draw:layer="layout" svg:width="2.991cm" svg:height="0.769cm" svg:x="10.938cm" svg:y="3.906cm">
          <draw:text-box>
            <text:p text:style-name="P16"><text:span text:style-name="T17">1</text:span><text:span text:style-name="T17">차 일반가입</text:span></text:p>
          </draw:text-box>
        </draw:frame>
        <draw:custom-shape draw:name="자유형: 도형 4" draw:style-name="gr23" draw:text-style-name="P14" xml:id="id19" draw:id="id19" draw:layer="layout" svg:width="4cm" svg:height="1.914cm" svg:x="18.172cm" svg:y="3.75cm">
          <text:p text:style-name="P11"><text:span text:style-name="T9">사업자 정보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52" draw:style-name="gr51" draw:text-style-name="P17" draw:layer="layout" svg:width="3.711cm" svg:height="0.769cm" svg:x="18.643cm" svg:y="2.939cm">
          <draw:text-box>
            <text:p text:style-name="P16"><text:span text:style-name="T17">2</text:span><text:span text:style-name="T17">차 인증 <text:s/>페이지</text:span></text:p>
          </draw:text-box>
        </draw:frame>
        <draw:custom-shape draw:name="자유형: 도형 4" draw:style-name="gr23" draw:text-style-name="P14" xml:id="id20" draw:id="id20" draw:layer="layout" svg:width="4cm" svg:height="1.914cm" svg:x="18.172cm" svg:y="6.662cm">
          <text:p text:style-name="P11"><text:span text:style-name="T9">가게 정보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 draw:style-name="gr23" draw:text-style-name="P14" xml:id="id21" draw:id="id21" draw:layer="layout" svg:width="4cm" svg:height="1.914cm" svg:x="18.172cm" svg:y="9.568cm">
          <text:p text:style-name="P11"><text:span text:style-name="T9">운영 정보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 draw:style-name="gr23" draw:text-style-name="P14" xml:id="id22" draw:id="id22" draw:layer="layout" svg:width="4cm" svg:height="1.914cm" svg:x="18.172cm" svg:y="12.586cm">
          <text:p text:style-name="P11"><text:span text:style-name="T18">완료 대기 창 </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양쪽 대괄호 66" draw:style-name="gr52" draw:text-style-name="P22" xml:id="id18" draw:id="id18" draw:layer="layout" svg:width="5.574cm" svg:height="9.192cm" svg:x="9.697cm" svg:y="4.791cm">
          <text:p/>
          <draw:enhanced-geometry svg:viewBox="0 0 21600 21600" draw:path-stretchpoint-x="21600" draw:path-stretchpoint-y="21600" draw:text-areas="?f15 ?f15 ?f16 ?f17" draw:type="non-primitive" draw:modifiers="16667"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9 * ?f11 / 100000"/>
            <draw:equation draw:name="f13" draw:formula="?f4 - ?f12"/>
            <draw:equation draw:name="f14" draw:formula="?f6 - ?f12"/>
            <draw:equation draw:name="f15" draw:formula="?f12 * 29289 / 100000"/>
            <draw:equation draw:name="f16" draw:formula="?f4 - ?f15"/>
            <draw:equation draw:name="f17" draw:formula="?f6 - ?f15"/>
            <draw:equation draw:name="f18" draw:formula="21550000 - ?f2"/>
            <draw:equation draw:name="f19" draw:formula="if(?f18, ?f2, 21550000)"/>
            <draw:equation draw:name="f20" draw:formula="-21550000 - ?f19"/>
            <draw:equation draw:name="f21" draw:formula="if(?f20, -21550000, ?f19)"/>
            <draw:equation draw:name="f22" draw:formula="?f1 + ?f21"/>
            <draw:equation draw:name="f23" draw:formula="?f1 + ?f2"/>
            <draw:equation draw:name="f24" draw:formula="?f23 * ?f10 / ?f1"/>
            <draw:equation draw:name="f25" draw:formula="0 - ?f24"/>
            <draw:equation draw:name="f26" draw:formula="cos(?f25)"/>
            <draw:equation draw:name="f27" draw:formula="0 - ?f26"/>
            <draw:equation draw:name="f28" draw:formula="?f27 * ?f12"/>
            <draw:equation draw:name="f29" draw:formula="sin(?f25)"/>
            <draw:equation draw:name="f30" draw:formula="0 - ?f29"/>
            <draw:equation draw:name="f31" draw:formula="?f30 * ?f12"/>
            <draw:equation draw:name="f32" draw:formula="sqrt(?f28 * ?f28 + ?f31 * ?f31 + 0 * 0)"/>
            <draw:equation draw:name="f33" draw:formula="?f12 * ?f12 / ?f32"/>
            <draw:equation draw:name="f34" draw:formula="?f30 * ?f33"/>
            <draw:equation draw:name="f35" draw:formula="?f3 - ?f34"/>
            <draw:equation draw:name="f36" draw:formula="?f27 * ?f33"/>
            <draw:equation draw:name="f37" draw:formula="?f12 - ?f36"/>
            <draw:equation draw:name="f38" draw:formula="?f35 - ?f12"/>
            <draw:equation draw:name="f39" draw:formula="?f37 - ?f12"/>
            <draw:equation draw:name="f40" draw:formula="?f35 + ?f12"/>
            <draw:equation draw:name="f41" draw:formula="?f37 + ?f12"/>
            <draw:equation draw:name="f42" draw:formula="?f22 + ?f2"/>
            <draw:equation draw:name="f43" draw:formula="?f42 * ?f10 / ?f1"/>
            <draw:equation draw:name="f44" draw:formula="0 - ?f43"/>
            <draw:equation draw:name="f45" draw:formula="cos(?f44)"/>
            <draw:equation draw:name="f46" draw:formula="0 - ?f45"/>
            <draw:equation draw:name="f47" draw:formula="?f46 * ?f12"/>
            <draw:equation draw:name="f48" draw:formula="sin(?f44)"/>
            <draw:equation draw:name="f49" draw:formula="0 - ?f48"/>
            <draw:equation draw:name="f50" draw:formula="?f49 * ?f12"/>
            <draw:equation draw:name="f51" draw:formula="sqrt(?f47 * ?f47 + ?f50 * ?f50 + 0 * 0)"/>
            <draw:equation draw:name="f52" draw:formula="?f12 * ?f12 / ?f51"/>
            <draw:equation draw:name="f53" draw:formula="?f49 * ?f52"/>
            <draw:equation draw:name="f54" draw:formula="?f35 + ?f53"/>
            <draw:equation draw:name="f55" draw:formula="?f46 * ?f52"/>
            <draw:equation draw:name="f56" draw:formula="?f37 + ?f55"/>
            <draw:equation draw:name="f57" draw:formula="if(?f21, ?f3, ?f38)"/>
            <draw:equation draw:name="f58" draw:formula="if(?f21, ?f12, ?f39)"/>
            <draw:equation draw:name="f59" draw:formula="if(?f21, ?f3, ?f40)"/>
            <draw:equation draw:name="f60" draw:formula="if(?f21, ?f12, ?f41)"/>
            <draw:equation draw:name="f61" draw:formula="if(?f21, ?f38, ?f54)"/>
            <draw:equation draw:name="f62" draw:formula="if(?f21, ?f39, ?f56)"/>
            <draw:equation draw:name="f63" draw:formula="if(?f21, ?f40, ?f54)"/>
            <draw:equation draw:name="f64" draw:formula="if(?f21, ?f41, ?f56)"/>
            <draw:equation draw:name="f65" draw:formula="?f0 + ?f21"/>
            <draw:equation draw:name="f66" draw:formula="?f0 + ?f2"/>
            <draw:equation draw:name="f67" draw:formula="?f66 * ?f10 / ?f1"/>
            <draw:equation draw:name="f68" draw:formula="0 - ?f67"/>
            <draw:equation draw:name="f69" draw:formula="cos(?f68)"/>
            <draw:equation draw:name="f70" draw:formula="0 - ?f69"/>
            <draw:equation draw:name="f71" draw:formula="?f70 * ?f12"/>
            <draw:equation draw:name="f72" draw:formula="sin(?f68)"/>
            <draw:equation draw:name="f73" draw:formula="0 - ?f72"/>
            <draw:equation draw:name="f74" draw:formula="?f73 * ?f12"/>
            <draw:equation draw:name="f75" draw:formula="sqrt(?f71 * ?f71 + ?f74 * ?f74 + 0 * 0)"/>
            <draw:equation draw:name="f76" draw:formula="?f12 * ?f12 / ?f75"/>
            <draw:equation draw:name="f77" draw:formula="?f73 * ?f76"/>
            <draw:equation draw:name="f78" draw:formula="?f13 - ?f77"/>
            <draw:equation draw:name="f79" draw:formula="?f70 * ?f76"/>
            <draw:equation draw:name="f80" draw:formula="?f5 - ?f79"/>
            <draw:equation draw:name="f81" draw:formula="?f78 - ?f12"/>
            <draw:equation draw:name="f82" draw:formula="?f80 - ?f12"/>
            <draw:equation draw:name="f83" draw:formula="?f78 + ?f12"/>
            <draw:equation draw:name="f84" draw:formula="?f80 + ?f12"/>
            <draw:equation draw:name="f85" draw:formula="?f65 + ?f2"/>
            <draw:equation draw:name="f86" draw:formula="?f85 * ?f10 / ?f1"/>
            <draw:equation draw:name="f87" draw:formula="0 - ?f86"/>
            <draw:equation draw:name="f88" draw:formula="cos(?f87)"/>
            <draw:equation draw:name="f89" draw:formula="0 - ?f88"/>
            <draw:equation draw:name="f90" draw:formula="?f89 * ?f12"/>
            <draw:equation draw:name="f91" draw:formula="sin(?f87)"/>
            <draw:equation draw:name="f92" draw:formula="0 - ?f91"/>
            <draw:equation draw:name="f93" draw:formula="?f92 * ?f12"/>
            <draw:equation draw:name="f94" draw:formula="sqrt(?f90 * ?f90 + ?f93 * ?f93 + 0 * 0)"/>
            <draw:equation draw:name="f95" draw:formula="?f12 * ?f12 / ?f94"/>
            <draw:equation draw:name="f96" draw:formula="?f92 * ?f95"/>
            <draw:equation draw:name="f97" draw:formula="?f78 + ?f96"/>
            <draw:equation draw:name="f98" draw:formula="?f89 * ?f95"/>
            <draw:equation draw:name="f99" draw:formula="?f80 + ?f98"/>
            <draw:equation draw:name="f100" draw:formula="if(?f21, ?f13, ?f81)"/>
            <draw:equation draw:name="f101" draw:formula="if(?f21, ?f5, ?f82)"/>
            <draw:equation draw:name="f102" draw:formula="if(?f21, ?f13, ?f83)"/>
            <draw:equation draw:name="f103" draw:formula="if(?f21, ?f5, ?f84)"/>
            <draw:equation draw:name="f104" draw:formula="if(?f21, ?f81, ?f97)"/>
            <draw:equation draw:name="f105" draw:formula="if(?f21, ?f82, ?f99)"/>
            <draw:equation draw:name="f106" draw:formula="if(?f21, ?f83, ?f97)"/>
            <draw:equation draw:name="f107" draw:formula="if(?f21, ?f84, ?f99)"/>
            <draw:equation draw:name="f108" draw:formula="0 + ?f21"/>
            <draw:equation draw:name="f109" draw:formula="0 + ?f2"/>
            <draw:equation draw:name="f110" draw:formula="?f109 * ?f10 / ?f1"/>
            <draw:equation draw:name="f111" draw:formula="0 - ?f110"/>
            <draw:equation draw:name="f112" draw:formula="cos(?f111)"/>
            <draw:equation draw:name="f113" draw:formula="0 - ?f112"/>
            <draw:equation draw:name="f114" draw:formula="?f113 * ?f12"/>
            <draw:equation draw:name="f115" draw:formula="sin(?f111)"/>
            <draw:equation draw:name="f116" draw:formula="0 - ?f115"/>
            <draw:equation draw:name="f117" draw:formula="?f116 * ?f12"/>
            <draw:equation draw:name="f118" draw:formula="sqrt(?f114 * ?f114 + ?f117 * ?f117 + 0 * 0)"/>
            <draw:equation draw:name="f119" draw:formula="?f12 * ?f12 / ?f118"/>
            <draw:equation draw:name="f120" draw:formula="?f116 * ?f119"/>
            <draw:equation draw:name="f121" draw:formula="?f4 - ?f120"/>
            <draw:equation draw:name="f122" draw:formula="?f113 * ?f119"/>
            <draw:equation draw:name="f123" draw:formula="?f14 - ?f122"/>
            <draw:equation draw:name="f124" draw:formula="?f121 - ?f12"/>
            <draw:equation draw:name="f125" draw:formula="?f123 - ?f12"/>
            <draw:equation draw:name="f126" draw:formula="?f121 + ?f12"/>
            <draw:equation draw:name="f127" draw:formula="?f123 + ?f12"/>
            <draw:equation draw:name="f128" draw:formula="?f108 + ?f2"/>
            <draw:equation draw:name="f129" draw:formula="?f128 * ?f10 / ?f1"/>
            <draw:equation draw:name="f130" draw:formula="0 - ?f129"/>
            <draw:equation draw:name="f131" draw:formula="cos(?f130)"/>
            <draw:equation draw:name="f132" draw:formula="0 - ?f131"/>
            <draw:equation draw:name="f133" draw:formula="?f132 * ?f12"/>
            <draw:equation draw:name="f134" draw:formula="sin(?f130)"/>
            <draw:equation draw:name="f135" draw:formula="0 - ?f134"/>
            <draw:equation draw:name="f136" draw:formula="?f135 * ?f12"/>
            <draw:equation draw:name="f137" draw:formula="sqrt(?f133 * ?f133 + ?f136 * ?f136 + 0 * 0)"/>
            <draw:equation draw:name="f138" draw:formula="?f12 * ?f12 / ?f137"/>
            <draw:equation draw:name="f139" draw:formula="?f135 * ?f138"/>
            <draw:equation draw:name="f140" draw:formula="?f121 + ?f139"/>
            <draw:equation draw:name="f141" draw:formula="?f132 * ?f138"/>
            <draw:equation draw:name="f142" draw:formula="?f123 + ?f141"/>
            <draw:equation draw:name="f143" draw:formula="if(?f21, ?f4, ?f124)"/>
            <draw:equation draw:name="f144" draw:formula="if(?f21, ?f14, ?f125)"/>
            <draw:equation draw:name="f145" draw:formula="if(?f21, ?f4, ?f126)"/>
            <draw:equation draw:name="f146" draw:formula="if(?f21, ?f14, ?f127)"/>
            <draw:equation draw:name="f147" draw:formula="if(?f21, ?f124, ?f140)"/>
            <draw:equation draw:name="f148" draw:formula="if(?f21, ?f125, ?f142)"/>
            <draw:equation draw:name="f149" draw:formula="if(?f21, ?f126, ?f140)"/>
            <draw:equation draw:name="f150" draw:formula="if(?f21, ?f127, ?f142)"/>
            <draw:equation draw:name="f151" draw:formula="?f2 + ?f21"/>
            <draw:equation draw:name="f152" draw:formula="?f2 + ?f2"/>
            <draw:equation draw:name="f153" draw:formula="?f152 * ?f10 / ?f1"/>
            <draw:equation draw:name="f154" draw:formula="0 - ?f153"/>
            <draw:equation draw:name="f155" draw:formula="cos(?f154)"/>
            <draw:equation draw:name="f156" draw:formula="0 - ?f155"/>
            <draw:equation draw:name="f157" draw:formula="?f156 * ?f12"/>
            <draw:equation draw:name="f158" draw:formula="sin(?f154)"/>
            <draw:equation draw:name="f159" draw:formula="0 - ?f158"/>
            <draw:equation draw:name="f160" draw:formula="?f159 * ?f12"/>
            <draw:equation draw:name="f161" draw:formula="sqrt(?f157 * ?f157 + ?f160 * ?f160 + 0 * 0)"/>
            <draw:equation draw:name="f162" draw:formula="?f12 * ?f12 / ?f161"/>
            <draw:equation draw:name="f163" draw:formula="?f159 * ?f162"/>
            <draw:equation draw:name="f164" draw:formula="?f12 - ?f163"/>
            <draw:equation draw:name="f165" draw:formula="?f156 * ?f162"/>
            <draw:equation draw:name="f166" draw:formula="?f6 - ?f165"/>
            <draw:equation draw:name="f167" draw:formula="?f164 - ?f12"/>
            <draw:equation draw:name="f168" draw:formula="?f166 - ?f12"/>
            <draw:equation draw:name="f169" draw:formula="?f164 + ?f12"/>
            <draw:equation draw:name="f170" draw:formula="?f166 + ?f12"/>
            <draw:equation draw:name="f171" draw:formula="?f151 + ?f2"/>
            <draw:equation draw:name="f172" draw:formula="?f171 * ?f10 / ?f1"/>
            <draw:equation draw:name="f173" draw:formula="0 - ?f172"/>
            <draw:equation draw:name="f174" draw:formula="cos(?f173)"/>
            <draw:equation draw:name="f175" draw:formula="0 - ?f174"/>
            <draw:equation draw:name="f176" draw:formula="?f175 * ?f12"/>
            <draw:equation draw:name="f177" draw:formula="sin(?f173)"/>
            <draw:equation draw:name="f178" draw:formula="0 - ?f177"/>
            <draw:equation draw:name="f179" draw:formula="?f178 * ?f12"/>
            <draw:equation draw:name="f180" draw:formula="sqrt(?f176 * ?f176 + ?f179 * ?f179 + 0 * 0)"/>
            <draw:equation draw:name="f181" draw:formula="?f12 * ?f12 / ?f180"/>
            <draw:equation draw:name="f182" draw:formula="?f178 * ?f181"/>
            <draw:equation draw:name="f183" draw:formula="?f164 + ?f182"/>
            <draw:equation draw:name="f184" draw:formula="?f175 * ?f181"/>
            <draw:equation draw:name="f185" draw:formula="?f166 + ?f184"/>
            <draw:equation draw:name="f186" draw:formula="if(?f21, ?f12, ?f167)"/>
            <draw:equation draw:name="f187" draw:formula="if(?f21, ?f6, ?f168)"/>
            <draw:equation draw:name="f188" draw:formula="if(?f21, ?f12, ?f169)"/>
            <draw:equation draw:name="f189" draw:formula="if(?f21, ?f6, ?f170)"/>
            <draw:equation draw:name="f190" draw:formula="if(?f21, ?f167, ?f183)"/>
            <draw:equation draw:name="f191" draw:formula="if(?f21, ?f168, ?f185)"/>
            <draw:equation draw:name="f192" draw:formula="if(?f21, ?f169, ?f183)"/>
            <draw:equation draw:name="f193" draw:formula="if(?f21, ?f170, ?f185)"/>
          </draw:enhanced-geometry>
        </draw:custom-shape>
        <draw:connector draw:name="연결선: 꺾임 81" draw:style-name="gr53" draw:text-style-name="P1" draw:layer="layout" svg:x1="15.271cm" svg:y1="9.387cm" svg:x2="18.172cm" svg:y2="4.707cm" draw:start-shape="id18" draw:start-glue-point="1" draw:end-shape="id19" draw:end-glue-point="3" svg:d="M15271 9387h1451v-4680h1450" svg:viewBox="0 0 2902 4681">
          <text:p/>
        </draw:connector>
        <draw:connector draw:name="직선 화살표 연결선 84" draw:style-name="gr54" draw:text-style-name="P1" draw:layer="layout" draw:type="line" svg:x1="20.172cm" svg:y1="5.664cm" svg:x2="20.172cm" svg:y2="6.662cm" draw:start-shape="id19" draw:start-glue-point="2" draw:end-shape="id20" draw:end-glue-point="0" svg:d="M20172 5664v998" svg:viewBox="0 0 1 999">
          <text:p/>
        </draw:connector>
        <draw:connector draw:name="직선 화살표 연결선 86" draw:style-name="gr55" draw:text-style-name="P1" draw:layer="layout" draw:type="line" svg:x1="20.172cm" svg:y1="8.576cm" svg:x2="20.172cm" svg:y2="9.568cm" draw:start-shape="id20" draw:start-glue-point="2" draw:end-shape="id21" draw:end-glue-point="0" svg:d="M20172 8576v992" svg:viewBox="0 0 1 993">
          <text:p/>
        </draw:connector>
        <draw:connector draw:name="직선 화살표 연결선 88" draw:style-name="gr56" draw:text-style-name="P1" draw:layer="layout" draw:type="line" svg:x1="20.172cm" svg:y1="11.482cm" svg:x2="20.172cm" svg:y2="12.586cm" draw:start-shape="id21" draw:start-glue-point="2" draw:end-shape="id22" draw:end-glue-point="0" svg:d="M20172 11482v1104" svg:viewBox="0 0 1 1105">
          <text:p/>
        </draw:connector>
        <draw:connector draw:name="연결선: 꺾임 90" draw:style-name="gr57" draw:text-style-name="P1" draw:layer="layout" svg:x1="22.172cm" svg:y1="13.543cm" svg:x2="25.002cm" svg:y2="8.286cm" draw:start-shape="id22" draw:start-glue-point="1" draw:end-shape="id23" draw:end-glue-point="3" svg:d="M22172 13543h1416v-5257h1414" svg:viewBox="0 0 2831 5258">
          <text:p/>
        </draw:connector>
        <draw:custom-shape draw:name="자유형: 도형 16" draw:style-name="gr30" draw:text-style-name="P14" draw:layer="layout" svg:width="2.85cm" svg:height="1.945cm" svg:x="13.88cm" svg:y="3.941cm">
          <text:p text:style-name="P11"><text:span text:style-name="T19">아이디 존재 시 </text:span></text:p>
          <text:p text:style-name="P11"><text:span text:style-name="T19">경고 출력</text:span></text:p>
          <draw:enhanced-geometry svg:viewBox="0 0 21600 21600" draw:path-stretchpoint-x="21600" draw:path-stretchpoint-y="21600" draw:text-areas="?f33 ?f37 ?f36 ?f40" draw:glue-points="?f21 ?f26 ?f20 ?f26 ?f20 ?f25 ?f21 ?f25" draw:type="non-primitive" draw:modifiers="37500" draw:enhanced-path="M ?f2 ?f8 L ?f33 ?f38 ?f20 ?f25 ?f34 ?f37 ?f11 ?f4 ?f35 ?f37 ?f21 ?f25 ?f36 ?f38 ?f3 ?f8 ?f36 ?f39 ?f21 ?f26 ?f35 ?f40 ?f11 ?f5 ?f34 ?f40 ?f20 ?f26 ?f33 ?f3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0"/>
            <draw:equation draw:name="f14" draw:formula="2700000 + ?f1"/>
            <draw:equation draw:name="f15" draw:formula="?f14 * ?f12 / ?f0"/>
            <draw:equation draw:name="f16" draw:formula="0 - ?f15"/>
            <draw:equation draw:name="f17" draw:formula="sin(?f16)"/>
            <draw:equation draw:name="f18" draw:formula="0 - ?f17"/>
            <draw:equation draw:name="f19" draw:formula="?f18 * ?f10"/>
            <draw:equation draw:name="f20" draw:formula="?f11 - ?f19"/>
            <draw:equation draw:name="f21" draw:formula="?f11 + ?f19"/>
            <draw:equation draw:name="f22" draw:formula="cos(?f16)"/>
            <draw:equation draw:name="f23" draw:formula="0 - ?f22"/>
            <draw:equation draw:name="f24" draw:formula="?f23 * ?f7"/>
            <draw:equation draw:name="f25" draw:formula="?f8 - ?f24"/>
            <draw:equation draw:name="f26" draw:formula="?f8 + ?f24"/>
            <draw:equation draw:name="f27" draw:formula="?f10 * ?f13 / 50000"/>
            <draw:equation draw:name="f28" draw:formula="?f7 * ?f13 / 50000"/>
            <draw:equation draw:name="f29" draw:formula="?f27 * 92388 / 100000"/>
            <draw:equation draw:name="f30" draw:formula="?f27 * 38268 / 100000"/>
            <draw:equation draw:name="f31" draw:formula="?f28 * 92388 / 100000"/>
            <draw:equation draw:name="f32" draw:formula="?f28 * 38268 / 100000"/>
            <draw:equation draw:name="f33" draw:formula="?f11 - ?f29"/>
            <draw:equation draw:name="f34" draw:formula="?f11 - ?f30"/>
            <draw:equation draw:name="f35" draw:formula="?f11 + ?f30"/>
            <draw:equation draw:name="f36" draw:formula="?f11 + ?f29"/>
            <draw:equation draw:name="f37" draw:formula="?f8 - ?f31"/>
            <draw:equation draw:name="f38" draw:formula="?f8 - ?f32"/>
            <draw:equation draw:name="f39" draw:formula="?f8 + ?f32"/>
            <draw:equation draw:name="f40" draw:formula="?f8 + ?f31"/>
          </draw:enhanced-geometry>
        </draw:custom-shape>
        <draw:custom-shape draw:name="자유형: 도형 17" draw:style-name="gr30" draw:text-style-name="P14" draw:layer="layout" svg:width="3.464cm" svg:height="1.914cm" svg:x="13.964cm" svg:y="6.496cm">
          <text:p text:style-name="P11"><text:span text:style-name="T19">비밀번호 확인 틀릴 </text:span></text:p>
          <text:p text:style-name="P11"><text:span text:style-name="T19">시 경고 출력</text:span></text:p>
          <draw:enhanced-geometry svg:viewBox="0 0 21600 21600" draw:path-stretchpoint-x="21600" draw:path-stretchpoint-y="21600" draw:text-areas="?f35 ?f43 ?f38 ?f45" draw:glue-points="?f24 ?f26 ?f25 ?f27 ?f23 ?f28 ?f22 ?f28 ?f20 ?f27 ?f21 ?f26" draw:type="non-primitive" draw:modifiers="34601 0 0" draw:enhanced-path="M ?f20 ?f27 L ?f34 ?f44 ?f21 ?f26 ?f36 ?f43 ?f9 ?f2 ?f37 ?f43 ?f24 ?f26 ?f39 ?f44 ?f25 ?f27 ?f38 ?f45 ?f23 ?f28 ?f9 ?f46 ?f22 ?f28 ?f35 ?f45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custom-shape draw:name="자유형: 도형 17" draw:style-name="gr30" draw:text-style-name="P14" draw:layer="layout" svg:width="3.464cm" svg:height="1.914cm" svg:x="22.233cm" svg:y="10.267cm">
          <text:p text:style-name="P11"><text:span text:style-name="T20">관리자 검토 승인 후 </text:span></text:p>
          <text:p text:style-name="P11"><text:span text:style-name="T20">가입완료</text:span></text:p>
          <draw:enhanced-geometry svg:viewBox="0 0 21600 21600" draw:path-stretchpoint-x="21600" draw:path-stretchpoint-y="21600" draw:text-areas="?f35 ?f43 ?f38 ?f45" draw:glue-points="?f24 ?f26 ?f25 ?f27 ?f23 ?f28 ?f22 ?f28 ?f20 ?f27 ?f21 ?f26" draw:type="non-primitive" draw:modifiers="34601 0 0" draw:enhanced-path="M ?f20 ?f27 L ?f34 ?f44 ?f21 ?f26 ?f36 ?f43 ?f9 ?f2 ?f37 ?f43 ?f24 ?f26 ?f39 ?f44 ?f25 ?f27 ?f38 ?f45 ?f23 ?f28 ?f9 ?f46 ?f22 ?f28 ?f35 ?f45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frame draw:name="TextBox 4" draw:style-name="gr15" draw:text-style-name="P17" draw:layer="layout" svg:width="3.298cm" svg:height="1.026cm" svg:x="0.181cm" svg:y="0.127cm">
          <draw:text-box>
            <text:p text:style-name="P16"><text:span text:style-name="T6">PROCESS</text:span></text:p>
          </draw:text-box>
        </draw:frame>
        <draw:custom-shape draw:style-name="gr19" draw:text-style-name="P18" draw:layer="layout" svg:width="27.5cm" svg:height="0.9cm" svg:x="0.3cm" svg:y="1.301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4cm">
          <draw:text-box>
            <text:p><text:span text:style-name="T7">프로세스 명</text:span></text:p>
          </draw:text-box>
        </draw:frame>
        <draw:frame draw:style-name="gr47" draw:text-style-name="P19" draw:layer="layout" svg:width="4.2cm" svg:height="1.267cm" svg:x="22.8cm" svg:y="1.171cm">
          <draw:text-box>
            <text:p><text:span text:style-name="T7">회원가입</text:span><text:span text:style-name="T7">(</text:span><text:span text:style-name="T7">판매자</text:span><text:span text:style-name="T7">)</text:span></text:p>
          </draw:text-box>
        </draw:frame>
        <draw:line draw:style-name="gr21" draw:text-style-name="P15" draw:layer="layout" svg:x1="14.1cm" svg:y1="1.301cm" svg:x2="14.1cm" svg:y2="2.201cm">
          <text:p/>
        </draw:line>
        <draw:line draw:style-name="gr21" draw:text-style-name="P15" draw:layer="layout" svg:x1="6.9cm" svg:y1="1.301cm" svg:x2="6.9cm" svg:y2="2.201cm">
          <text:p/>
        </draw:line>
        <draw:line draw:style-name="gr21" draw:text-style-name="P15" draw:layer="layout" svg:x1="21.5cm" svg:y1="1.301cm" svg:x2="21.5cm" svg:y2="2.201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3">
          <draw:frame draw:name="슬라이드 번호 개체 틀 6"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1" draw:style-name="gr10" draw:layer="layout" svg:width="19.786cm" svg:height="11.135cm" svg:x="0.604cm" svg:y="2.258cm" draw:page-number="6" presentation:class="page"/>
          <draw:frame draw:name="슬라이드 노트 개체 틀 2" presentation:style-name="pr1" draw:text-style-name="P21" draw:layer="layout" svg:width="16.799cm" svg:height="13.364cm" svg:x="2.1cm" svg:y="14.107cm" presentation:class="notes" presentation:placeholder="true">
            <draw:text-box/>
          </draw:frame>
        </presentation:notes>
      </draw:page>
      <draw:page draw:name="page7" draw:style-name="dp1" draw:master-page-name="Master2-Layout2-blank-빈-화면" presentation:presentation-page-layout-name="AL1T14">
        <draw:frame draw:name="그림 28"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1" draw:style-name="gr2" draw:text-style-name="P17" draw:layer="layout" svg:width="6.5cm" svg:height="1cm" svg:x="1cm" svg:y="14.5cm">
          <draw:text-box>
            <text:p text:style-name="P25"><text:span text:style-name="T1"><text:date style:data-style-name="D1" text:date-value="2026-01-15">1/15/26</text:date></text:span></text:p>
          </draw:text-box>
        </draw:frame>
        <draw:frame draw:name="슬라이드 번호 개체 틀 3" draw:style-name="gr2" draw:text-style-name="P17" draw:layer="layout" svg:width="6.5cm" svg:height="1cm" svg:x="20.5cm" svg:y="14.5cm">
          <draw:text-box>
            <text:p text:style-name="P20"><text:span text:style-name="T1"><text:page-number>&lt;숫자&gt;</text:page-number></text:span></text:p>
          </draw:text-box>
        </draw:frame>
        <draw:custom-shape draw:name="자유형: 도형 1" draw:style-name="gr23" draw:text-style-name="P14" xml:id="id26" draw:id="id26" draw:layer="layout" svg:width="3cm" svg:height="1cm" svg:x="0.9cm" svg:y="8cm">
          <text:p text:style-name="P11"><text:span text:style-name="T21">마이 페이지</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2" draw:style-name="gr23" draw:text-style-name="P14" xml:id="id27" draw:id="id27" draw:layer="layout" svg:width="3cm" svg:height="1cm" svg:x="6cm" svg:y="8cm">
          <text:p text:style-name="P11"><text:span text:style-name="T21">커뮤니티</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3" draw:style-name="gr23" draw:text-style-name="P14" xml:id="id24" draw:id="id24" draw:layer="layout" svg:width="3cm" svg:height="1cm" svg:x="6.1cm" svg:y="11.5cm">
          <text:p text:style-name="P11"><text:span text:style-name="T21">가게</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 draw:style-name="gr23" draw:text-style-name="P14" xml:id="id28" draw:id="id28" draw:layer="layout" svg:width="4cm" svg:height="1cm" svg:x="12.6cm" svg:y="4.3cm">
          <text:p text:style-name="P11"><text:span text:style-name="T21">회원 정보 조회</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 draw:style-name="gr23" draw:text-style-name="P14" xml:id="id25" draw:id="id25" draw:layer="layout" svg:width="3cm" svg:height="1cm" svg:x="6.1cm" svg:y="4.3cm">
          <text:p text:style-name="P11"><text:span text:style-name="T22"><text:s/></text:span><text:span text:style-name="T21">회원 정보</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직선 연결선 6" draw:style-name="gr58" draw:text-style-name="P26" draw:layer="layout" svg:width="3.5cm" svg:height="0.001cm" svg:x="9.1cm" svg:y="4.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0" draw:style-name="gr23" draw:text-style-name="P14" xml:id="id31" draw:id="id31" draw:layer="layout" svg:width="4cm" svg:height="1cm" svg:x="17.8cm" svg:y="6.8cm">
          <text:p text:style-name="P11"><text:span text:style-name="T21">비밀번호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 draw:style-name="gr59" draw:text-style-name="P23" xml:id="id33" draw:id="id33" draw:layer="layout" svg:width="4cm" svg:height="1cm" svg:x="17.8cm" svg:y="11.349cm">
          <text:p text:style-name="P11"><text:span text:style-name="T21">비밀번호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2" draw:style-name="gr23" draw:text-style-name="P14" xml:id="id29" draw:id="id29" draw:layer="layout" svg:width="4cm" svg:height="1cm" svg:x="12.6cm" svg:y="6.8cm">
          <text:p text:style-name="P11"><text:span text:style-name="T21">회원 정보 수정</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3" draw:style-name="gr23" draw:text-style-name="P14" xml:id="id30" draw:id="id30" draw:layer="layout" svg:width="4cm" svg:height="1cm" svg:x="12.6cm" svg:y="11.349cm">
          <text:p text:style-name="P11"><text:span text:style-name="T21">회원 탈퇴</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4" draw:style-name="gr23" draw:text-style-name="P14" xml:id="id32" draw:id="id32" draw:layer="layout" svg:width="4cm" svg:height="1cm" svg:x="23.1cm" svg:y="6.8cm">
          <text:p text:style-name="P11"><text:span text:style-name="T21">회원 기본 정보 수정</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5" draw:style-name="gr23" draw:text-style-name="P14" xml:id="id34" draw:id="id34" draw:layer="layout" svg:width="4cm" svg:height="1cm" svg:x="23.1cm" svg:y="11.349cm">
          <text:p text:style-name="P11"><text:span text:style-name="T21">회원탈퇴 화면 출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23" draw:style-name="gr60" draw:text-style-name="P12" draw:layer="layout" svg:width="4cm" svg:height="1.25cm" svg:x="0.5cm" svg:y="2.75cm">
          <text:p text:style-name="P11"><text:span text:style-name="T10">일반 회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27" draw:style-name="gr30" draw:text-style-name="P14" draw:layer="layout" svg:width="4.5cm" svg:height="2.5cm" svg:x="17.55cm" svg:y="8.418cm">
          <text:p text:style-name="P11"><text:span text:style-name="T5">입력 정보</text:span></text:p>
          <text:p text:style-name="P11"><text:span text:style-name="T5">불일치 시</text:span></text:p>
          <text:p text:style-name="P11"><text:span text:style-name="T5">경고창 출력</text:span></text:p>
          <draw:enhanced-geometry svg:viewBox="0 0 21600 21600" draw:text-areas="?f379 ?f415 ?f381 ?f416" draw:type="non-primitive" draw:modifiers="2500" draw:enhanced-path="M ?f383 ?f417 L ?f385 ?f418 ?f387 ?f419 ?f389 ?f420 ?f391 ?f421 ?f393 ?f422 ?f395 ?f423 ?f397 ?f424 ?f399 ?f425 ?f401 ?f426 ?f403 ?f427 ?f405 ?f428 ?f407 ?f429 ?f409 ?f430 ?f411 ?f431 ?f413 ?f432 ?f383 ?f417 Z N">
            <draw:equation draw:name="f0" draw:formula="10800000"/>
            <draw:equation draw:name="f1" draw:formula="5400000"/>
            <draw:equation draw:name="f2" draw:formula="left"/>
            <draw:equation draw:name="f3" draw:formula="right"/>
            <draw:equation draw:name="f4" draw:formula="?f3 - ?f2"/>
            <draw:equation draw:name="f5" draw:formula="5419351 / 1725033"/>
            <draw:equation draw:name="f6" draw:formula="?f4 / 21600"/>
            <draw:equation draw:name="f7" draw:formula="0"/>
            <draw:equation draw:name="f8" draw:formula="21600"/>
            <draw:equation draw:name="f9" draw:formula="10800 - 10800"/>
            <draw:equation draw:name="f10" draw:formula="0 - 10800"/>
            <draw:equation draw:name="f11" draw:formula="10800"/>
            <draw:equation draw:name="f12" draw:formula="?f5 / 180"/>
            <draw:equation draw:name="f13" draw:formula="$0"/>
            <draw:equation draw:name="f14" draw:formula="?f8 - ?f7"/>
            <draw:equation draw:name="f15" draw:formula="315 * ?f12"/>
            <draw:equation draw:name="f16" draw:formula="135 * ?f12"/>
            <draw:equation draw:name="f17" draw:formula="0 * ?f12"/>
            <draw:equation draw:name="f18" draw:formula="22 * ?f12"/>
            <draw:equation draw:name="f19" draw:formula="45 * ?f12"/>
            <draw:equation draw:name="f20" draw:formula="67 * ?f12"/>
            <draw:equation draw:name="f21" draw:formula="90 * ?f12"/>
            <draw:equation draw:name="f22" draw:formula="112 * ?f12"/>
            <draw:equation draw:name="f23" draw:formula="157 * ?f12"/>
            <draw:equation draw:name="f24" draw:formula="180 * ?f12"/>
            <draw:equation draw:name="f25" draw:formula="202 * ?f12"/>
            <draw:equation draw:name="f26" draw:formula="225 * ?f12"/>
            <draw:equation draw:name="f27" draw:formula="247 * ?f12"/>
            <draw:equation draw:name="f28" draw:formula="270 * ?f12"/>
            <draw:equation draw:name="f29" draw:formula="292 * ?f12"/>
            <draw:equation draw:name="f30" draw:formula="337 * ?f12"/>
            <draw:equation draw:name="f31" draw:formula="?f14 / 21600"/>
            <draw:equation draw:name="f32" draw:formula="?f13 - 10800"/>
            <draw:equation draw:name="f33" draw:formula="0 - ?f15"/>
            <draw:equation draw:name="f34" draw:formula="0 - ?f16"/>
            <draw:equation draw:name="f35" draw:formula="0 - ?f17"/>
            <draw:equation draw:name="f36" draw:formula="0 - ?f18"/>
            <draw:equation draw:name="f37" draw:formula="0 - ?f19"/>
            <draw:equation draw:name="f38" draw:formula="0 - ?f20"/>
            <draw:equation draw:name="f39" draw:formula="0 - ?f21"/>
            <draw:equation draw:name="f40" draw:formula="0 - ?f22"/>
            <draw:equation draw:name="f41" draw:formula="0 - ?f23"/>
            <draw:equation draw:name="f42" draw:formula="0 - ?f24"/>
            <draw:equation draw:name="f43" draw:formula="0 - ?f25"/>
            <draw:equation draw:name="f44" draw:formula="0 - ?f26"/>
            <draw:equation draw:name="f45" draw:formula="0 - ?f27"/>
            <draw:equation draw:name="f46" draw:formula="0 - ?f28"/>
            <draw:equation draw:name="f47" draw:formula="0 - ?f29"/>
            <draw:equation draw:name="f48" draw:formula="0 - ?f30"/>
            <draw:equation draw:name="f49" draw:formula="10800 * ?f31"/>
            <draw:equation draw:name="f50" draw:formula="?f33 * ?f0"/>
            <draw:equation draw:name="f51" draw:formula="?f34 * ?f0"/>
            <draw:equation draw:name="f52" draw:formula="?f35 * ?f0"/>
            <draw:equation draw:name="f53" draw:formula="?f36 * ?f0"/>
            <draw:equation draw:name="f54" draw:formula="?f37 * ?f0"/>
            <draw:equation draw:name="f55" draw:formula="?f38 * ?f0"/>
            <draw:equation draw:name="f56" draw:formula="?f39 * ?f0"/>
            <draw:equation draw:name="f57" draw:formula="?f40 * ?f0"/>
            <draw:equation draw:name="f58" draw:formula="?f41 * ?f0"/>
            <draw:equation draw:name="f59" draw:formula="?f42 * ?f0"/>
            <draw:equation draw:name="f60" draw:formula="?f43 * ?f0"/>
            <draw:equation draw:name="f61" draw:formula="?f44 * ?f0"/>
            <draw:equation draw:name="f62" draw:formula="?f45 * ?f0"/>
            <draw:equation draw:name="f63" draw:formula="?f46 * ?f0"/>
            <draw:equation draw:name="f64" draw:formula="?f47 * ?f0"/>
            <draw:equation draw:name="f65" draw:formula="?f48 * ?f0"/>
            <draw:equation draw:name="f66" draw:formula="?f50 / ?f5"/>
            <draw:equation draw:name="f67" draw:formula="?f51 / ?f5"/>
            <draw:equation draw:name="f68" draw:formula="?f52 / ?f5"/>
            <draw:equation draw:name="f69" draw:formula="?f53 / ?f5"/>
            <draw:equation draw:name="f70" draw:formula="?f54 / ?f5"/>
            <draw:equation draw:name="f71" draw:formula="?f55 / ?f5"/>
            <draw:equation draw:name="f72" draw:formula="?f56 / ?f5"/>
            <draw:equation draw:name="f73" draw:formula="?f57 / ?f5"/>
            <draw:equation draw:name="f74" draw:formula="?f58 / ?f5"/>
            <draw:equation draw:name="f75" draw:formula="?f59 / ?f5"/>
            <draw:equation draw:name="f76" draw:formula="?f60 / ?f5"/>
            <draw:equation draw:name="f77" draw:formula="?f61 / ?f5"/>
            <draw:equation draw:name="f78" draw:formula="?f62 / ?f5"/>
            <draw:equation draw:name="f79" draw:formula="?f63 / ?f5"/>
            <draw:equation draw:name="f80" draw:formula="?f64 / ?f5"/>
            <draw:equation draw:name="f81" draw:formula="?f65 / ?f5"/>
            <draw:equation draw:name="f82" draw:formula="?f49 / ?f31"/>
            <draw:equation draw:name="f83" draw:formula="?f66 - ?f1"/>
            <draw:equation draw:name="f84" draw:formula="?f67 - ?f1"/>
            <draw:equation draw:name="f85" draw:formula="?f68 - ?f1"/>
            <draw:equation draw:name="f86" draw:formula="?f69 - ?f1"/>
            <draw:equation draw:name="f87" draw:formula="?f70 - ?f1"/>
            <draw:equation draw:name="f88" draw:formula="?f71 - ?f1"/>
            <draw:equation draw:name="f89" draw:formula="?f72 - ?f1"/>
            <draw:equation draw:name="f90" draw:formula="?f73 - ?f1"/>
            <draw:equation draw:name="f91" draw:formula="?f74 - ?f1"/>
            <draw:equation draw:name="f92" draw:formula="?f75 - ?f1"/>
            <draw:equation draw:name="f93" draw:formula="?f76 - ?f1"/>
            <draw:equation draw:name="f94" draw:formula="?f77 - ?f1"/>
            <draw:equation draw:name="f95" draw:formula="?f78 - ?f1"/>
            <draw:equation draw:name="f96" draw:formula="?f79 - ?f1"/>
            <draw:equation draw:name="f97" draw:formula="?f80 - ?f1"/>
            <draw:equation draw:name="f98" draw:formula="?f81 - ?f1"/>
            <draw:equation draw:name="f99" draw:formula="?f83 + ?f1"/>
            <draw:equation draw:name="f100" draw:formula="?f99 * ?f5 / ?f0"/>
            <draw:equation draw:name="f101" draw:formula="0 - ?f100"/>
            <draw:equation draw:name="f102" draw:formula="cos(?f101)"/>
            <draw:equation draw:name="f103" draw:formula="0 - ?f102"/>
            <draw:equation draw:name="f104" draw:formula="?f103"/>
            <draw:equation draw:name="f105" draw:formula="sin(?f101)"/>
            <draw:equation draw:name="f106" draw:formula="0 - ?f105"/>
            <draw:equation draw:name="f107" draw:formula="?f106"/>
            <draw:equation draw:name="f108" draw:formula="?f84 + ?f1"/>
            <draw:equation draw:name="f109" draw:formula="?f108 * ?f5 / ?f0"/>
            <draw:equation draw:name="f110" draw:formula="0 - ?f109"/>
            <draw:equation draw:name="f111" draw:formula="cos(?f110)"/>
            <draw:equation draw:name="f112" draw:formula="0 - ?f111"/>
            <draw:equation draw:name="f113" draw:formula="?f112"/>
            <draw:equation draw:name="f114" draw:formula="sin(?f110)"/>
            <draw:equation draw:name="f115" draw:formula="0 - ?f114"/>
            <draw:equation draw:name="f116" draw:formula="?f115"/>
            <draw:equation draw:name="f117" draw:formula="?f85 + ?f1"/>
            <draw:equation draw:name="f118" draw:formula="?f117 * ?f5 / ?f0"/>
            <draw:equation draw:name="f119" draw:formula="0 - ?f118"/>
            <draw:equation draw:name="f120" draw:formula="cos(?f119)"/>
            <draw:equation draw:name="f121" draw:formula="0 - ?f120"/>
            <draw:equation draw:name="f122" draw:formula="?f121"/>
            <draw:equation draw:name="f123" draw:formula="sin(?f119)"/>
            <draw:equation draw:name="f124" draw:formula="0 - ?f123"/>
            <draw:equation draw:name="f125" draw:formula="?f124"/>
            <draw:equation draw:name="f126" draw:formula="?f86 + ?f1"/>
            <draw:equation draw:name="f127" draw:formula="?f126 * ?f5 / ?f0"/>
            <draw:equation draw:name="f128" draw:formula="0 - ?f127"/>
            <draw:equation draw:name="f129" draw:formula="cos(?f128)"/>
            <draw:equation draw:name="f130" draw:formula="0 - ?f129"/>
            <draw:equation draw:name="f131" draw:formula="?f130"/>
            <draw:equation draw:name="f132" draw:formula="sin(?f128)"/>
            <draw:equation draw:name="f133" draw:formula="0 - ?f132"/>
            <draw:equation draw:name="f134" draw:formula="?f133"/>
            <draw:equation draw:name="f135" draw:formula="?f87 + ?f1"/>
            <draw:equation draw:name="f136" draw:formula="?f135 * ?f5 / ?f0"/>
            <draw:equation draw:name="f137" draw:formula="0 - ?f136"/>
            <draw:equation draw:name="f138" draw:formula="cos(?f137)"/>
            <draw:equation draw:name="f139" draw:formula="0 - ?f138"/>
            <draw:equation draw:name="f140" draw:formula="?f139"/>
            <draw:equation draw:name="f141" draw:formula="sin(?f137)"/>
            <draw:equation draw:name="f142" draw:formula="0 - ?f141"/>
            <draw:equation draw:name="f143" draw:formula="?f142"/>
            <draw:equation draw:name="f144" draw:formula="?f88 + ?f1"/>
            <draw:equation draw:name="f145" draw:formula="?f144 * ?f5 / ?f0"/>
            <draw:equation draw:name="f146" draw:formula="0 - ?f145"/>
            <draw:equation draw:name="f147" draw:formula="cos(?f146)"/>
            <draw:equation draw:name="f148" draw:formula="0 - ?f147"/>
            <draw:equation draw:name="f149" draw:formula="?f148"/>
            <draw:equation draw:name="f150" draw:formula="sin(?f146)"/>
            <draw:equation draw:name="f151" draw:formula="0 - ?f150"/>
            <draw:equation draw:name="f152" draw:formula="?f151"/>
            <draw:equation draw:name="f153" draw:formula="?f89 + ?f1"/>
            <draw:equation draw:name="f154" draw:formula="?f153 * ?f5 / ?f0"/>
            <draw:equation draw:name="f155" draw:formula="0 - ?f154"/>
            <draw:equation draw:name="f156" draw:formula="cos(?f155)"/>
            <draw:equation draw:name="f157" draw:formula="0 - ?f156"/>
            <draw:equation draw:name="f158" draw:formula="?f157"/>
            <draw:equation draw:name="f159" draw:formula="sin(?f155)"/>
            <draw:equation draw:name="f160" draw:formula="0 - ?f159"/>
            <draw:equation draw:name="f161" draw:formula="?f160"/>
            <draw:equation draw:name="f162" draw:formula="?f90 + ?f1"/>
            <draw:equation draw:name="f163" draw:formula="?f162 * ?f5 / ?f0"/>
            <draw:equation draw:name="f164" draw:formula="0 - ?f163"/>
            <draw:equation draw:name="f165" draw:formula="cos(?f164)"/>
            <draw:equation draw:name="f166" draw:formula="0 - ?f165"/>
            <draw:equation draw:name="f167" draw:formula="?f166"/>
            <draw:equation draw:name="f168" draw:formula="sin(?f164)"/>
            <draw:equation draw:name="f169" draw:formula="0 - ?f168"/>
            <draw:equation draw:name="f170" draw:formula="?f169"/>
            <draw:equation draw:name="f171" draw:formula="?f91 + ?f1"/>
            <draw:equation draw:name="f172" draw:formula="?f171 * ?f5 / ?f0"/>
            <draw:equation draw:name="f173" draw:formula="0 - ?f172"/>
            <draw:equation draw:name="f174" draw:formula="cos(?f173)"/>
            <draw:equation draw:name="f175" draw:formula="0 - ?f174"/>
            <draw:equation draw:name="f176" draw:formula="?f175"/>
            <draw:equation draw:name="f177" draw:formula="sin(?f173)"/>
            <draw:equation draw:name="f178" draw:formula="0 - ?f177"/>
            <draw:equation draw:name="f179" draw:formula="?f178"/>
            <draw:equation draw:name="f180" draw:formula="?f92 + ?f1"/>
            <draw:equation draw:name="f181" draw:formula="?f180 * ?f5 / ?f0"/>
            <draw:equation draw:name="f182" draw:formula="0 - ?f181"/>
            <draw:equation draw:name="f183" draw:formula="cos(?f182)"/>
            <draw:equation draw:name="f184" draw:formula="0 - ?f183"/>
            <draw:equation draw:name="f185" draw:formula="?f184"/>
            <draw:equation draw:name="f186" draw:formula="sin(?f182)"/>
            <draw:equation draw:name="f187" draw:formula="0 - ?f186"/>
            <draw:equation draw:name="f188" draw:formula="?f187"/>
            <draw:equation draw:name="f189" draw:formula="?f93 + ?f1"/>
            <draw:equation draw:name="f190" draw:formula="?f189 * ?f5 / ?f0"/>
            <draw:equation draw:name="f191" draw:formula="0 - ?f190"/>
            <draw:equation draw:name="f192" draw:formula="cos(?f191)"/>
            <draw:equation draw:name="f193" draw:formula="0 - ?f192"/>
            <draw:equation draw:name="f194" draw:formula="?f193"/>
            <draw:equation draw:name="f195" draw:formula="sin(?f191)"/>
            <draw:equation draw:name="f196" draw:formula="0 - ?f195"/>
            <draw:equation draw:name="f197" draw:formula="?f196"/>
            <draw:equation draw:name="f198" draw:formula="?f94 + ?f1"/>
            <draw:equation draw:name="f199" draw:formula="?f198 * ?f5 / ?f0"/>
            <draw:equation draw:name="f200" draw:formula="0 - ?f199"/>
            <draw:equation draw:name="f201" draw:formula="cos(?f200)"/>
            <draw:equation draw:name="f202" draw:formula="0 - ?f201"/>
            <draw:equation draw:name="f203" draw:formula="?f202"/>
            <draw:equation draw:name="f204" draw:formula="sin(?f200)"/>
            <draw:equation draw:name="f205" draw:formula="0 - ?f204"/>
            <draw:equation draw:name="f206" draw:formula="?f205"/>
            <draw:equation draw:name="f207" draw:formula="?f95 + ?f1"/>
            <draw:equation draw:name="f208" draw:formula="?f207 * ?f5 / ?f0"/>
            <draw:equation draw:name="f209" draw:formula="0 - ?f208"/>
            <draw:equation draw:name="f210" draw:formula="cos(?f209)"/>
            <draw:equation draw:name="f211" draw:formula="0 - ?f210"/>
            <draw:equation draw:name="f212" draw:formula="?f211"/>
            <draw:equation draw:name="f213" draw:formula="sin(?f209)"/>
            <draw:equation draw:name="f214" draw:formula="0 - ?f213"/>
            <draw:equation draw:name="f215" draw:formula="?f214"/>
            <draw:equation draw:name="f216" draw:formula="?f96 + ?f1"/>
            <draw:equation draw:name="f217" draw:formula="?f216 * ?f5 / ?f0"/>
            <draw:equation draw:name="f218" draw:formula="0 - ?f217"/>
            <draw:equation draw:name="f219" draw:formula="cos(?f218)"/>
            <draw:equation draw:name="f220" draw:formula="0 - ?f219"/>
            <draw:equation draw:name="f221" draw:formula="?f220"/>
            <draw:equation draw:name="f222" draw:formula="sin(?f218)"/>
            <draw:equation draw:name="f223" draw:formula="0 - ?f222"/>
            <draw:equation draw:name="f224" draw:formula="?f223"/>
            <draw:equation draw:name="f225" draw:formula="?f97 + ?f1"/>
            <draw:equation draw:name="f226" draw:formula="?f225 * ?f5 / ?f0"/>
            <draw:equation draw:name="f227" draw:formula="0 - ?f226"/>
            <draw:equation draw:name="f228" draw:formula="cos(?f227)"/>
            <draw:equation draw:name="f229" draw:formula="0 - ?f228"/>
            <draw:equation draw:name="f230" draw:formula="?f229"/>
            <draw:equation draw:name="f231" draw:formula="sin(?f227)"/>
            <draw:equation draw:name="f232" draw:formula="0 - ?f231"/>
            <draw:equation draw:name="f233" draw:formula="?f232"/>
            <draw:equation draw:name="f234" draw:formula="?f98 + ?f1"/>
            <draw:equation draw:name="f235" draw:formula="?f234 * ?f5 / ?f0"/>
            <draw:equation draw:name="f236" draw:formula="0 - ?f235"/>
            <draw:equation draw:name="f237" draw:formula="cos(?f236)"/>
            <draw:equation draw:name="f238" draw:formula="0 - ?f237"/>
            <draw:equation draw:name="f239" draw:formula="?f238"/>
            <draw:equation draw:name="f240" draw:formula="sin(?f236)"/>
            <draw:equation draw:name="f241" draw:formula="0 - ?f240"/>
            <draw:equation draw:name="f242" draw:formula="?f241"/>
            <draw:equation draw:name="f243" draw:formula="0 - ?f104"/>
            <draw:equation draw:name="f244" draw:formula="0 - ?f107"/>
            <draw:equation draw:name="f245" draw:formula="0 - ?f113"/>
            <draw:equation draw:name="f246" draw:formula="0 - ?f116"/>
            <draw:equation draw:name="f247" draw:formula="0 - ?f122"/>
            <draw:equation draw:name="f248" draw:formula="0 - ?f125"/>
            <draw:equation draw:name="f249" draw:formula="0 - ?f131"/>
            <draw:equation draw:name="f250" draw:formula="0 - ?f134"/>
            <draw:equation draw:name="f251" draw:formula="0 - ?f140"/>
            <draw:equation draw:name="f252" draw:formula="0 - ?f143"/>
            <draw:equation draw:name="f253" draw:formula="0 - ?f149"/>
            <draw:equation draw:name="f254" draw:formula="0 - ?f152"/>
            <draw:equation draw:name="f255" draw:formula="0 - ?f158"/>
            <draw:equation draw:name="f256" draw:formula="0 - ?f161"/>
            <draw:equation draw:name="f257" draw:formula="0 - ?f167"/>
            <draw:equation draw:name="f258" draw:formula="0 - ?f170"/>
            <draw:equation draw:name="f259" draw:formula="0 - ?f176"/>
            <draw:equation draw:name="f260" draw:formula="0 - ?f179"/>
            <draw:equation draw:name="f261" draw:formula="0 - ?f185"/>
            <draw:equation draw:name="f262" draw:formula="0 - ?f188"/>
            <draw:equation draw:name="f263" draw:formula="0 - ?f194"/>
            <draw:equation draw:name="f264" draw:formula="0 - ?f197"/>
            <draw:equation draw:name="f265" draw:formula="0 - ?f203"/>
            <draw:equation draw:name="f266" draw:formula="0 - ?f206"/>
            <draw:equation draw:name="f267" draw:formula="0 - ?f212"/>
            <draw:equation draw:name="f268" draw:formula="0 - ?f215"/>
            <draw:equation draw:name="f269" draw:formula="0 - ?f221"/>
            <draw:equation draw:name="f270" draw:formula="0 - ?f224"/>
            <draw:equation draw:name="f271" draw:formula="0 - ?f230"/>
            <draw:equation draw:name="f272" draw:formula="0 - ?f233"/>
            <draw:equation draw:name="f273" draw:formula="0 - ?f239"/>
            <draw:equation draw:name="f274" draw:formula="0 - ?f242"/>
            <draw:equation draw:name="f275" draw:formula="?f243 * ?f32"/>
            <draw:equation draw:name="f276" draw:formula="?f244 * ?f9"/>
            <draw:equation draw:name="f277" draw:formula="?f244 * ?f32"/>
            <draw:equation draw:name="f278" draw:formula="?f243 * ?f9"/>
            <draw:equation draw:name="f279" draw:formula="?f245 * ?f32"/>
            <draw:equation draw:name="f280" draw:formula="?f246 * ?f9"/>
            <draw:equation draw:name="f281" draw:formula="?f246 * ?f32"/>
            <draw:equation draw:name="f282" draw:formula="?f245 * ?f9"/>
            <draw:equation draw:name="f283" draw:formula="?f247 * ?f10"/>
            <draw:equation draw:name="f284" draw:formula="?f248 * ?f9"/>
            <draw:equation draw:name="f285" draw:formula="?f248 * ?f10"/>
            <draw:equation draw:name="f286" draw:formula="?f247 * ?f9"/>
            <draw:equation draw:name="f287" draw:formula="?f249 * ?f32"/>
            <draw:equation draw:name="f288" draw:formula="?f250 * ?f9"/>
            <draw:equation draw:name="f289" draw:formula="?f250 * ?f32"/>
            <draw:equation draw:name="f290" draw:formula="?f249 * ?f9"/>
            <draw:equation draw:name="f291" draw:formula="?f251 * ?f10"/>
            <draw:equation draw:name="f292" draw:formula="?f252 * ?f9"/>
            <draw:equation draw:name="f293" draw:formula="?f252 * ?f10"/>
            <draw:equation draw:name="f294" draw:formula="?f251 * ?f9"/>
            <draw:equation draw:name="f295" draw:formula="?f253 * ?f32"/>
            <draw:equation draw:name="f296" draw:formula="?f254 * ?f9"/>
            <draw:equation draw:name="f297" draw:formula="?f254 * ?f32"/>
            <draw:equation draw:name="f298" draw:formula="?f253 * ?f9"/>
            <draw:equation draw:name="f299" draw:formula="?f255 * ?f10"/>
            <draw:equation draw:name="f300" draw:formula="?f256 * ?f9"/>
            <draw:equation draw:name="f301" draw:formula="?f256 * ?f10"/>
            <draw:equation draw:name="f302" draw:formula="?f255 * ?f9"/>
            <draw:equation draw:name="f303" draw:formula="?f257 * ?f32"/>
            <draw:equation draw:name="f304" draw:formula="?f258 * ?f9"/>
            <draw:equation draw:name="f305" draw:formula="?f258 * ?f32"/>
            <draw:equation draw:name="f306" draw:formula="?f257 * ?f9"/>
            <draw:equation draw:name="f307" draw:formula="?f245 * ?f10"/>
            <draw:equation draw:name="f308" draw:formula="?f246 * ?f10"/>
            <draw:equation draw:name="f309" draw:formula="?f259 * ?f32"/>
            <draw:equation draw:name="f310" draw:formula="?f260 * ?f9"/>
            <draw:equation draw:name="f311" draw:formula="?f260 * ?f32"/>
            <draw:equation draw:name="f312" draw:formula="?f259 * ?f9"/>
            <draw:equation draw:name="f313" draw:formula="?f261 * ?f10"/>
            <draw:equation draw:name="f314" draw:formula="?f262 * ?f9"/>
            <draw:equation draw:name="f315" draw:formula="?f262 * ?f10"/>
            <draw:equation draw:name="f316" draw:formula="?f261 * ?f9"/>
            <draw:equation draw:name="f317" draw:formula="?f263 * ?f32"/>
            <draw:equation draw:name="f318" draw:formula="?f264 * ?f9"/>
            <draw:equation draw:name="f319" draw:formula="?f264 * ?f32"/>
            <draw:equation draw:name="f320" draw:formula="?f263 * ?f9"/>
            <draw:equation draw:name="f321" draw:formula="?f265 * ?f10"/>
            <draw:equation draw:name="f322" draw:formula="?f266 * ?f9"/>
            <draw:equation draw:name="f323" draw:formula="?f266 * ?f10"/>
            <draw:equation draw:name="f324" draw:formula="?f265 * ?f9"/>
            <draw:equation draw:name="f325" draw:formula="?f267 * ?f32"/>
            <draw:equation draw:name="f326" draw:formula="?f268 * ?f9"/>
            <draw:equation draw:name="f327" draw:formula="?f268 * ?f32"/>
            <draw:equation draw:name="f328" draw:formula="?f267 * ?f9"/>
            <draw:equation draw:name="f329" draw:formula="?f269 * ?f10"/>
            <draw:equation draw:name="f330" draw:formula="?f270 * ?f9"/>
            <draw:equation draw:name="f331" draw:formula="?f270 * ?f10"/>
            <draw:equation draw:name="f332" draw:formula="?f269 * ?f9"/>
            <draw:equation draw:name="f333" draw:formula="?f271 * ?f32"/>
            <draw:equation draw:name="f334" draw:formula="?f272 * ?f9"/>
            <draw:equation draw:name="f335" draw:formula="?f272 * ?f32"/>
            <draw:equation draw:name="f336" draw:formula="?f271 * ?f9"/>
            <draw:equation draw:name="f337" draw:formula="?f243 * ?f10"/>
            <draw:equation draw:name="f338" draw:formula="?f244 * ?f10"/>
            <draw:equation draw:name="f339" draw:formula="?f273 * ?f32"/>
            <draw:equation draw:name="f340" draw:formula="?f274 * ?f9"/>
            <draw:equation draw:name="f341" draw:formula="?f274 * ?f32"/>
            <draw:equation draw:name="f342" draw:formula="?f273 * ?f9"/>
            <draw:equation draw:name="f343" draw:formula="?f275 + ?f276"/>
            <draw:equation draw:name="f344" draw:formula="?f277 - ?f278"/>
            <draw:equation draw:name="f345" draw:formula="?f279 + ?f280"/>
            <draw:equation draw:name="f346" draw:formula="?f281 - ?f282"/>
            <draw:equation draw:name="f347" draw:formula="?f283 + ?f284"/>
            <draw:equation draw:name="f348" draw:formula="?f285 - ?f286"/>
            <draw:equation draw:name="f349" draw:formula="?f287 + ?f288"/>
            <draw:equation draw:name="f350" draw:formula="?f289 - ?f290"/>
            <draw:equation draw:name="f351" draw:formula="?f291 + ?f292"/>
            <draw:equation draw:name="f352" draw:formula="?f293 - ?f294"/>
            <draw:equation draw:name="f353" draw:formula="?f295 + ?f296"/>
            <draw:equation draw:name="f354" draw:formula="?f297 - ?f298"/>
            <draw:equation draw:name="f355" draw:formula="?f299 + ?f300"/>
            <draw:equation draw:name="f356" draw:formula="?f301 - ?f302"/>
            <draw:equation draw:name="f357" draw:formula="?f303 + ?f304"/>
            <draw:equation draw:name="f358" draw:formula="?f305 - ?f306"/>
            <draw:equation draw:name="f359" draw:formula="?f307 + ?f280"/>
            <draw:equation draw:name="f360" draw:formula="?f308 - ?f282"/>
            <draw:equation draw:name="f361" draw:formula="?f309 + ?f310"/>
            <draw:equation draw:name="f362" draw:formula="?f311 - ?f312"/>
            <draw:equation draw:name="f363" draw:formula="?f313 + ?f314"/>
            <draw:equation draw:name="f364" draw:formula="?f315 - ?f316"/>
            <draw:equation draw:name="f365" draw:formula="?f317 + ?f318"/>
            <draw:equation draw:name="f366" draw:formula="?f319 - ?f320"/>
            <draw:equation draw:name="f367" draw:formula="?f321 + ?f322"/>
            <draw:equation draw:name="f368" draw:formula="?f323 - ?f324"/>
            <draw:equation draw:name="f369" draw:formula="?f325 + ?f326"/>
            <draw:equation draw:name="f370" draw:formula="?f327 - ?f328"/>
            <draw:equation draw:name="f371" draw:formula="?f329 + ?f330"/>
            <draw:equation draw:name="f372" draw:formula="?f331 - ?f332"/>
            <draw:equation draw:name="f373" draw:formula="?f333 + ?f334"/>
            <draw:equation draw:name="f374" draw:formula="?f335 - ?f336"/>
            <draw:equation draw:name="f375" draw:formula="?f337 + ?f276"/>
            <draw:equation draw:name="f376" draw:formula="?f338 - ?f278"/>
            <draw:equation draw:name="f377" draw:formula="?f339 + ?f340"/>
            <draw:equation draw:name="f378" draw:formula="?f341 - ?f342"/>
            <draw:equation draw:name="f379" draw:formula="?f343 + 10800"/>
            <draw:equation draw:name="f380" draw:formula="0 - ?f344"/>
            <draw:equation draw:name="f381" draw:formula="?f345 + 10800"/>
            <draw:equation draw:name="f382" draw:formula="0 - ?f346"/>
            <draw:equation draw:name="f383" draw:formula="?f347 + 10800"/>
            <draw:equation draw:name="f384" draw:formula="0 - ?f348"/>
            <draw:equation draw:name="f385" draw:formula="?f349 + 10800"/>
            <draw:equation draw:name="f386" draw:formula="0 - ?f350"/>
            <draw:equation draw:name="f387" draw:formula="?f351 + 10800"/>
            <draw:equation draw:name="f388" draw:formula="0 - ?f352"/>
            <draw:equation draw:name="f389" draw:formula="?f353 + 10800"/>
            <draw:equation draw:name="f390" draw:formula="0 - ?f354"/>
            <draw:equation draw:name="f391" draw:formula="?f355 + 10800"/>
            <draw:equation draw:name="f392" draw:formula="0 - ?f356"/>
            <draw:equation draw:name="f393" draw:formula="?f357 + 10800"/>
            <draw:equation draw:name="f394" draw:formula="0 - ?f358"/>
            <draw:equation draw:name="f395" draw:formula="?f359 + 10800"/>
            <draw:equation draw:name="f396" draw:formula="0 - ?f360"/>
            <draw:equation draw:name="f397" draw:formula="?f361 + 10800"/>
            <draw:equation draw:name="f398" draw:formula="0 - ?f362"/>
            <draw:equation draw:name="f399" draw:formula="?f363 + 10800"/>
            <draw:equation draw:name="f400" draw:formula="0 - ?f364"/>
            <draw:equation draw:name="f401" draw:formula="?f365 + 10800"/>
            <draw:equation draw:name="f402" draw:formula="0 - ?f366"/>
            <draw:equation draw:name="f403" draw:formula="?f367 + 10800"/>
            <draw:equation draw:name="f404" draw:formula="0 - ?f368"/>
            <draw:equation draw:name="f405" draw:formula="?f369 + 10800"/>
            <draw:equation draw:name="f406" draw:formula="0 - ?f370"/>
            <draw:equation draw:name="f407" draw:formula="?f371 + 10800"/>
            <draw:equation draw:name="f408" draw:formula="0 - ?f372"/>
            <draw:equation draw:name="f409" draw:formula="?f373 + 10800"/>
            <draw:equation draw:name="f410" draw:formula="0 - ?f374"/>
            <draw:equation draw:name="f411" draw:formula="?f375 + 10800"/>
            <draw:equation draw:name="f412" draw:formula="0 - ?f376"/>
            <draw:equation draw:name="f413" draw:formula="?f377 + 10800"/>
            <draw:equation draw:name="f414" draw:formula="0 - ?f378"/>
            <draw:equation draw:name="f415" draw:formula="?f380 + 10800"/>
            <draw:equation draw:name="f416" draw:formula="?f382 + 10800"/>
            <draw:equation draw:name="f417" draw:formula="?f384 + 10800"/>
            <draw:equation draw:name="f418" draw:formula="?f386 + 10800"/>
            <draw:equation draw:name="f419" draw:formula="?f388 + 10800"/>
            <draw:equation draw:name="f420" draw:formula="?f390 + 10800"/>
            <draw:equation draw:name="f421" draw:formula="?f392 + 10800"/>
            <draw:equation draw:name="f422" draw:formula="?f394 + 10800"/>
            <draw:equation draw:name="f423" draw:formula="?f396 + 10800"/>
            <draw:equation draw:name="f424" draw:formula="?f398 + 10800"/>
            <draw:equation draw:name="f425" draw:formula="?f400 + 10800"/>
            <draw:equation draw:name="f426" draw:formula="?f402 + 10800"/>
            <draw:equation draw:name="f427" draw:formula="?f404 + 10800"/>
            <draw:equation draw:name="f428" draw:formula="?f406 + 10800"/>
            <draw:equation draw:name="f429" draw:formula="?f408 + 10800"/>
            <draw:equation draw:name="f430" draw:formula="?f410 + 10800"/>
            <draw:equation draw:name="f431" draw:formula="?f412 + 10800"/>
            <draw:equation draw:name="f432" draw:formula="?f414 + 10800"/>
            <draw:equation draw:name="f433" draw:formula="$0 / ?f6"/>
            <draw:handle draw:handle-position="$0 ?f82" draw:handle-range-x-minimum="0" draw:handle-range-x-maximum="10800"/>
          </draw:enhanced-geometry>
        </draw:custom-shape>
        <draw:connector draw:style-name="gr61" draw:text-style-name="P6" draw:layer="layout" draw:line-skew="-0.582cm" svg:x1="6.1cm" svg:y1="12cm" svg:x2="6.1cm" svg:y2="4.8cm" draw:start-shape="id24" draw:start-glue-point="3" draw:end-shape="id25" draw:end-glue-point="3" svg:d="M6100 12000h-1100v-7200h1100" svg:viewBox="0 0 1101 7201">
          <text:p/>
        </draw:connector>
        <draw:connector draw:style-name="gr62" draw:text-style-name="P15" draw:layer="layout" draw:type="line" svg:x1="3.9cm" svg:y1="8.5cm" svg:x2="6cm" svg:y2="8.5cm" draw:start-shape="id26" draw:start-glue-point="1" draw:end-shape="id27" draw:end-glue-point="3" svg:d="M3900 8500h2100" svg:viewBox="0 0 2101 1">
          <text:p/>
        </draw:connector>
        <draw:connector draw:style-name="gr17" draw:text-style-name="P15" draw:layer="layout" draw:type="line" svg:x1="14.6cm" svg:y1="5.3cm" svg:x2="14.6cm" svg:y2="6.8cm" draw:start-shape="id28" draw:start-glue-point="2" draw:end-shape="id29" draw:end-glue-point="0" svg:d="M14600 5300v1500" svg:viewBox="0 0 1 1501">
          <text:p/>
        </draw:connector>
        <draw:connector draw:style-name="gr17" draw:text-style-name="P15" draw:layer="layout" draw:type="line" svg:x1="14.6cm" svg:y1="7.8cm" svg:x2="14.6cm" svg:y2="11.349cm" draw:start-shape="id29" draw:start-glue-point="2" draw:end-shape="id30" draw:end-glue-point="0" svg:d="M14600 7800v3549" svg:viewBox="0 0 1 3550">
          <text:p/>
        </draw:connector>
        <draw:connector draw:style-name="gr63" draw:text-style-name="P15" draw:layer="layout" draw:type="lines" svg:x1="16.6cm" svg:y1="7.3cm" svg:x2="17.8cm" svg:y2="7.3cm" draw:start-shape="id29" draw:start-glue-point="1" draw:end-shape="id31" draw:end-glue-point="3" svg:d="M16600 7300h519 163 518" svg:viewBox="0 0 1201 1">
          <text:p/>
        </draw:connector>
        <draw:connector draw:style-name="gr64" draw:text-style-name="P15" draw:layer="layout" draw:type="lines" svg:x1="21.8cm" svg:y1="7.3cm" svg:x2="23.1cm" svg:y2="7.3cm" draw:start-shape="id31" draw:start-glue-point="1" draw:end-shape="id32" draw:end-glue-point="3" svg:d="M21800 7300h519 263 518" svg:viewBox="0 0 1301 1">
          <text:p/>
        </draw:connector>
        <draw:connector draw:style-name="gr65" draw:text-style-name="P15" draw:layer="layout" draw:type="lines" svg:x1="16.6cm" svg:y1="11.849cm" svg:x2="17.8cm" svg:y2="11.849cm" draw:start-shape="id30" draw:start-glue-point="1" draw:end-shape="id33" draw:end-glue-point="3" svg:d="M16600 11849h519 163 518" svg:viewBox="0 0 1201 1">
          <text:p/>
        </draw:connector>
        <draw:connector draw:style-name="gr66" draw:text-style-name="P15" draw:layer="layout" draw:type="lines" svg:x1="21.8cm" svg:y1="11.849cm" svg:x2="23.1cm" svg:y2="11.849cm" draw:start-shape="id33" draw:start-glue-point="1" draw:end-shape="id34" draw:end-glue-point="3" svg:d="M21800 11849h519 263 518" svg:viewBox="0 0 1301 1">
          <text:p/>
        </draw:connector>
        <draw:frame draw:name="TextBox 5" draw:style-name="gr15" draw:text-style-name="P17" draw:layer="layout" svg:width="3.298cm" svg:height="1.026cm" svg:x="0.181cm" svg:y="0.127cm">
          <draw:text-box>
            <text:p text:style-name="P16"><text:span text:style-name="T6">PROCESS</text:span></text:p>
          </draw:text-box>
        </draw:frame>
        <draw:custom-shape draw:style-name="gr19" draw:text-style-name="P18" draw:layer="layout" svg:width="27.5cm" svg:height="0.9cm" svg:x="0.3cm" svg:y="1.301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4cm">
          <draw:text-box>
            <text:p><text:span text:style-name="T7">프로세스 명</text:span></text:p>
          </draw:text-box>
        </draw:frame>
        <draw:frame draw:style-name="gr47" draw:text-style-name="P19" draw:layer="layout" svg:width="2.7cm" svg:height="1.267cm" svg:x="23.5cm" svg:y="1.171cm">
          <draw:text-box>
            <text:p><text:span text:style-name="T7">마이페이지</text:span></text:p>
          </draw:text-box>
        </draw:frame>
        <draw:line draw:style-name="gr21" draw:text-style-name="P15" draw:layer="layout" svg:x1="14.1cm" svg:y1="1.301cm" svg:x2="14.1cm" svg:y2="2.201cm">
          <text:p/>
        </draw:line>
        <draw:line draw:style-name="gr21" draw:text-style-name="P15" draw:layer="layout" svg:x1="6.9cm" svg:y1="1.301cm" svg:x2="6.9cm" svg:y2="2.201cm">
          <text:p/>
        </draw:line>
        <draw:line draw:style-name="gr21" draw:text-style-name="P15" draw:layer="layout" svg:x1="21.5cm" svg:y1="1.301cm" svg:x2="21.5cm" svg:y2="2.201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3">
          <draw:frame draw:name="슬라이드 번호 개체 틀 6"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1" draw:style-name="gr10" draw:layer="layout" svg:width="19.786cm" svg:height="11.135cm" svg:x="0.604cm" svg:y="2.258cm" draw:page-number="7" presentation:class="page"/>
          <draw:frame draw:name="슬라이드 노트 개체 틀 2" presentation:style-name="pr1" draw:text-style-name="P21" draw:layer="layout" svg:width="16.799cm" svg:height="13.364cm" svg:x="2.1cm" svg:y="14.107cm" presentation:class="notes" presentation:placeholder="true">
            <draw:text-box/>
          </draw:frame>
        </presentation:notes>
      </draw:page>
      <draw:page draw:name="page8" draw:style-name="dp1" draw:master-page-name="Master2-Layout2-blank-빈-화면" presentation:presentation-page-layout-name="AL1T14">
        <draw:frame draw:name="그림 2"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2" draw:style-name="gr2" draw:text-style-name="P17" draw:layer="layout" svg:width="6.5cm" svg:height="1cm" svg:x="1cm" svg:y="14.5cm">
          <draw:text-box>
            <text:p text:style-name="P25"><text:span text:style-name="T1"><text:date style:data-style-name="D1" text:date-value="2026-01-15">1/15/26</text:date></text:span></text:p>
          </draw:text-box>
        </draw:frame>
        <draw:frame draw:name="슬라이드 번호 개체 틀 4" draw:style-name="gr2" draw:text-style-name="P17" draw:layer="layout" svg:width="6.5cm" svg:height="1cm" svg:x="20.5cm" svg:y="14.5cm">
          <draw:text-box>
            <text:p text:style-name="P20"><text:span text:style-name="T1"><text:page-number>&lt;숫자&gt;</text:page-number></text:span></text:p>
          </draw:text-box>
        </draw:frame>
        <draw:custom-shape draw:name="자유형: 도형 48" draw:style-name="gr28" draw:text-style-name="P29" draw:layer="layout" svg:width="3cm" svg:height="1cm" svg:x="1.1cm" svg:y="7.9cm">
          <text:p text:style-name="P28"><text:span text:style-name="T21">대시보드</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0" draw:style-name="gr28" draw:text-style-name="P23" xml:id="id35" draw:id="id35" draw:layer="layout" svg:width="3cm" svg:height="1cm" svg:x="6.1cm" svg:y="11.8cm">
          <text:p text:style-name="P11"><text:span text:style-name="T21">쿠폰관리</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1" draw:style-name="gr28" draw:text-style-name="P23" xml:id="id41" draw:id="id41" draw:layer="layout" svg:width="3cm" svg:height="1cm" svg:x="6.1cm" svg:y="6cm">
          <text:p text:style-name="P11"><text:span text:style-name="T21">가게관리</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2" draw:style-name="gr28" draw:text-style-name="P23" xml:id="id36" draw:id="id36" draw:layer="layout" svg:width="3cm" svg:height="1cm" svg:x="6.1cm" svg:y="4.3cm">
          <text:p text:style-name="P11"><text:span text:style-name="T22"><text:s text:c="2"/></text:span><text:span text:style-name="T22">내 </text:span><text:span text:style-name="T21">정보</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9" draw:style-name="gr15" draw:text-style-name="P17" draw:layer="layout" svg:width="3.298cm" svg:height="1.026cm" svg:x="0.181cm" svg:y="0.127cm">
          <draw:text-box>
            <text:p text:style-name="P16"><text:span text:style-name="T6">PROCESS</text:span></text:p>
          </draw:text-box>
        </draw:frame>
        <draw:custom-shape draw:name="자유형: 도형 53" draw:style-name="gr67" draw:text-style-name="P13" draw:layer="layout" svg:width="4cm" svg:height="1.25cm" svg:x="0.5cm" svg:y="2.751cm">
          <text:p text:style-name="P11"><text:span text:style-name="T10">사장님</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54" draw:style-name="gr59" draw:text-style-name="P23" xml:id="id37" draw:id="id37" draw:layer="layout" svg:width="4cm" svg:height="1cm" svg:x="12.6cm" svg:y="4.301cm">
          <text:p text:style-name="P11"><text:span text:style-name="T21">회원 정보 조회</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5" draw:style-name="gr59" draw:text-style-name="P23" draw:layer="layout" svg:width="4cm" svg:height="1cm" svg:x="12.601cm" svg:y="7.701cm">
          <text:p text:style-name="P11"><text:span text:style-name="T21">회원 탈퇴</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style-name="gr16" draw:text-style-name="P6" draw:layer="layout" draw:line-skew="-0.582cm" svg:x1="6.1cm" svg:y1="12.3cm" svg:x2="6.1cm" svg:y2="4.8cm" draw:start-shape="id35" draw:start-glue-point="3" draw:end-shape="id36" draw:end-glue-point="3" svg:d="M6100 12300h-1100v-7500h1100" svg:viewBox="0 0 1101 7501">
          <text:p/>
        </draw:connector>
        <draw:line draw:style-name="gr17" draw:text-style-name="P15" draw:layer="layout" svg:x1="4.1cm" svg:y1="8.4cm" svg:x2="6.1cm" svg:y2="8.4cm">
          <text:p/>
        </draw:line>
        <draw:custom-shape draw:name="자유형: 도형 56" draw:style-name="gr28" draw:text-style-name="P23" draw:layer="layout" svg:width="3cm" svg:height="1cm" svg:x="6.101cm" svg:y="9.801cm">
          <text:p text:style-name="P11"><text:span text:style-name="T21">리뷰관리</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7" draw:style-name="gr28" draw:text-style-name="P23" draw:layer="layout" svg:width="3cm" svg:height="1cm" svg:x="6.101cm" svg:y="7.901cm">
          <text:p text:style-name="P11"><text:span text:style-name="T21">예약관리</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8" draw:style-name="gr59" draw:text-style-name="P23" xml:id="id39" draw:id="id39" draw:layer="layout" svg:width="4cm" svg:height="1cm" svg:x="17.7cm" svg:y="7.7cm">
          <text:p text:style-name="P11"><text:span text:style-name="T21">비밀번호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59" draw:style-name="gr59" draw:text-style-name="P23" xml:id="id38" draw:id="id38" draw:layer="layout" svg:width="4cm" svg:height="1cm" svg:x="22.8cm" svg:y="4.251cm">
          <text:p text:style-name="P11"><text:span text:style-name="T21">회원 기본 정보 수정</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61" draw:style-name="gr59" draw:text-style-name="P23" xml:id="id40" draw:id="id40" draw:layer="layout" svg:width="4cm" svg:height="1cm" svg:x="22.8cm" svg:y="7.7cm">
          <text:p text:style-name="P11"><text:span text:style-name="T21">회원탈퇴 화면 출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style-name="gr17" draw:text-style-name="P15" draw:layer="layout" draw:type="line" svg:x1="9.1cm" svg:y1="4.8cm" svg:x2="12.6cm" svg:y2="4.801cm" draw:start-shape="id36" draw:start-glue-point="1" draw:end-shape="id37" draw:end-glue-point="3" svg:d="M9100 4800l3500 1" svg:viewBox="0 0 3501 2">
          <text:p/>
        </draw:connector>
        <draw:connector draw:style-name="gr68" draw:text-style-name="P15" draw:layer="layout" draw:type="line" svg:x1="16.6cm" svg:y1="4.801cm" svg:x2="22.8cm" svg:y2="4.751cm" draw:start-shape="id37" draw:start-glue-point="1" draw:end-shape="id38" draw:end-glue-point="3" svg:d="M16600 4801l6200-50" svg:viewBox="0 0 6201 51">
          <text:p/>
        </draw:connector>
        <draw:line draw:style-name="gr17" draw:text-style-name="P15" draw:layer="layout" svg:x1="14.5cm" svg:y1="5.301cm" svg:x2="14.5cm" svg:y2="7.701cm">
          <text:p/>
        </draw:line>
        <draw:line draw:style-name="gr17" draw:text-style-name="P15" draw:layer="layout" svg:x1="16.601cm" svg:y1="8.2cm" svg:x2="17.7cm" svg:y2="8.2cm">
          <text:p/>
        </draw:line>
        <draw:connector draw:style-name="gr69" draw:text-style-name="P15" draw:layer="layout" draw:type="line" svg:x1="21.7cm" svg:y1="8.2cm" svg:x2="22.8cm" svg:y2="8.2cm" draw:start-shape="id39" draw:start-glue-point="1" draw:end-shape="id40" draw:end-glue-point="3" svg:d="M21700 8200h1100" svg:viewBox="0 0 1101 1">
          <text:p/>
        </draw:connector>
        <draw:custom-shape draw:name="자유형: 도형 66" draw:style-name="gr70" draw:text-style-name="P23" draw:layer="layout" svg:width="3.464cm" svg:height="1.914cm" svg:x="18.036cm" svg:y="5.351cm">
          <text:p text:style-name="P11"><text:span text:style-name="T19">비밀번호 확인 틀릴 </text:span></text:p>
          <text:p text:style-name="P11"><text:span text:style-name="T19">시 경고 출력</text:span></text:p>
          <draw:enhanced-geometry svg:viewBox="0 0 21600 21600" draw:path-stretchpoint-x="21600" draw:path-stretchpoint-y="21600" draw:text-areas="?f35 ?f43 ?f38 ?f45" draw:glue-points="?f24 ?f26 ?f25 ?f27 ?f23 ?f28 ?f22 ?f28 ?f20 ?f27 ?f21 ?f26" draw:type="non-primitive" draw:modifiers="34601 0 0" draw:enhanced-path="M ?f20 ?f27 L ?f34 ?f44 ?f21 ?f26 ?f36 ?f43 ?f9 ?f2 ?f37 ?f43 ?f24 ?f26 ?f39 ?f44 ?f25 ?f27 ?f38 ?f45 ?f23 ?f28 ?f9 ?f46 ?f22 ?f28 ?f35 ?f45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71" draw:text-style-name="P19" draw:layer="layout" svg:width="2.5cm" svg:height="1.328cm" svg:x="23.5cm" svg:y="1.1cm">
          <draw:text-box>
            <text:p><text:span text:style-name="T7">대시보드</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128" draw:style-name="gr72" draw:text-style-name="P23" xml:id="id42" draw:id="id42" draw:layer="layout" svg:width="4.898cm" svg:height="1.998cm" svg:x="12.602cm" svg:y="10.502cm">
          <text:p text:style-name="P11"><text:span text:style-name="T21">가게 기본정보 </text:span></text:p>
          <text:p text:style-name="P11"><text:span text:style-name="T21">수정 </text:span><text:span text:style-name="T21">, </text:span><text:span text:style-name="T21">삭제</text:span><text:span text:style-name="T21">, </text:span><text:span text:style-name="T21">조회 가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style-name="gr73" draw:text-style-name="P15" draw:layer="layout" svg:x1="9.1cm" svg:y1="6.5cm" svg:x2="12.602cm" svg:y2="11.501cm" draw:start-shape="id41" draw:start-glue-point="1" draw:end-shape="id42" draw:end-glue-point="3" svg:d="M9100 6500h1752v5001h1750" svg:viewBox="0 0 3503 5002">
          <text:p/>
        </draw:connector>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4">
          <draw:frame draw:name="슬라이드 번호 개체 틀 5"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2" draw:style-name="gr10" draw:layer="layout" svg:width="19.786cm" svg:height="11.135cm" svg:x="0.604cm" svg:y="2.258cm" draw:page-number="8" presentation:class="page"/>
          <draw:frame draw:name="슬라이드 노트 개체 틀 4" presentation:style-name="pr1" draw:text-style-name="P21" draw:layer="layout" svg:width="16.799cm" svg:height="13.364cm" svg:x="2.1cm" svg:y="14.107cm" presentation:class="notes" presentation:placeholder="true">
            <draw:text-box/>
          </draw:frame>
        </presentation:notes>
      </draw:page>
      <draw:page draw:name="page9" draw:style-name="dp1" draw:master-page-name="Master2-Layout2-blank-빈-화면" presentation:presentation-page-layout-name="AL1T14">
        <draw:frame draw:name="그림 11"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12" draw:style-name="gr2" draw:text-style-name="P17" draw:layer="layout" svg:width="6.5cm" svg:height="1cm" svg:x="1cm" svg:y="14.5cm">
          <draw:text-box>
            <text:p text:style-name="P25"><text:span text:style-name="T1"><text:date style:data-style-name="D1" text:date-value="2026-01-15">1/15/26</text:date></text:span></text:p>
          </draw:text-box>
        </draw:frame>
        <draw:frame draw:name="슬라이드 번호 개체 틀 23" draw:style-name="gr2" draw:text-style-name="P17" draw:layer="layout" svg:width="6.5cm" svg:height="1cm" svg:x="20.5cm" svg:y="14.5cm">
          <draw:text-box>
            <text:p text:style-name="P20"><text:span text:style-name="T1"><text:page-number>&lt;숫자&gt;</text:page-number></text:span></text:p>
          </draw:text-box>
        </draw:frame>
        <draw:custom-shape draw:name="자유형: 도형 122" draw:style-name="gr28" draw:text-style-name="P29" draw:layer="layout" svg:width="3cm" svg:height="1cm" svg:x="1.1cm" svg:y="7.9cm">
          <text:p text:style-name="P28"><text:span text:style-name="T21">대시보드 화면</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16" draw:style-name="gr15" draw:text-style-name="P17" draw:layer="layout" svg:width="3.298cm" svg:height="1.026cm" svg:x="0.181cm" svg:y="0.127cm">
          <draw:text-box>
            <text:p text:style-name="P16"><text:span text:style-name="T6">PROCESS</text:span></text:p>
          </draw:text-box>
        </draw:frame>
        <draw:custom-shape draw:name="자유형: 도형 126" draw:style-name="gr67" draw:text-style-name="P13" draw:layer="layout" svg:width="4cm" svg:height="1.25cm" svg:x="0.5cm" svg:y="2.751cm">
          <text:p text:style-name="P11"><text:span text:style-name="T10">사장님</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line draw:style-name="gr17" draw:text-style-name="P15" draw:layer="layout" svg:x1="4.1cm" svg:y1="8.4cm" svg:x2="6.1cm" svg:y2="8.4cm">
          <text:p/>
        </draw:line>
        <draw:custom-shape draw:name="자유형: 도형 161" draw:style-name="gr74" draw:text-style-name="P23" draw:layer="layout" svg:width="3.899cm" svg:height="1.599cm" svg:x="6.101cm" svg:y="7.601cm">
          <text:p text:style-name="P11"><text:span text:style-name="T21">매출관리 클릭</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62" draw:style-name="gr75" draw:text-style-name="P23" xml:id="id44" draw:id="id44" draw:layer="layout" svg:width="5.3cm" svg:height="2.2cm" svg:x="14.2cm" svg:y="5cm">
          <text:p text:style-name="P11"><text:span text:style-name="T21"><text:s/></text:span><text:span text:style-name="T21">날짜별 매출 금액과 </text:span></text:p>
          <text:p text:style-name="P11"><text:span text:style-name="T21">평균 단가</text:span><text:span text:style-name="T21">, </text:span><text:span text:style-name="T21">매출 비교 </text:span></text:p>
          <text:p text:style-name="P11"><text:span text:style-name="T21"><text:s/></text:span><text:span text:style-name="T21">표</text:span><text:span text:style-name="T21">, </text:span><text:span text:style-name="T21">그래프 출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71" draw:text-style-name="P19" draw:layer="layout" svg:width="2.5cm" svg:height="1.328cm" svg:x="23.5cm" svg:y="1.1cm">
          <draw:text-box>
            <text:p text:style-name="P30"><text:span text:style-name="T7">매출관리</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123" draw:style-name="gr76" draw:text-style-name="P23" xml:id="id43" draw:id="id43" draw:layer="layout" svg:width="4.4cm" svg:height="2.399cm" svg:x="14.201cm" svg:y="9.601cm">
          <text:p text:style-name="P11"><text:span text:style-name="T21"><text:s text:c="3"/></text:span><text:span text:style-name="T21">그래프 상단에 </text:span></text:p>
          <text:p text:style-name="P11"><text:span text:style-name="T21">날짜별 매출 선택</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24" draw:style-name="gr77" draw:text-style-name="P23" draw:layer="layout" svg:width="4.4cm" svg:height="1.7cm" svg:x="21.502cm" svg:y="9.902cm">
          <text:p text:style-name="P11"><text:span text:style-name="T21"><text:s/></text:span><text:span text:style-name="T21">날짜별 매출 금액</text:span></text:p>
          <text:p text:style-name="P11"><text:span text:style-name="T21">그래프 출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style-name="gr78" draw:text-style-name="P15" draw:layer="layout" draw:line-skew="-1.182cm" svg:x1="14.201cm" svg:y1="10.8cm" svg:x2="14.2cm" svg:y2="6.1cm" draw:start-shape="id43" draw:start-glue-point="3" draw:end-shape="id44" svg:d="M14201 10800h-1701v-4700h1700" svg:viewBox="0 0 1702 4701">
          <text:p/>
        </draw:connector>
        <draw:line draw:style-name="gr79" draw:text-style-name="P15" draw:layer="layout" svg:x1="10cm" svg:y1="8.5cm" svg:x2="12.5cm" svg:y2="8.5cm">
          <text:p/>
        </draw:line>
        <draw:line draw:style-name="gr73" draw:text-style-name="P15" draw:layer="layout" svg:x1="18.601cm" svg:y1="10.8cm" svg:x2="21.502cm" svg:y2="10.8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2">
          <draw:frame draw:name="슬라이드 번호 개체 틀 24"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12" draw:style-name="gr10" draw:layer="layout" svg:width="19.786cm" svg:height="11.135cm" svg:x="0.604cm" svg:y="2.258cm" draw:page-number="9" presentation:class="page"/>
          <draw:frame draw:name="슬라이드 노트 개체 틀 13" presentation:style-name="pr1" draw:text-style-name="P21" draw:layer="layout" svg:width="16.799cm" svg:height="13.364cm" svg:x="2.1cm" svg:y="14.107cm" presentation:class="notes" presentation:placeholder="true">
            <draw:text-box/>
          </draw:frame>
        </presentation:notes>
      </draw:page>
      <draw:page draw:name="page10" draw:style-name="dp1" draw:master-page-name="Master2-Layout2-blank-빈-화면" presentation:presentation-page-layout-name="AL1T14">
        <draw:frame draw:name="그림 4"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5" draw:style-name="gr2" draw:text-style-name="P17" draw:layer="layout" svg:width="6.5cm" svg:height="1cm" svg:x="1cm" svg:y="14.5cm">
          <draw:text-box>
            <text:p text:style-name="P25"><text:span text:style-name="T1"><text:date style:data-style-name="D1" text:date-value="2026-01-15">1/15/26</text:date></text:span></text:p>
          </draw:text-box>
        </draw:frame>
        <draw:frame draw:name="슬라이드 번호 개체 틀 9" draw:style-name="gr2" draw:text-style-name="P17" draw:layer="layout" svg:width="6.5cm" svg:height="1cm" svg:x="20.5cm" svg:y="14.5cm">
          <draw:text-box>
            <text:p text:style-name="P20"><text:span text:style-name="T1"><text:page-number>&lt;숫자&gt;</text:page-number></text:span></text:p>
          </draw:text-box>
        </draw:frame>
        <draw:custom-shape draw:name="자유형: 도형 80" draw:style-name="gr28" draw:text-style-name="P23" draw:layer="layout" svg:width="3cm" svg:height="1cm" svg:x="1.1cm" svg:y="7.9cm">
          <text:p text:style-name="P11"><text:span text:style-name="T21">회원관리</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81" draw:style-name="gr28" draw:text-style-name="P23" draw:layer="layout" svg:width="3cm" svg:height="1cm" svg:x="6.1cm" svg:y="7.9cm">
          <text:p text:style-name="P11"><text:span text:style-name="T21">판매자</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91" draw:style-name="gr28" draw:text-style-name="P23" xml:id="id45" draw:id="id45" draw:layer="layout" svg:width="3cm" svg:height="1cm" svg:x="6.1cm" svg:y="11.5cm">
          <text:p text:style-name="P11"><text:span text:style-name="T21">블랙리스트</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97" draw:style-name="gr80" draw:text-style-name="P23" xml:id="id51" draw:id="id51" draw:layer="layout" svg:width="3.902cm" svg:height="0.826cm" svg:x="12.098cm" svg:y="3.7cm">
          <text:p text:style-name="P11"><text:span text:style-name="T21">회원 조회</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98" draw:style-name="gr28" draw:text-style-name="P23" xml:id="id46" draw:id="id46" draw:layer="layout" svg:width="3cm" svg:height="1cm" svg:x="6.1cm" svg:y="4.3cm">
          <text:p text:style-name="P11"><text:span text:style-name="T22">일반회원</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11" draw:style-name="gr15" draw:text-style-name="P17" draw:layer="layout" svg:width="3.298cm" svg:height="1.026cm" svg:x="0.181cm" svg:y="0.127cm">
          <draw:text-box>
            <text:p text:style-name="P16"><text:span text:style-name="T6">PROCESS</text:span></text:p>
          </draw:text-box>
        </draw:frame>
        <draw:custom-shape draw:name="자유형: 도형 113" draw:style-name="gr67" draw:text-style-name="P13" draw:layer="layout" svg:width="4cm" svg:height="1.25cm" svg:x="0.5cm" svg:y="2.751cm">
          <text:p text:style-name="P11"><text:span text:style-name="T10">관리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line draw:style-name="gr17" draw:text-style-name="P15" draw:layer="layout" svg:x1="4.1cm" svg:y1="8.4cm" svg:x2="6.1cm" svg:y2="8.4cm">
          <text:p/>
        </draw:line>
        <draw:connector draw:style-name="gr16" draw:text-style-name="P6" draw:layer="layout" svg:x1="6.1cm" svg:y1="12cm" svg:x2="6.1cm" svg:y2="4.8cm" draw:start-shape="id45" draw:start-glue-point="3" draw:end-shape="id46" draw:end-glue-point="3" svg:d="M6100 12000h-518v-7200h518" svg:viewBox="0 0 519 7201">
          <text:p/>
        </draw:connector>
        <draw:line draw:style-name="gr17" draw:text-style-name="P15" draw:layer="layout" svg:x1="9.1cm" svg:y1="12cm" svg:x2="12.682cm" svg:y2="12cm">
          <text:p/>
        </draw:line>
        <draw:custom-shape draw:name="자유형: 도형 99" draw:style-name="gr80" draw:text-style-name="P23" xml:id="id50" draw:id="id50" draw:layer="layout" svg:width="3.902cm" svg:height="0.826cm" svg:x="12.099cm" svg:y="4.974cm">
          <text:p text:style-name="P11"><text:span text:style-name="T21">회원 탈퇴</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00" draw:style-name="gr80" draw:text-style-name="P23" xml:id="id48" draw:id="id48" draw:layer="layout" svg:width="3.902cm" svg:height="0.826cm" svg:x="19.099cm" svg:y="7.401cm">
          <text:p text:style-name="P11"><text:span text:style-name="T21">판매자 조회</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01" draw:style-name="gr80" draw:text-style-name="P23" xml:id="id49" draw:id="id49" draw:layer="layout" svg:width="3.902cm" svg:height="0.826cm" svg:x="19.1cm" svg:y="8.475cm">
          <text:p text:style-name="P11"><text:span text:style-name="T21">판매자 탈퇴</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02" draw:style-name="gr80" draw:text-style-name="P23" xml:id="id47" draw:id="id47" draw:layer="layout" svg:width="3.902cm" svg:height="0.826cm" svg:x="12.102cm" svg:y="7.977cm">
          <text:p text:style-name="P11"><text:span text:style-name="T21">판매자 승인</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81" draw:text-style-name="P15" draw:layer="layout" svg:x1="9.1cm" svg:y1="8.4cm" svg:x2="12.102cm" svg:y2="8.4cm">
          <text:p/>
        </draw:line>
        <draw:connector draw:style-name="gr82" draw:text-style-name="P15" draw:layer="layout" draw:type="line" svg:x1="16.004cm" svg:y1="8.39cm" svg:x2="19.099cm" svg:y2="7.814cm" draw:start-shape="id47" draw:start-glue-point="1" draw:end-shape="id48" draw:end-glue-point="3" svg:d="M16004 8390l3095-576" svg:viewBox="0 0 3096 577">
          <text:p/>
        </draw:connector>
        <draw:connector draw:style-name="gr83" draw:text-style-name="P15" draw:layer="layout" draw:type="line" svg:x1="16.004cm" svg:y1="8.39cm" svg:x2="19.1cm" svg:y2="8.888cm" draw:start-shape="id47" draw:start-glue-point="1" draw:end-shape="id49" draw:end-glue-point="3" svg:d="M16004 8390l3096 498" svg:viewBox="0 0 3097 499">
          <text:p/>
        </draw:connector>
        <draw:custom-shape draw:name="자유형: 도형 104" draw:style-name="gr84" draw:text-style-name="P23" xml:id="id52" draw:id="id52" draw:layer="layout" svg:width="4.299cm" svg:height="0.782cm" svg:x="11.001cm" svg:y="11.618cm">
          <text:p text:style-name="P11"><text:span text:style-name="T21">블랙리스트 목록 출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05" draw:style-name="gr85" draw:text-style-name="P23" xml:id="id53" draw:id="id53" draw:layer="layout" svg:width="3.902cm" svg:height="0.782cm" svg:x="17.502cm" svg:y="10.919cm">
          <text:p text:style-name="P11"><text:span text:style-name="T21">블랙리스트 추가</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style-name="gr86" draw:text-style-name="P15" draw:layer="layout" svg:x1="12.099cm" svg:y1="5.387cm" svg:x2="12.098cm" svg:y2="4.113cm" draw:start-shape="id50" draw:start-glue-point="3" draw:end-shape="id51" draw:end-glue-point="3" svg:d="M12099 5387h-519v-1274h518" svg:viewBox="0 0 520 1275">
          <text:p/>
        </draw:connector>
        <draw:line draw:style-name="gr81" draw:text-style-name="P15" draw:layer="layout" svg:x1="9.1cm" svg:y1="4.8cm" svg:x2="11.58cm" svg:y2="4.8cm">
          <text:p/>
        </draw:lin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47" draw:text-style-name="P19" draw:layer="layout" svg:width="2.4cm" svg:height="1.267cm" svg:x="23.6cm" svg:y="1.172cm">
          <draw:text-box>
            <text:p><text:span text:style-name="T7">고객관리</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19" draw:style-name="gr85" draw:text-style-name="P23" xml:id="id54" draw:id="id54" draw:layer="layout" svg:width="3.902cm" svg:height="0.782cm" svg:x="17.503cm" svg:y="12.32cm">
          <text:p text:style-name="P11"><text:span text:style-name="T21">블랙리스트 해제</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20" draw:style-name="gr87" draw:text-style-name="P23" xml:id="id55" draw:id="id55" draw:layer="layout" svg:width="4.497cm" svg:height="0.782cm" svg:x="22.503cm" svg:y="10.92cm">
          <text:p text:style-name="P11"><text:span text:style-name="T21">블랙리스트 등록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21" draw:style-name="gr87" draw:text-style-name="P23" xml:id="id56" draw:id="id56" draw:layer="layout" svg:width="4.497cm" svg:height="0.782cm" svg:x="22.503cm" svg:y="12.321cm">
          <text:p text:style-name="P11"><text:span text:style-name="T21">블랙리스트 해제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style-name="gr88" draw:text-style-name="P15" draw:layer="layout" draw:type="line" svg:x1="15.3cm" svg:y1="12.009cm" svg:x2="17.502cm" svg:y2="11.31cm" draw:start-shape="id52" draw:start-glue-point="1" draw:end-shape="id53" draw:end-glue-point="3" svg:d="M15300 12009l2202-699" svg:viewBox="0 0 2203 700">
          <text:p/>
        </draw:connector>
        <draw:connector draw:style-name="gr89" draw:text-style-name="P15" draw:layer="layout" draw:type="line" svg:x1="15.3cm" svg:y1="12.009cm" svg:x2="17.503cm" svg:y2="12.711cm" draw:start-shape="id52" draw:start-glue-point="1" draw:end-shape="id54" draw:end-glue-point="3" svg:d="M15300 12009l2203 702" svg:viewBox="0 0 2204 703">
          <text:p/>
        </draw:connector>
        <draw:connector draw:style-name="gr90" draw:text-style-name="P15" draw:layer="layout" draw:type="line" svg:x1="21.404cm" svg:y1="11.31cm" svg:x2="22.503cm" svg:y2="11.311cm" draw:start-shape="id53" draw:start-glue-point="1" draw:end-shape="id55" draw:end-glue-point="3" svg:d="M21404 11310l1099 1" svg:viewBox="0 0 1100 2">
          <text:p/>
        </draw:connector>
        <draw:connector draw:style-name="gr91" draw:text-style-name="P15" draw:layer="layout" draw:type="line" svg:x1="21.405cm" svg:y1="12.711cm" svg:x2="22.503cm" svg:y2="12.712cm" draw:start-shape="id54" draw:start-glue-point="1" draw:end-shape="id56" draw:end-glue-point="3" svg:d="M21405 12711l1098 1" svg:viewBox="0 0 1099 2">
          <text:p/>
        </draw:connector>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4">
          <draw:frame draw:name="슬라이드 번호 개체 틀 10"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5" draw:style-name="gr10" draw:layer="layout" svg:width="19.786cm" svg:height="11.135cm" svg:x="0.604cm" svg:y="2.258cm" draw:page-number="10" presentation:class="page"/>
          <draw:frame draw:name="슬라이드 노트 개체 틀 6" presentation:style-name="pr1" draw:text-style-name="P21" draw:layer="layout" svg:width="16.799cm" svg:height="13.364cm" svg:x="2.1cm" svg:y="14.107cm" presentation:class="notes" presentation:placeholder="true">
            <draw:text-box/>
          </draw:frame>
        </presentation:notes>
      </draw:page>
      <draw:page draw:name="page11" draw:style-name="dp1" draw:master-page-name="Master2-Layout2-blank-빈-화면" presentation:presentation-page-layout-name="AL1T14">
        <draw:frame draw:name="그림 1"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3" draw:style-name="gr2" draw:text-style-name="P17" draw:layer="layout" svg:width="6.5cm" svg:height="1cm" svg:x="1cm" svg:y="14.5cm">
          <draw:text-box>
            <text:p text:style-name="P25"><text:span text:style-name="T1"><text:date style:data-style-name="D1" text:date-value="2026-01-15">1/15/26</text:date></text:span></text:p>
          </draw:text-box>
        </draw:frame>
        <draw:frame draw:name="슬라이드 번호 개체 틀 2" draw:style-name="gr2" draw:text-style-name="P17" draw:layer="layout" svg:width="6.5cm" svg:height="1cm" svg:x="20.5cm" svg:y="14.5cm">
          <draw:text-box>
            <text:p text:style-name="P20"><text:span text:style-name="T1"><text:page-number>&lt;숫자&gt;</text:page-number></text:span></text:p>
          </draw:text-box>
        </draw:frame>
        <draw:custom-shape draw:name="자유형: 도형 22" draw:style-name="gr92" draw:text-style-name="P23" xml:id="id57" draw:id="id57" draw:layer="layout" svg:width="3.4cm" svg:height="1.6cm" svg:x="3cm" svg:y="5.6cm">
          <text:p text:style-name="P11"><text:span text:style-name="T21">카테고리를 </text:span></text:p>
          <text:p text:style-name="P11"><text:span text:style-name="T21">이용한 <text:s/>검색</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6" draw:style-name="gr15" draw:text-style-name="P17" draw:layer="layout" svg:width="3.298cm" svg:height="1.026cm" svg:x="0.181cm" svg:y="0.127cm">
          <draw:text-box>
            <text:p text:style-name="P16"><text:span text:style-name="T6">PROCESS</text:span></text:p>
          </draw:text-box>
        </draw:frame>
        <draw:custom-shape draw:name="자유형: 도형 30" draw:style-name="gr93" draw:text-style-name="P13" draw:layer="layout" svg:width="6.5cm" svg:height="1.25cm" svg:x="0.5cm" svg:y="2.6cm">
          <text:p text:style-name="P11"><text:span text:style-name="T10">고객</text:span><text:span text:style-name="T10">/ </text:span><text:span text:style-name="T10">판매자 </text:span><text:span text:style-name="T10">/ </text:span><text:span text:style-name="T10">관리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47" draw:text-style-name="P19" draw:layer="layout" svg:width="2.4cm" svg:height="1.267cm" svg:x="23.6cm" svg:y="1.172cm">
          <draw:text-box>
            <text:p><text:span text:style-name="T7">상품 검색</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25" draw:style-name="gr92" draw:text-style-name="P23" xml:id="id59" draw:id="id59" draw:layer="layout" svg:width="3.4cm" svg:height="1.6cm" svg:x="3.001cm" svg:y="9.001cm">
          <text:p text:style-name="P11"><text:span text:style-name="T21">검색창을 </text:span></text:p>
          <text:p text:style-name="P11"><text:span text:style-name="T21">이용한 검색</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28" draw:style-name="gr92" draw:text-style-name="P23" xml:id="id58" draw:id="id58" draw:layer="layout" svg:width="3.4cm" svg:height="1.6cm" svg:x="12.401cm" svg:y="5.601cm">
          <text:p text:style-name="P11"><text:span text:style-name="T21">카테고리에 있는</text:span></text:p>
          <text:p text:style-name="P11"><text:span text:style-name="T21"><text:s/></text:span><text:span text:style-name="T21">상품 출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29" draw:style-name="gr92" draw:text-style-name="P23" xml:id="id60" draw:id="id60" draw:layer="layout" svg:width="3.4cm" svg:height="1.6cm" svg:x="12.402cm" svg:y="9.002cm">
          <text:p text:style-name="P11"><text:span text:style-name="T21">카테고리 선택</text:span><text:span text:style-name="T21">/ </text:span></text:p>
          <text:p text:style-name="P11"><text:span text:style-name="T21">상품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31" draw:style-name="gr92" draw:text-style-name="P23" draw:layer="layout" svg:width="3.4cm" svg:height="1.6cm" svg:x="12.402cm" svg:y="12.802cm">
          <text:p text:style-name="P11"><text:span text:style-name="T21">AI</text:span><text:span text:style-name="T21">에 상품 검색</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33" draw:style-name="gr92" draw:text-style-name="P23" draw:layer="layout" svg:width="3.4cm" svg:height="1.6cm" svg:x="21.002cm" svg:y="5.602cm">
          <text:p text:style-name="P11"><text:span text:style-name="T21">카테고리에 있는</text:span></text:p>
          <text:p text:style-name="P11"><text:span text:style-name="T21"><text:s/></text:span><text:span text:style-name="T21">상품 출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34" draw:style-name="gr92" draw:text-style-name="P23" draw:layer="layout" svg:width="3.4cm" svg:height="1.6cm" svg:x="21.003cm" svg:y="9.003cm">
          <text:p text:style-name="P11"><text:span text:style-name="T21">카테고리 선택</text:span><text:span text:style-name="T21">/ </text:span></text:p>
          <text:p text:style-name="P11"><text:span text:style-name="T21">상품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35" draw:style-name="gr92" draw:text-style-name="P23" draw:layer="layout" svg:width="3.4cm" svg:height="1.6cm" svg:x="21.003cm" svg:y="12.803cm">
          <text:p text:style-name="P11"><text:span text:style-name="T21">AI</text:span><text:span text:style-name="T21">에 상품 검색</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style-name="gr94" draw:text-style-name="P15" draw:layer="layout" draw:type="line" svg:x1="6.4cm" svg:y1="6.4cm" svg:x2="12.401cm" svg:y2="6.401cm" draw:start-shape="id57" draw:start-glue-point="1" draw:end-shape="id58" draw:end-glue-point="3" svg:d="M6400 6400l6001 1" svg:viewBox="0 0 6002 2">
          <text:p/>
        </draw:connector>
        <draw:line draw:style-name="gr95" draw:text-style-name="P15" draw:layer="layout" svg:x1="15.801cm" svg:y1="6.4cm" svg:x2="21cm" svg:y2="6.4cm">
          <text:p/>
        </draw:line>
        <draw:connector draw:style-name="gr96" draw:text-style-name="P15" draw:layer="layout" draw:type="line" svg:x1="6.401cm" svg:y1="9.801cm" svg:x2="12.402cm" svg:y2="9.802cm" draw:start-shape="id59" draw:start-glue-point="1" draw:end-shape="id60" draw:end-glue-point="3" svg:d="M6401 9801l6001 1" svg:viewBox="0 0 6002 2">
          <text:p/>
        </draw:connector>
        <draw:connector draw:style-name="gr96" draw:text-style-name="P15" draw:layer="layout" draw:type="line" svg:x1="6.39cm" svg:y1="13.602cm" svg:x2="12.391cm" svg:y2="13.603cm" svg:d="M6390 13602l6001 1" svg:viewBox="0 0 6002 2">
          <text:p/>
        </draw:connector>
        <draw:custom-shape draw:name="자유형: 도형 26" draw:style-name="gr92" draw:text-style-name="P23" draw:layer="layout" svg:width="3.4cm" svg:height="1.6cm" svg:x="3.001cm" svg:y="12.801cm">
          <text:p text:style-name="P11"><text:span text:style-name="T21">AI</text:span><text:span text:style-name="T21">를 이용한 검색</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95" draw:text-style-name="P15" draw:layer="layout" svg:x1="15.79cm" svg:y1="9.8cm" svg:x2="20.989cm" svg:y2="9.8cm">
          <text:p/>
        </draw:line>
        <draw:line draw:style-name="gr95" draw:text-style-name="P15" draw:layer="layout" svg:x1="15.779cm" svg:y1="13.6cm" svg:x2="20.978cm" svg:y2="13.6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4">
          <draw:frame draw:name="슬라이드 번호 개체 틀 1"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3" draw:style-name="gr10" draw:layer="layout" svg:width="19.786cm" svg:height="11.135cm" svg:x="0.604cm" svg:y="2.258cm" draw:page-number="11" presentation:class="page"/>
          <draw:frame draw:name="슬라이드 노트 개체 틀 3" presentation:style-name="pr1" draw:text-style-name="P21" draw:layer="layout" svg:width="16.799cm" svg:height="13.364cm" svg:x="2.1cm" svg:y="14.107cm" presentation:class="notes" presentation:placeholder="true">
            <draw:text-box/>
          </draw:frame>
        </presentation:notes>
      </draw:page>
      <draw:page draw:name="page12" draw:style-name="dp1" draw:master-page-name="Master2-Layout2-blank-빈-화면" presentation:presentation-page-layout-name="AL1T14">
        <draw:frame draw:name="그림 3"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4" draw:style-name="gr2" draw:text-style-name="P17" draw:layer="layout" svg:width="6.5cm" svg:height="1cm" svg:x="1cm" svg:y="14.5cm">
          <draw:text-box>
            <text:p text:style-name="P25"><text:span text:style-name="T1"><text:date style:data-style-name="D1" text:date-value="2026-01-15">1/15/26</text:date></text:span></text:p>
          </draw:text-box>
        </draw:frame>
        <draw:frame draw:name="슬라이드 번호 개체 틀 7" draw:style-name="gr2" draw:text-style-name="P17" draw:layer="layout" svg:width="6.5cm" svg:height="1cm" svg:x="20.5cm" svg:y="14.5cm">
          <draw:text-box>
            <text:p text:style-name="P20"><text:span text:style-name="T1"><text:page-number>&lt;숫자&gt;</text:page-number></text:span></text:p>
          </draw:text-box>
        </draw:frame>
        <draw:custom-shape draw:name="자유형: 도형 37" draw:style-name="gr97" draw:text-style-name="P32" xml:id="id61" draw:id="id61" draw:layer="layout" svg:width="4.5cm" svg:height="0.9cm" svg:x="1.1cm" svg:y="4.8cm">
          <text:p text:style-name="P31"><text:span text:style-name="T23">이용한 해당 가게 클릭</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7" draw:style-name="gr15" draw:text-style-name="P17" draw:layer="layout" svg:width="3.298cm" svg:height="1.026cm" svg:x="0.181cm" svg:y="0.127cm">
          <draw:text-box>
            <text:p text:style-name="P16"><text:span text:style-name="T6">PROCESS</text:span></text:p>
          </draw:text-box>
        </draw:frame>
        <draw:custom-shape draw:name="자유형: 도형 38" draw:style-name="gr98" draw:text-style-name="P13" draw:layer="layout" svg:width="4.3cm" svg:height="1.25cm" svg:x="1.2cm" svg:y="2.7cm">
          <text:p text:style-name="P11"><text:span text:style-name="T10">일반회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47" draw:text-style-name="P19" draw:layer="layout" svg:width="2.4cm" svg:height="1.267cm" svg:x="23.6cm" svg:y="1.172cm">
          <draw:text-box>
            <text:p><text:span text:style-name="T7">리뷰 관리</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39" draw:style-name="gr99" draw:text-style-name="P32" draw:layer="layout" svg:width="4.5cm" svg:height="1.499cm" svg:x="1.001cm" svg:y="6.801cm">
          <text:p text:style-name="P31"><text:span text:style-name="T23">이용한 해당 가게 </text:span></text:p>
          <text:p text:style-name="P31"><text:span text:style-name="T23">안에 리뷰 클릭</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0" draw:style-name="gr99" draw:text-style-name="P32" draw:layer="layout" svg:width="4.5cm" svg:height="1.499cm" svg:x="1.002cm" svg:y="9.501cm">
          <text:p text:style-name="P31"><text:span text:style-name="T23">해당 가게 리뷰 </text:span></text:p>
          <text:p text:style-name="P31"><text:span text:style-name="T23">화면 출력</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2" draw:style-name="gr100" draw:text-style-name="P32" draw:layer="layout" svg:width="3.299cm" svg:height="0.9cm" svg:x="7.601cm" svg:y="7.102cm">
          <text:p text:style-name="P31"><text:span text:style-name="T23">매장 리뷰 수정</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3" draw:style-name="gr100" draw:text-style-name="P32" xml:id="id62" draw:id="id62" draw:layer="layout" svg:width="3.299cm" svg:height="0.9cm" svg:x="7.701cm" svg:y="4.802cm">
          <text:p text:style-name="P31"><text:span text:style-name="T23">매장 리뷰 등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5" draw:style-name="gr101" draw:text-style-name="P32" draw:layer="layout" svg:width="4.099cm" svg:height="1.296cm" svg:x="18.701cm" svg:y="4.604cm">
          <text:p text:style-name="P31"><text:span text:style-name="T23">리뷰 양식에 맞게 </text:span></text:p>
          <text:p text:style-name="P31"><text:span text:style-name="T23">작성</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6" draw:style-name="gr102" draw:text-style-name="P32" xml:id="id63" draw:id="id63" draw:layer="layout" svg:width="3.599cm" svg:height="1.296cm" svg:x="13.001cm" svg:y="4.604cm">
          <text:p text:style-name="P31"><text:span text:style-name="T23">매장 리뷰 등록</text:span></text:p>
          <text:p text:style-name="P31"><text:span text:style-name="T23">화면 출력</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7" draw:style-name="gr103" draw:text-style-name="P23" draw:layer="layout" svg:width="2.599cm" svg:height="0.9cm" svg:x="24.401cm" svg:y="4.805cm">
          <text:p text:style-name="P11"><text:span text:style-name="T21"><text:s/></text:span><text:span text:style-name="T23">등록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1" draw:style-name="gr101" draw:text-style-name="P32" draw:layer="layout" svg:width="4.099cm" svg:height="1.296cm" svg:x="15.501cm" svg:y="6.905cm">
          <text:p text:style-name="P31"><text:span text:style-name="T23">리뷰 양식에 맞게 </text:span></text:p>
          <text:p text:style-name="P31"><text:span text:style-name="T23">작성</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4" draw:style-name="gr103" draw:text-style-name="P23" draw:layer="layout" svg:width="2.599cm" svg:height="0.9cm" svg:x="24.401cm" svg:y="7.006cm">
          <text:p text:style-name="P11"><text:span text:style-name="T21"><text:s/></text:span><text:span text:style-name="T23">수정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49" draw:style-name="gr100" draw:text-style-name="P32" draw:layer="layout" svg:width="3.299cm" svg:height="0.9cm" svg:x="8.101cm" svg:y="9.803cm">
          <text:p text:style-name="P31"><text:span text:style-name="T23">매장 리뷰 삭제</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60" draw:style-name="gr100" draw:text-style-name="P23" draw:layer="layout" svg:width="3.299cm" svg:height="0.9cm" svg:x="14.401cm" svg:y="9.804cm">
          <text:p text:style-name="P11"><text:span text:style-name="T21"><text:s/></text:span><text:span text:style-name="T23">리뷰 삭제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style-name="gr104" draw:text-style-name="P15" draw:layer="layout" draw:type="line" svg:x1="5.6cm" svg:y1="5.25cm" svg:x2="7.701cm" svg:y2="5.252cm" draw:start-shape="id61" draw:start-glue-point="1" draw:end-shape="id62" draw:end-glue-point="3" svg:d="M5600 5250l2101 2" svg:viewBox="0 0 2102 3">
          <text:p/>
        </draw:connector>
        <draw:connector draw:style-name="gr105" draw:text-style-name="P15" draw:layer="layout" draw:type="line" svg:x1="11cm" svg:y1="5.252cm" svg:x2="13.001cm" svg:y2="5.252cm" draw:start-shape="id62" draw:start-glue-point="1" draw:end-shape="id63" draw:end-glue-point="3" svg:d="M11000 5252h2001" svg:viewBox="0 0 2002 1">
          <text:p/>
        </draw:connector>
        <draw:line draw:style-name="gr106" draw:text-style-name="P15" draw:layer="layout" svg:x1="16.6cm" svg:y1="5.3cm" svg:x2="18.701cm" svg:y2="5.3cm">
          <text:p/>
        </draw:line>
        <draw:line draw:style-name="gr107" draw:text-style-name="P15" draw:layer="layout" svg:x1="22.8cm" svg:y1="5.3cm" svg:x2="24.401cm" svg:y2="5.3cm">
          <text:p/>
        </draw:line>
        <draw:line draw:style-name="gr108" draw:text-style-name="P15" draw:layer="layout" svg:x1="5.501cm" svg:y1="7.6cm" svg:x2="7.601cm" svg:y2="7.6cm">
          <text:p/>
        </draw:line>
        <draw:line draw:style-name="gr109" draw:text-style-name="P15" draw:layer="layout" svg:x1="10.9cm" svg:y1="7.6cm" svg:x2="15.5cm" svg:y2="7.6cm">
          <text:p/>
        </draw:line>
        <draw:line draw:style-name="gr110" draw:text-style-name="P15" draw:layer="layout" svg:x1="19.6cm" svg:y1="7.5cm" svg:x2="24.401cm" svg:y2="7.5cm">
          <text:p/>
        </draw:line>
        <draw:line draw:style-name="gr111" draw:text-style-name="P15" draw:layer="layout" svg:x1="5.502cm" svg:y1="10.3cm" svg:x2="8.101cm" svg:y2="10.3cm">
          <text:p/>
        </draw:line>
        <draw:line draw:style-name="gr112" draw:text-style-name="P15" draw:layer="layout" svg:x1="11.4cm" svg:y1="10.3cm" svg:x2="14.401cm" svg:y2="10.3cm">
          <text:p/>
        </draw:line>
        <draw:custom-shape draw:name="자유형: 도형 62" draw:style-name="gr113" draw:text-style-name="P32" xml:id="id64" draw:id="id64" draw:layer="layout" svg:width="4.5cm" svg:height="1.199cm" svg:x="1.101cm" svg:y="13.501cm">
          <text:p text:style-name="P31"><text:span text:style-name="T23">대시보드 리뷰관리 클릭</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63" draw:style-name="gr114" draw:text-style-name="P32" xml:id="id65" draw:id="id65" draw:layer="layout" svg:width="4.9cm" svg:height="1.199cm" svg:x="8.1cm" svg:y="13.501cm">
          <text:p text:style-name="P31"><text:span text:style-name="T23">고객이 작성한 리뷰 클릭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64" draw:style-name="gr98" draw:text-style-name="P13" draw:layer="layout" svg:width="4.3cm" svg:height="1.25cm" svg:x="1.201cm" svg:y="11.601cm">
          <text:p text:style-name="P11"><text:span text:style-name="T10">판매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65" draw:style-name="gr115" draw:text-style-name="P32" draw:layer="layout" svg:width="3.899cm" svg:height="1.7cm" svg:x="15.101cm" svg:y="13.3cm">
          <text:p text:style-name="P31"><text:span text:style-name="T23">리뷰 대댓글 <text:s/></text:span></text:p>
          <text:p text:style-name="P31"><text:span text:style-name="T23">작성 </text:span><text:span text:style-name="T23">/ </text:span><text:span text:style-name="T23">수정</text:span><text:span text:style-name="T23">/ </text:span><text:span text:style-name="T23">삭제</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67" draw:style-name="gr116" draw:text-style-name="P32" draw:layer="layout" svg:width="5.199cm" svg:height="1.7cm" svg:x="22.001cm" svg:y="13.201cm">
          <text:p text:style-name="P31"><text:span text:style-name="T23">대댓글 <text:s/></text:span></text:p>
          <text:p text:style-name="P31"><text:span text:style-name="T23">작성 </text:span><text:span text:style-name="T23">/ </text:span><text:span text:style-name="T23">수정</text:span><text:span text:style-name="T23">/ </text:span><text:span text:style-name="T23">삭제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style-name="gr117" draw:text-style-name="P15" draw:layer="layout" draw:type="line" svg:x1="5.601cm" svg:y1="14.1cm" svg:x2="8.1cm" svg:y2="14.1cm" draw:start-shape="id64" draw:start-glue-point="1" draw:end-shape="id65" draw:end-glue-point="3" svg:d="M5601 14100h2499" svg:viewBox="0 0 2500 1">
          <text:p/>
        </draw:connector>
        <draw:line draw:style-name="gr118" draw:text-style-name="P15" draw:layer="layout" svg:x1="13cm" svg:y1="14.1cm" svg:x2="15.101cm" svg:y2="14.1cm">
          <text:p/>
        </draw:line>
        <draw:line draw:style-name="gr119" draw:text-style-name="P15" draw:layer="layout" svg:x1="19cm" svg:y1="14cm" svg:x2="22.001cm" svg:y2="14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4">
          <draw:frame draw:name="슬라이드 번호 개체 틀 8"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4" draw:style-name="gr10" draw:layer="layout" svg:width="19.786cm" svg:height="11.135cm" svg:x="0.604cm" svg:y="2.258cm" draw:page-number="12" presentation:class="page"/>
          <draw:frame draw:name="슬라이드 노트 개체 틀 5" presentation:style-name="pr1" draw:text-style-name="P21" draw:layer="layout" svg:width="16.799cm" svg:height="13.364cm" svg:x="2.1cm" svg:y="14.107cm" presentation:class="notes" presentation:placeholder="true">
            <draw:text-box/>
          </draw:frame>
        </presentation:notes>
      </draw:page>
      <draw:page draw:name="page13" draw:style-name="dp1" draw:master-page-name="Master2-Layout2-blank-빈-화면" presentation:presentation-page-layout-name="AL1T14">
        <draw:frame draw:name="그림 5"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6" draw:style-name="gr2" draw:text-style-name="P17" draw:layer="layout" svg:width="6.5cm" svg:height="1cm" svg:x="1cm" svg:y="14.5cm">
          <draw:text-box>
            <text:p text:style-name="P25"><text:span text:style-name="T1"><text:date style:data-style-name="D1" text:date-value="2026-01-15">1/15/26</text:date></text:span></text:p>
          </draw:text-box>
        </draw:frame>
        <draw:frame draw:name="슬라이드 번호 개체 틀 11" draw:style-name="gr2" draw:text-style-name="P17" draw:layer="layout" svg:width="6.5cm" svg:height="1cm" svg:x="20.5cm" svg:y="14.5cm">
          <draw:text-box>
            <text:p text:style-name="P20"><text:span text:style-name="T1"><text:page-number>&lt;숫자&gt;</text:page-number></text:span></text:p>
          </draw:text-box>
        </draw:frame>
        <draw:frame draw:name="TextBox 8" draw:style-name="gr15" draw:text-style-name="P17" draw:layer="layout" svg:width="3.298cm" svg:height="1.026cm" svg:x="0.181cm" svg:y="0.127cm">
          <draw:text-box>
            <text:p text:style-name="P16"><text:span text:style-name="T6">PROCESS</text:span></text:p>
          </draw:text-box>
        </draw:frame>
        <draw:custom-shape draw:name="자유형: 도형 69" draw:style-name="gr98" draw:text-style-name="P13" draw:layer="layout" svg:width="4.3cm" svg:height="1.25cm" svg:x="1.2cm" svg:y="2.7cm">
          <text:p text:style-name="P11"><text:span text:style-name="T10">관리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47" draw:text-style-name="P19" draw:layer="layout" svg:width="2.4cm" svg:height="1.267cm" svg:x="23.6cm" svg:y="1.172cm">
          <draw:text-box>
            <text:p><text:span text:style-name="T7">공지 사항</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70" draw:style-name="gr120" draw:text-style-name="P23" draw:layer="layout" svg:width="2.999cm" svg:height="1.199cm" svg:x="1.501cm" svg:y="6.601cm">
          <text:p text:style-name="P11"><text:span text:style-name="T21">공지사항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76" draw:style-name="gr103" draw:text-style-name="P23" draw:layer="layout" svg:width="2.599cm" svg:height="0.9cm" svg:x="24.401cm" svg:y="4.105cm">
          <text:p text:style-name="P11"><text:span text:style-name="T21"><text:s/></text:span><text:span text:style-name="T21">등록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82" draw:style-name="gr103" draw:text-style-name="P23" draw:layer="layout" svg:width="2.599cm" svg:height="0.9cm" svg:x="24.401cm" svg:y="6.706cm">
          <text:p text:style-name="P11"><text:span text:style-name="T21"><text:s/></text:span><text:span text:style-name="T21">수정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83" draw:style-name="gr121" draw:text-style-name="P23" xml:id="id67" draw:id="id67" draw:layer="layout" svg:width="3.8cm" svg:height="0.9cm" svg:x="8.1cm" svg:y="4.103cm">
          <text:p text:style-name="P11"><text:span text:style-name="T21">공지사항 작성</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86" draw:style-name="gr122" draw:text-style-name="P23" draw:layer="layout" svg:width="4.799cm" svg:height="1.196cm" svg:x="20.701cm" svg:y="9.704cm">
          <text:p text:style-name="P11"><text:span text:style-name="T21"><text:s/></text:span><text:span text:style-name="T21">공지사항 글 삭제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10" draw:text-style-name="P15" draw:layer="layout" svg:x1="19.6cm" svg:y1="7.2cm" svg:x2="24.401cm" svg:y2="7.2cm">
          <text:p/>
        </draw:line>
        <draw:custom-shape draw:name="자유형: 도형 87" draw:style-name="gr113" draw:text-style-name="P23" draw:layer="layout" svg:width="4.5cm" svg:height="1.199cm" svg:x="1.301cm" svg:y="13.501cm">
          <text:p text:style-name="P11"><text:span text:style-name="T21">공지사항 목록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89" draw:style-name="gr123" draw:text-style-name="P13" draw:layer="layout" svg:width="5.799cm" svg:height="1.25cm" svg:x="1.201cm" svg:y="11.601cm">
          <text:p text:style-name="P11"><text:span text:style-name="T10">일반 회원 </text:span><text:span text:style-name="T10">/</text:span><text:span text:style-name="T10">판매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93" draw:style-name="gr124" draw:text-style-name="P23" draw:layer="layout" svg:width="4.399cm" svg:height="1.7cm" svg:x="11.701cm" svg:y="13.1cm">
          <text:p text:style-name="P11"><text:span text:style-name="T21">공지사항 목록 출력</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96" draw:style-name="gr125" draw:text-style-name="P23" draw:layer="layout" svg:width="3.499cm" svg:height="1.299cm" svg:x="22.001cm" svg:y="13.301cm">
          <text:p text:style-name="P11"><text:span text:style-name="T21">글 선택 </text:span><text:span text:style-name="T21">/ </text:span><text:span text:style-name="T21">글 출력</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68" draw:style-name="gr126" draw:text-style-name="P23" draw:layer="layout" svg:width="3.999cm" svg:height="1.596cm" svg:x="8.001cm" svg:y="6.404cm">
          <text:p text:style-name="P11"><text:span text:style-name="T21">공지사항 작성글</text:span></text:p>
          <text:p text:style-name="P11"><text:span text:style-name="T21">수정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71" draw:style-name="gr126" draw:text-style-name="P23" xml:id="id66" draw:id="id66" draw:layer="layout" svg:width="3.999cm" svg:height="1.596cm" svg:x="8.001cm" svg:y="9.505cm">
          <text:p text:style-name="P11"><text:span text:style-name="T21">삭제할 <text:s/>공지사항</text:span></text:p>
          <text:p text:style-name="P11"><text:span text:style-name="T21"><text:s/></text:span><text:span text:style-name="T21">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72" draw:style-name="gr121" draw:text-style-name="P23" draw:layer="layout" svg:width="3.8cm" svg:height="0.9cm" svg:x="16.501cm" svg:y="4.104cm">
          <text:p text:style-name="P11"><text:span text:style-name="T21">양식에 맞게 작성</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73" draw:style-name="gr126" draw:text-style-name="P23" draw:layer="layout" svg:width="3.999cm" svg:height="1.596cm" svg:x="16.501cm" svg:y="6.405cm">
          <text:p text:style-name="P11"><text:span text:style-name="T21">공지사항 작성글</text:span></text:p>
          <text:p text:style-name="P11"><text:span text:style-name="T21">수정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27" draw:text-style-name="P15" draw:layer="layout" svg:x1="12cm" svg:y1="10.3cm" svg:x2="20.701cm" svg:y2="10.3cm">
          <text:p/>
        </draw:line>
        <draw:line draw:style-name="gr128" draw:text-style-name="P15" draw:layer="layout" svg:x1="12cm" svg:y1="7.3cm" svg:x2="16.501cm" svg:y2="7.3cm">
          <text:p/>
        </draw:line>
        <draw:line draw:style-name="gr129" draw:text-style-name="P15" draw:layer="layout" svg:x1="11.9cm" svg:y1="4.6cm" svg:x2="16.5cm" svg:y2="4.6cm">
          <text:p/>
        </draw:line>
        <draw:line draw:style-name="gr130" draw:text-style-name="P15" draw:layer="layout" svg:x1="20.301cm" svg:y1="4.5cm" svg:x2="24.401cm" svg:y2="4.5cm">
          <text:p/>
        </draw:line>
        <draw:connector draw:style-name="gr131" draw:text-style-name="P15" draw:layer="layout" draw:line-skew="-0.982cm" svg:x1="8.001cm" svg:y1="10.303cm" svg:x2="8.1cm" svg:y2="4.553cm" draw:start-shape="id66" draw:start-glue-point="3" draw:end-shape="id67" draw:end-glue-point="3" svg:d="M8001 10303h-1501v-5750h1600" svg:viewBox="0 0 1601 5751">
          <text:p/>
        </draw:connector>
        <draw:line draw:style-name="gr79" draw:text-style-name="P15" draw:layer="layout" svg:x1="4.5cm" svg:y1="7.3cm" svg:x2="8cm" svg:y2="7.3cm">
          <text:p/>
        </draw:line>
        <draw:line draw:style-name="gr132" draw:text-style-name="P15" draw:layer="layout" svg:x1="5.801cm" svg:y1="14cm" svg:x2="11.701cm" svg:y2="14cm">
          <text:p/>
        </draw:line>
        <draw:line draw:style-name="gr133" draw:text-style-name="P15" draw:layer="layout" svg:x1="16.1cm" svg:y1="14cm" svg:x2="22.001cm" svg:y2="14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4">
          <draw:frame draw:name="슬라이드 번호 개체 틀 12"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6" draw:style-name="gr10" draw:layer="layout" svg:width="19.786cm" svg:height="11.135cm" svg:x="0.604cm" svg:y="2.258cm" draw:page-number="13" presentation:class="page"/>
          <draw:frame draw:name="슬라이드 노트 개체 틀 7" presentation:style-name="pr1" draw:text-style-name="P21" draw:layer="layout" svg:width="16.799cm" svg:height="13.364cm" svg:x="2.1cm" svg:y="14.107cm" presentation:class="notes" presentation:placeholder="true">
            <draw:text-box/>
          </draw:frame>
        </presentation:notes>
      </draw:page>
      <draw:page draw:name="page14" draw:style-name="dp1" draw:master-page-name="Master2-Layout2-blank-빈-화면" presentation:presentation-page-layout-name="AL1T14">
        <draw:frame draw:name="그림 6"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7" draw:style-name="gr2" draw:text-style-name="P33" draw:layer="layout" svg:width="6.5cm" svg:height="1cm" svg:x="1cm" svg:y="14.5cm">
          <draw:text-box>
            <text:p text:style-name="P25"><text:span text:style-name="T1"><text:date style:data-style-name="D1" text:date-value="2026-01-15">1/15/26</text:date></text:span></text:p>
          </draw:text-box>
        </draw:frame>
        <draw:frame draw:name="슬라이드 번호 개체 틀 13" draw:style-name="gr2" draw:text-style-name="P34" draw:layer="layout" svg:width="6.5cm" svg:height="1cm" svg:x="20.5cm" svg:y="14.5cm">
          <draw:text-box>
            <text:p text:style-name="P20"><text:span text:style-name="T1"><text:page-number>&lt;숫자&gt;</text:page-number></text:span></text:p>
          </draw:text-box>
        </draw:frame>
        <draw:frame draw:name="TextBox 10" draw:style-name="gr15" draw:text-style-name="P35" draw:layer="layout" svg:width="3.298cm" svg:height="1.026cm" svg:x="0.181cm" svg:y="0.127cm">
          <draw:text-box>
            <text:p text:style-name="P16"><text:span text:style-name="T6">PROCESS</text:span></text:p>
          </draw:text-box>
        </draw:fram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47" draw:text-style-name="P19" draw:layer="layout" svg:width="2.9cm" svg:height="1.267cm" svg:x="23.6cm" svg:y="1.172cm">
          <draw:text-box>
            <text:p><text:span text:style-name="T7">QNA </text:span><text:span text:style-name="T7">게시판</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75" draw:style-name="gr120" draw:text-style-name="P37" draw:layer="layout" svg:width="2.999cm" svg:height="1.199cm" svg:x="1.501cm" svg:y="6.601cm">
          <text:p text:style-name="P36"><text:span text:style-name="T23">QNA <text:s/></text:span><text:span text:style-name="T23">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77" draw:style-name="gr103" draw:text-style-name="P39" draw:layer="layout" svg:width="2.599cm" svg:height="0.9cm" svg:x="24.401cm" svg:y="4.105cm">
          <text:p text:style-name="P38"><text:span text:style-name="T21"><text:s/></text:span><text:span text:style-name="T23">등록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88" draw:style-name="gr103" draw:text-style-name="P39" draw:layer="layout" svg:width="2.599cm" svg:height="0.9cm" svg:x="24.401cm" svg:y="6.706cm">
          <text:p text:style-name="P38"><text:span text:style-name="T21"><text:s/></text:span><text:span text:style-name="T23">수정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03" draw:style-name="gr121" draw:text-style-name="P32" xml:id="id69" draw:id="id69" draw:layer="layout" svg:width="3.8cm" svg:height="0.9cm" svg:x="8.1cm" svg:y="4.103cm">
          <text:p text:style-name="P31"><text:span text:style-name="T23">QNA </text:span><text:span text:style-name="T23">작성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06" draw:style-name="gr122" draw:text-style-name="P41" draw:layer="layout" svg:width="4.799cm" svg:height="1.196cm" svg:x="20.701cm" svg:y="9.704cm">
          <text:p text:style-name="P40"><text:span text:style-name="T24"><text:s/></text:span><text:span text:style-name="T23">QNA </text:span><text:span text:style-name="T23">글 삭제 완료</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10" draw:text-style-name="P15" draw:layer="layout" svg:x1="19.6cm" svg:y1="7.2cm" svg:x2="24.401cm" svg:y2="7.2cm">
          <text:p/>
        </draw:line>
        <draw:custom-shape draw:name="자유형: 도형 107" draw:style-name="gr134" draw:text-style-name="P32" draw:layer="layout" svg:width="4.5cm" svg:height="1.199cm" svg:x="1.301cm" svg:y="13.101cm">
          <text:p text:style-name="P31"><text:span text:style-name="T23">QNA <text:s/></text:span><text:span text:style-name="T23">게시판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08" draw:style-name="gr123" draw:text-style-name="P42" draw:layer="layout" svg:width="5.799cm" svg:height="1.25cm" svg:x="0.901cm" svg:y="11.301cm">
          <text:p text:style-name="P38"><text:span text:style-name="T10">관리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109" draw:style-name="gr135" draw:text-style-name="P32" xml:id="id70" draw:id="id70" draw:layer="layout" svg:width="4.399cm" svg:height="1.4cm" svg:x="9.301cm" svg:y="13cm">
          <text:p text:style-name="P31"><text:span text:style-name="T23">QNA </text:span><text:span text:style-name="T23">글 선택</text:span><text:span text:style-name="T23">/ </text:span><text:span text:style-name="T23">출력</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0" draw:style-name="gr136" draw:text-style-name="P39" xml:id="id71" draw:id="id71" draw:layer="layout" svg:width="3.499cm" svg:height="0.899cm" svg:x="17.201cm" svg:y="12.101cm">
          <text:p text:style-name="P38"><text:span text:style-name="T25"><text:s/></text:span><text:span text:style-name="T23">QNA </text:span><text:span text:style-name="T23">댓글 작성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1" draw:style-name="gr137" draw:text-style-name="P37" draw:layer="layout" svg:width="3.999cm" svg:height="1.596cm" svg:x="8.001cm" svg:y="6.404cm">
          <text:p text:style-name="P36"><text:span text:style-name="T26">작성한 </text:span><text:span text:style-name="T23">QNA </text:span></text:p>
          <text:p text:style-name="P36"><text:span text:style-name="T23">문의 글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2" draw:style-name="gr138" draw:text-style-name="P32" xml:id="id68" draw:id="id68" draw:layer="layout" svg:width="3.999cm" svg:height="1.596cm" svg:x="8.001cm" svg:y="9.505cm">
          <text:p text:style-name="P31"><text:span text:style-name="T26">삭제할 <text:s/></text:span><text:span text:style-name="T23">QNA</text:span></text:p>
          <text:p text:style-name="P31"><text:span text:style-name="T23"><text:s/></text:span><text:span text:style-name="T23">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4" draw:style-name="gr121" draw:text-style-name="P32" draw:layer="layout" svg:width="3.8cm" svg:height="0.9cm" svg:x="16.501cm" svg:y="4.104cm">
          <text:p text:style-name="P31"><text:span text:style-name="T23">양식에 맞게 작성</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5" draw:style-name="gr126" draw:text-style-name="P32" draw:layer="layout" svg:width="3.999cm" svg:height="1.596cm" svg:x="16.501cm" svg:y="6.405cm">
          <text:p text:style-name="P31"><text:span text:style-name="T23">QNA </text:span><text:span text:style-name="T23">작성글</text:span></text:p>
          <text:p text:style-name="P31"><text:span text:style-name="T23">수정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27" draw:text-style-name="P15" draw:layer="layout" svg:x1="12cm" svg:y1="10.3cm" svg:x2="20.701cm" svg:y2="10.3cm">
          <text:p/>
        </draw:line>
        <draw:line draw:style-name="gr128" draw:text-style-name="P15" draw:layer="layout" svg:x1="12cm" svg:y1="7.3cm" svg:x2="16.501cm" svg:y2="7.3cm">
          <text:p/>
        </draw:line>
        <draw:line draw:style-name="gr129" draw:text-style-name="P15" draw:layer="layout" svg:x1="11.9cm" svg:y1="4.6cm" svg:x2="16.5cm" svg:y2="4.6cm">
          <text:p/>
        </draw:line>
        <draw:line draw:style-name="gr130" draw:text-style-name="P15" draw:layer="layout" svg:x1="20.301cm" svg:y1="4.5cm" svg:x2="24.401cm" svg:y2="4.5cm">
          <text:p/>
        </draw:line>
        <draw:connector draw:style-name="gr131" draw:text-style-name="P15" draw:layer="layout" draw:line-skew="-0.982cm" svg:x1="8.001cm" svg:y1="10.303cm" svg:x2="8.1cm" svg:y2="4.553cm" draw:start-shape="id68" draw:start-glue-point="3" draw:end-shape="id69" draw:end-glue-point="3" svg:d="M8001 10303h-1501v-5750h1600" svg:viewBox="0 0 1601 5751">
          <text:p/>
        </draw:connector>
        <draw:line draw:style-name="gr79" draw:text-style-name="P15" draw:layer="layout" svg:x1="4.5cm" svg:y1="7.3cm" svg:x2="8cm" svg:y2="7.3cm">
          <text:p/>
        </draw:line>
        <draw:custom-shape draw:name="자유형: 도형 74" draw:style-name="gr123" draw:text-style-name="P42" draw:layer="layout" svg:width="5.799cm" svg:height="1.25cm" svg:x="0.801cm" svg:y="2.702cm">
          <text:p text:style-name="P38"><text:span text:style-name="T10">일반 회원 </text:span><text:span text:style-name="T10">/</text:span><text:span text:style-name="T10">판매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130" draw:style-name="gr139" draw:text-style-name="P39" xml:id="id73" draw:id="id73" draw:layer="layout" svg:width="3.499cm" svg:height="0.899cm" svg:x="17.201cm" svg:y="13.201cm">
          <text:p text:style-name="P38"><text:span text:style-name="T25"><text:s/></text:span><text:span text:style-name="T23">QNA </text:span><text:span text:style-name="T23">댓글 수정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31" draw:style-name="gr140" draw:text-style-name="P39" xml:id="id72" draw:id="id72" draw:layer="layout" svg:width="3.499cm" svg:height="0.899cm" svg:x="17.201cm" svg:y="14.301cm">
          <text:p text:style-name="P38"><text:span text:style-name="T25"><text:s/></text:span><text:span text:style-name="T23">QNA </text:span><text:span text:style-name="T23">댓글 삭제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41" draw:text-style-name="P15" draw:layer="layout" svg:x1="5.801cm" svg:y1="13.7cm" svg:x2="9.301cm" svg:y2="13.7cm">
          <text:p/>
        </draw:line>
        <draw:connector draw:style-name="gr142" draw:text-style-name="P15" draw:layer="layout" draw:type="line" svg:x1="13.7cm" svg:y1="13.7cm" svg:x2="17.201cm" svg:y2="12.55cm" draw:start-shape="id70" draw:start-glue-point="1" draw:end-shape="id71" draw:end-glue-point="3" svg:d="M13700 13700l3501-1150" svg:viewBox="0 0 3502 1151">
          <text:p/>
        </draw:connector>
        <draw:connector draw:style-name="gr143" draw:text-style-name="P15" draw:layer="layout" draw:type="line" svg:x1="13.7cm" svg:y1="13.7cm" svg:x2="17.201cm" svg:y2="14.75cm" draw:start-shape="id70" draw:start-glue-point="1" draw:end-shape="id72" svg:d="M13700 13700l3501 1050" svg:viewBox="0 0 3502 1051">
          <text:p/>
        </draw:connector>
        <draw:connector draw:style-name="gr144" draw:text-style-name="P15" draw:layer="layout" draw:type="line" svg:x1="13.7cm" svg:y1="13.7cm" svg:x2="17.201cm" svg:y2="13.65cm" draw:start-shape="id70" draw:start-glue-point="1" draw:end-shape="id73" draw:end-glue-point="3" svg:d="M13700 13700l3501-50" svg:viewBox="0 0 3502 51">
          <text:p/>
        </draw:connector>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4">
          <draw:frame draw:name="슬라이드 번호 개체 틀 14" draw:style-name="gr9" draw:text-style-name="P34" draw:layer="layout" svg:width="9.113cm" svg:height="1.484cm" svg:x="11.886cm" svg:y="28.215cm">
            <draw:text-box>
              <text:p text:style-name="P20"><text:span text:style-name="T1"><text:page-number>&lt;숫자&gt;</text:page-number></text:span></text:p>
            </draw:text-box>
          </draw:frame>
          <draw:page-thumbnail draw:name="슬라이드 이미지 개체 틀 7" draw:style-name="gr10" draw:layer="layout" svg:width="19.786cm" svg:height="11.135cm" svg:x="0.604cm" svg:y="2.258cm" draw:page-number="14" presentation:class="page"/>
          <draw:frame draw:name="슬라이드 노트 개체 틀 8" presentation:style-name="pr1" draw:text-style-name="P9" draw:layer="layout" svg:width="16.799cm" svg:height="13.364cm" svg:x="2.1cm" svg:y="14.107cm" presentation:class="notes" presentation:placeholder="true">
            <draw:text-box/>
          </draw:frame>
        </presentation:notes>
      </draw:page>
      <draw:page draw:name="page15" draw:style-name="dp1" draw:master-page-name="Master2-Layout2-blank-빈-화면" presentation:presentation-page-layout-name="AL1T14">
        <draw:frame draw:name="그림 7"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8" draw:style-name="gr2" draw:text-style-name="P33" draw:layer="layout" svg:width="6.5cm" svg:height="1cm" svg:x="1cm" svg:y="14.5cm">
          <draw:text-box>
            <text:p text:style-name="P25"><text:span text:style-name="T1"><text:date style:data-style-name="D1" text:date-value="2026-01-15">1/15/26</text:date></text:span></text:p>
          </draw:text-box>
        </draw:frame>
        <draw:frame draw:name="슬라이드 번호 개체 틀 15" draw:style-name="gr2" draw:text-style-name="P34" draw:layer="layout" svg:width="6.5cm" svg:height="1cm" svg:x="20.5cm" svg:y="14.5cm">
          <draw:text-box>
            <text:p text:style-name="P20"><text:span text:style-name="T1"><text:page-number>&lt;숫자&gt;</text:page-number></text:span></text:p>
          </draw:text-box>
        </draw:frame>
        <draw:frame draw:name="TextBox 12" draw:style-name="gr15" draw:text-style-name="P35" draw:layer="layout" svg:width="3.298cm" svg:height="1.026cm" svg:x="0.181cm" svg:y="0.127cm">
          <draw:text-box>
            <text:p text:style-name="P16"><text:span text:style-name="T6">PROCESS</text:span></text:p>
          </draw:text-box>
        </draw:fram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47" draw:text-style-name="P19" draw:layer="layout" svg:width="2.9cm" svg:height="1.267cm" svg:x="23.6cm" svg:y="1.172cm">
          <draw:text-box>
            <text:p><text:span text:style-name="T7"><text:s text:c="2"/></text:span><text:span text:style-name="T7">쿠폰</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129" draw:style-name="gr120" draw:text-style-name="P37" draw:layer="layout" svg:width="2.999cm" svg:height="1.199cm" svg:x="1.501cm" svg:y="5.301cm">
          <text:p text:style-name="P36"><text:span text:style-name="T23">마이 페이지</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33" draw:style-name="gr103" draw:text-style-name="P32" draw:layer="layout" svg:width="2.599cm" svg:height="0.9cm" svg:x="19.601cm" svg:y="5.506cm">
          <text:p text:style-name="P31"><text:span text:style-name="T23">쿠폰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36" draw:style-name="gr145" draw:text-style-name="P32" draw:layer="layout" svg:width="3.199cm" svg:height="1.199cm" svg:x="1.401cm" svg:y="12.101cm">
          <text:p text:style-name="P31"><text:span text:style-name="T23">쿠폰관리 선택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37" draw:style-name="gr123" draw:text-style-name="P42" draw:layer="layout" svg:width="5.799cm" svg:height="1.25cm" svg:x="0.901cm" svg:y="8.701cm">
          <text:p text:style-name="P38"><text:span text:style-name="T10">판매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138" draw:style-name="gr146" draw:text-style-name="P32" draw:layer="layout" svg:width="4.199cm" svg:height="1cm" svg:x="6.601cm" svg:y="12.2cm">
          <text:p text:style-name="P31"><text:span text:style-name="T23">새 쿠폰 발급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39" draw:style-name="gr147" draw:text-style-name="P32" draw:layer="layout" svg:width="3.799cm" svg:height="1.399cm" svg:x="12.801cm" svg:y="12.001cm">
          <text:p text:style-name="P31"><text:span text:style-name="T23">발급 할 쿠폰</text:span></text:p>
          <text:p text:style-name="P31"><text:span text:style-name="T23"><text:s/></text:span><text:span text:style-name="T23">내용 작성</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40" draw:style-name="gr148" draw:text-style-name="P37" draw:layer="layout" svg:width="3.999cm" svg:height="0.996cm" svg:x="6.601cm" svg:y="5.404cm">
          <text:p text:style-name="P36"><text:span text:style-name="T23">쿠폰함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43" draw:style-name="gr149" draw:text-style-name="P32" draw:layer="layout" svg:width="3.999cm" svg:height="1.5cm" svg:x="13.301cm" svg:y="5.2cm">
          <text:p text:style-name="P31"><text:span text:style-name="T23">쿠폰 목록 출력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44" draw:style-name="gr123" draw:text-style-name="P42" draw:layer="layout" svg:width="5.799cm" svg:height="1.25cm" svg:x="0.801cm" svg:y="2.702cm">
          <text:p text:style-name="P38"><text:span text:style-name="T10">일반 회원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132" draw:style-name="gr150" draw:text-style-name="P32" draw:layer="layout" svg:width="3.699cm" svg:height="0.999cm" svg:x="18.501cm" svg:y="12.201cm">
          <text:p text:style-name="P31"><text:span text:style-name="T23">쿠폰 생성</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34" draw:style-name="gr151" draw:text-style-name="P32" draw:layer="layout" svg:width="3.099cm" svg:height="0.9cm" svg:x="23.901cm" svg:y="5.507cm">
          <text:p text:style-name="P31"><text:span text:style-name="T23">쿠폰 정보 출력</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52" draw:text-style-name="P15" draw:layer="layout" svg:x1="4.5cm" svg:y1="5.9cm" svg:x2="6.601cm" svg:y2="5.9cm">
          <text:p/>
        </draw:line>
        <draw:line draw:style-name="gr153" draw:text-style-name="P15" draw:layer="layout" svg:x1="10.6cm" svg:y1="6cm" svg:x2="13.301cm" svg:y2="6cm">
          <text:p/>
        </draw:line>
        <draw:line draw:style-name="gr154" draw:text-style-name="P15" draw:layer="layout" svg:x1="17.3cm" svg:y1="6cm" svg:x2="19.601cm" svg:y2="6cm">
          <text:p/>
        </draw:line>
        <draw:line draw:style-name="gr155" draw:text-style-name="P15" draw:layer="layout" svg:x1="22.2cm" svg:y1="6cm" svg:x2="23.901cm" svg:y2="6cm">
          <text:p/>
        </draw:line>
        <draw:line draw:style-name="gr156" draw:text-style-name="P15" draw:layer="layout" svg:x1="4.6cm" svg:y1="12.7cm" svg:x2="6.601cm" svg:y2="12.7cm">
          <text:p/>
        </draw:line>
        <draw:line draw:style-name="gr157" draw:text-style-name="P15" draw:layer="layout" svg:x1="10.8cm" svg:y1="12.7cm" svg:x2="12.801cm" svg:y2="12.7cm">
          <text:p/>
        </draw:line>
        <draw:line draw:style-name="gr158" draw:text-style-name="P15" draw:layer="layout" svg:x1="16.6cm" svg:y1="12.7cm" svg:x2="18.5cm" svg:y2="12.7cm">
          <text:p/>
        </draw:line>
        <draw:custom-shape draw:style-name="gr159" draw:text-style-name="P44" draw:layer="layout" svg:width="4.201cm" svg:height="3.601cm" draw:transform="skewX (0.0010471975511966) rotate (0.000872664625997165) translate (23.1cm 10.903cm)">
          <text:p text:style-name="P43"><text:span text:style-name="T27">조건에 맞는 고객 쿠폰 자동 발급</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4">
          <draw:frame draw:name="슬라이드 번호 개체 틀 16" draw:style-name="gr9" draw:text-style-name="P34" draw:layer="layout" svg:width="9.113cm" svg:height="1.484cm" svg:x="11.886cm" svg:y="28.215cm">
            <draw:text-box>
              <text:p text:style-name="P20"><text:span text:style-name="T1"><text:page-number>&lt;숫자&gt;</text:page-number></text:span></text:p>
            </draw:text-box>
          </draw:frame>
          <draw:page-thumbnail draw:name="슬라이드 이미지 개체 틀 8" draw:style-name="gr10" draw:layer="layout" svg:width="19.786cm" svg:height="11.135cm" svg:x="0.604cm" svg:y="2.258cm" draw:page-number="15" presentation:class="page"/>
          <draw:frame draw:name="슬라이드 노트 개체 틀 9" presentation:style-name="pr1" draw:text-style-name="P9" draw:layer="layout" svg:width="16.799cm" svg:height="13.364cm" svg:x="2.1cm" svg:y="14.107cm" presentation:class="notes" presentation:placeholder="true">
            <draw:text-box/>
          </draw:frame>
        </presentation:notes>
      </draw:page>
      <draw:page draw:name="page16" draw:style-name="dp1" draw:master-page-name="Master2-Layout2-blank-빈-화면" presentation:presentation-page-layout-name="AL1T14">
        <draw:frame draw:name="그림 8"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9" draw:style-name="gr2" draw:text-style-name="P33" draw:layer="layout" svg:width="6.5cm" svg:height="1cm" svg:x="1cm" svg:y="14.5cm">
          <draw:text-box>
            <text:p text:style-name="P25"><text:span text:style-name="T1"><text:date style:data-style-name="D1" text:date-value="2026-01-15">1/15/26</text:date></text:span></text:p>
          </draw:text-box>
        </draw:frame>
        <draw:frame draw:name="슬라이드 번호 개체 틀 17" draw:style-name="gr2" draw:text-style-name="P34" draw:layer="layout" svg:width="6.5cm" svg:height="1cm" svg:x="20.5cm" svg:y="14.5cm">
          <draw:text-box>
            <text:p text:style-name="P20"><text:span text:style-name="T1"><text:page-number>&lt;숫자&gt;</text:page-number></text:span></text:p>
          </draw:text-box>
        </draw:frame>
        <draw:frame draw:name="TextBox 13" draw:style-name="gr15" draw:text-style-name="P35" draw:layer="layout" svg:width="3.298cm" svg:height="1.026cm" svg:x="0.181cm" svg:y="0.127cm">
          <draw:text-box>
            <text:p text:style-name="P16"><text:span text:style-name="T6">PROCESS</text:span></text:p>
          </draw:text-box>
        </draw:fram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47" draw:text-style-name="P19" draw:layer="layout" svg:width="2.9cm" svg:height="1.267cm" svg:x="23.2cm" svg:y="1.172cm">
          <draw:text-box>
            <text:p><text:span text:style-name="T7"><text:s text:c="3"/></text:span><text:span text:style-name="T7">찜 좋아요</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135" draw:style-name="gr120" draw:text-style-name="P37" draw:layer="layout" svg:width="2.999cm" svg:height="1.199cm" svg:x="1.201cm" svg:y="7.901cm">
          <text:p text:style-name="P36"><text:span text:style-name="T23">메인 화면</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49" draw:style-name="gr149" draw:text-style-name="P32" draw:layer="layout" svg:width="3.999cm" svg:height="1.5cm" svg:x="13.001cm" svg:y="7.8cm">
          <text:p text:style-name="P31"><text:span text:style-name="T23">맛집리스트가 나열된</text:span></text:p>
          <text:p text:style-name="P31"><text:span text:style-name="T23"><text:s/></text:span><text:span text:style-name="T23">페이지로 이동</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50" draw:style-name="gr123" draw:text-style-name="P42" draw:layer="layout" svg:width="5.799cm" svg:height="1.25cm" svg:x="0.801cm" svg:y="2.702cm">
          <text:p text:style-name="P38"><text:span text:style-name="T10">일반 회원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152" draw:style-name="gr151" draw:text-style-name="P32" draw:layer="layout" svg:width="3.099cm" svg:height="0.9cm" svg:x="24.101cm" svg:y="6.407cm">
          <text:p text:style-name="P31"><text:span text:style-name="T23">찜 추가</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52" draw:text-style-name="P15" draw:layer="layout" svg:x1="4.2cm" svg:y1="8.5cm" svg:x2="6.301cm" svg:y2="8.5cm">
          <text:p/>
        </draw:line>
        <draw:line draw:style-name="gr153" draw:text-style-name="P15" draw:layer="layout" svg:x1="10.3cm" svg:y1="8.6cm" svg:x2="13.001cm" svg:y2="8.6cm">
          <text:p/>
        </draw:line>
        <draw:custom-shape draw:name="자유형: 도형 141" draw:style-name="gr160" draw:text-style-name="P32" draw:layer="layout" svg:width="4.2cm" svg:height="1.8cm" svg:x="18.5cm" svg:y="7.7cm">
          <text:p text:style-name="P31"><text:span text:style-name="T23">원하는 가게</text:span></text:p>
          <text:p text:style-name="P31"><text:span text:style-name="T23">상단에 <text:s/>찜 또는 </text:span></text:p>
          <text:p text:style-name="P31"><text:span text:style-name="T23">좋아요 클릭</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42" draw:style-name="gr151" draw:text-style-name="P32" draw:layer="layout" svg:width="3.099cm" svg:height="0.9cm" svg:x="24.101cm" svg:y="7.408cm">
          <text:p text:style-name="P31">찜 삭제</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48" draw:style-name="gr161" draw:text-style-name="P37" draw:layer="layout" svg:width="4.399cm" svg:height="1.596cm" svg:x="6.301cm" svg:y="7.704cm">
          <text:p text:style-name="P36"><text:span text:style-name="T23">맛집리스트</text:span><text:span text:style-name="T23">/ </text:span><text:span text:style-name="T23">카테고리 </text:span></text:p>
          <text:p text:style-name="P36"><text:span text:style-name="T23"><text:s/></text:span><text:span text:style-name="T23">페이지 클릭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62" draw:text-style-name="P15" draw:layer="layout" svg:x1="17cm" svg:y1="8.5cm" svg:x2="18.5cm" svg:y2="8.5cm">
          <text:p/>
        </draw:line>
        <draw:custom-shape draw:name="자유형: 도형 120" draw:style-name="gr151" draw:text-style-name="P32" draw:layer="layout" svg:width="3.099cm" svg:height="0.9cm" svg:x="24.101cm" svg:y="9.108cm">
          <text:p text:style-name="P31"><text:span text:style-name="T23">좋아요 추가</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21" draw:style-name="gr151" draw:text-style-name="P32" draw:layer="layout" svg:width="3.099cm" svg:height="0.9cm" svg:x="24.101cm" svg:y="10.109cm">
          <text:p text:style-name="P31">좋아요 삭제</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63" draw:text-style-name="P15" draw:layer="layout" svg:x1="22.7cm" svg:y1="8.5cm" svg:x2="24cm" svg:y2="7.5cm">
          <text:p/>
        </draw:line>
        <draw:line draw:style-name="gr164" draw:text-style-name="P15" draw:layer="layout" svg:x1="22.7cm" svg:y1="8.5cm" svg:x2="24cm" svg:y2="10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2">
          <draw:frame draw:name="슬라이드 번호 개체 틀 18" draw:style-name="gr9" draw:text-style-name="P34" draw:layer="layout" svg:width="9.113cm" svg:height="1.484cm" svg:x="11.886cm" svg:y="28.215cm">
            <draw:text-box>
              <text:p text:style-name="P20"><text:span text:style-name="T1"><text:page-number>&lt;숫자&gt;</text:page-number></text:span></text:p>
            </draw:text-box>
          </draw:frame>
          <draw:page-thumbnail draw:name="슬라이드 이미지 개체 틀 9" draw:style-name="gr10" draw:layer="layout" svg:width="19.786cm" svg:height="11.135cm" svg:x="0.604cm" svg:y="2.258cm" draw:page-number="16" presentation:class="page"/>
          <draw:frame draw:name="슬라이드 노트 개체 틀 10" presentation:style-name="pr1" draw:text-style-name="P9" draw:layer="layout" svg:width="16.799cm" svg:height="13.364cm" svg:x="2.1cm" svg:y="14.107cm" presentation:class="notes" presentation:placeholder="true">
            <draw:text-box/>
          </draw:frame>
        </presentation:notes>
      </draw:page>
      <draw:page draw:name="page17" draw:style-name="dp1" draw:master-page-name="Master2-Layout2-blank-빈-화면" presentation:presentation-page-layout-name="AL1T14">
        <draw:frame draw:name="그림 9"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10" draw:style-name="gr2" draw:text-style-name="P33" draw:layer="layout" svg:width="6.5cm" svg:height="1cm" svg:x="1cm" svg:y="14.5cm">
          <draw:text-box>
            <text:p text:style-name="P25"><text:span text:style-name="T1"><text:date style:data-style-name="D1" text:date-value="2026-01-15">1/15/26</text:date></text:span></text:p>
          </draw:text-box>
        </draw:frame>
        <draw:frame draw:name="슬라이드 번호 개체 틀 19" draw:style-name="gr2" draw:text-style-name="P34" draw:layer="layout" svg:width="6.5cm" svg:height="1cm" svg:x="20.5cm" svg:y="14.5cm">
          <draw:text-box>
            <text:p text:style-name="P20"><text:span text:style-name="T1"><text:page-number>&lt;숫자&gt;</text:page-number></text:span></text:p>
          </draw:text-box>
        </draw:frame>
        <draw:frame draw:name="TextBox 14" draw:style-name="gr15" draw:text-style-name="P35" draw:layer="layout" svg:width="3.298cm" svg:height="1.026cm" svg:x="0.181cm" svg:y="0.127cm">
          <draw:text-box>
            <text:p text:style-name="P16"><text:span text:style-name="T6">PROCESS</text:span></text:p>
          </draw:text-box>
        </draw:fram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47" draw:text-style-name="P19" draw:layer="layout" svg:width="2.9cm" svg:height="1.267cm" svg:x="23.6cm" svg:y="1.172cm">
          <draw:text-box>
            <text:p><text:span text:style-name="T7"><text:s/></text:span><text:span text:style-name="T7">예약</text:span><text:span text:style-name="T7">/ </text:span><text:span text:style-name="T7">결제</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147" draw:style-name="gr123" draw:text-style-name="P42" draw:layer="layout" svg:width="5.799cm" svg:height="1.25cm" svg:x="0.801cm" svg:y="2.702cm">
          <text:p text:style-name="P38"><text:span text:style-name="T10">일반 회원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155" draw:style-name="gr165" draw:text-style-name="P37" draw:layer="layout" svg:width="4.399cm" svg:height="1.596cm" svg:x="0.801cm" svg:y="5.104cm">
          <text:p text:style-name="P36"><text:span text:style-name="T23">예약할 가게 목록 <text:s/>확인</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46" draw:style-name="gr149" draw:text-style-name="P32" draw:layer="layout" svg:width="3.999cm" svg:height="1.5cm" svg:x="7.101cm" svg:y="5.2cm">
          <text:p text:style-name="P31"><text:span text:style-name="T23">해당 가게 화면</text:span></text:p>
          <text:p text:style-name="P31"><text:span text:style-name="T23"><text:s/></text:span><text:span text:style-name="T23">으로 이동</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45" draw:style-name="gr166" draw:text-style-name="P32" draw:layer="layout" svg:width="3.7cm" svg:height="1.694cm" svg:x="18.101cm" svg:y="5.207cm">
          <text:p text:style-name="P31"><text:span text:style-name="T23">예약금 결제 </text:span></text:p>
          <text:p text:style-name="P31"><text:span text:style-name="T23">방식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51" draw:style-name="gr166" draw:text-style-name="P32" draw:layer="layout" svg:width="3.7cm" svg:height="1.694cm" svg:x="23.502cm" svg:y="5.108cm">
          <text:p text:style-name="P31"><text:span text:style-name="T23">결제 완료 후 </text:span></text:p>
          <text:p text:style-name="P31"><text:span text:style-name="T23">예약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style-name="gr167" draw:text-style-name="P45" draw:layer="layout" svg:width="6cm" svg:height="2cm" svg:x="21.5cm" svg:y="8.7cm">
          <text:p text:style-name="P6"><text:span text:style-name="T28">결제가 완료되면 사장님의 승인 후 예약이 완료</text:span></text:p>
          <text:p text:style-name="P6"><text:span text:style-name="T28">거절 하면 환불</text:span></text:p>
          <draw:enhanced-geometry svg:viewBox="0 0 21600 21600" draw:text-areas="800 800 20800 20800" draw:type="round-rectangular-callout" draw:modifiers="20484.1859690052 -15015.29235382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8" draw:text-style-name="P15" draw:layer="layout" svg:x1="5.2cm" svg:y1="5.9cm" svg:x2="7.101cm" svg:y2="5.9cm">
          <text:p/>
        </draw:line>
        <draw:line draw:style-name="gr169" draw:text-style-name="P15" draw:layer="layout" svg:x1="11.1cm" svg:y1="6cm" svg:x2="12.9cm" svg:y2="6cm">
          <text:p/>
        </draw:line>
        <draw:line draw:style-name="gr170" draw:text-style-name="P15" draw:layer="layout" svg:x1="16.6cm" svg:y1="6cm" svg:x2="18.101cm" svg:y2="6cm">
          <text:p/>
        </draw:line>
        <draw:line draw:style-name="gr171" draw:text-style-name="P15" draw:layer="layout" svg:x1="21.801cm" svg:y1="5.9cm" svg:x2="23.502cm" svg:y2="5.9cm">
          <text:p/>
        </draw:line>
        <draw:custom-shape draw:name="자유형: 도형 154" draw:style-name="gr123" draw:text-style-name="P42" draw:layer="layout" svg:width="5.799cm" svg:height="1.25cm" svg:x="0.801cm" svg:y="9.303cm">
          <text:p text:style-name="P38"><text:span text:style-name="T10">판매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156" draw:style-name="gr166" draw:text-style-name="P32" draw:layer="layout" svg:width="3.7cm" svg:height="1.694cm" svg:x="12.901cm" svg:y="12.207cm">
          <text:p text:style-name="P31"><text:span text:style-name="T23">대기중</text:span><text:span text:style-name="T23">/</text:span><text:span text:style-name="T23">취소 </text:span><text:span text:style-name="T23">/</text:span><text:span text:style-name="T23">승인</text:span></text:p>
          <text:p text:style-name="P31"><text:span text:style-name="T23">된 예약 확인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57" draw:style-name="gr172" draw:text-style-name="P37" draw:layer="layout" svg:width="4.399cm" svg:height="1.596cm" svg:x="0.802cm" svg:y="12.105cm">
          <text:p text:style-name="P36"><text:span text:style-name="T23">대시보드 내 <text:s/>예약 관리</text:span></text:p>
          <text:p text:style-name="P36"><text:span text:style-name="T23"><text:s/></text:span><text:span text:style-name="T23">창으로 이동</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58" draw:style-name="gr149" draw:text-style-name="P32" draw:layer="layout" svg:width="3.999cm" svg:height="1.5cm" svg:x="7.102cm" svg:y="12.201cm">
          <text:p text:style-name="P31"><text:span text:style-name="T23"><text:s/></text:span><text:span text:style-name="T23">예약 내역 확인</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68" draw:text-style-name="P15" draw:layer="layout" svg:x1="5.201cm" svg:y1="12.901cm" svg:x2="7.102cm" svg:y2="12.901cm">
          <text:p/>
        </draw:line>
        <draw:line draw:style-name="gr169" draw:text-style-name="P15" draw:layer="layout" svg:x1="11.101cm" svg:y1="13.001cm" svg:x2="12.901cm" svg:y2="13.001cm">
          <text:p/>
        </draw:line>
        <draw:custom-shape draw:name="자유형: 도형 159" draw:style-name="gr173" draw:text-style-name="P32" draw:layer="layout" svg:width="6.298cm" svg:height="1.694cm" svg:x="18.702cm" svg:y="12.208cm">
          <text:p text:style-name="P31"><text:span text:style-name="T23">예약 승인 </text:span><text:span text:style-name="T23">/</text:span><text:span text:style-name="T23">거절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74" draw:text-style-name="P15" draw:layer="layout" svg:x1="16.601cm" svg:y1="13cm" svg:x2="18.702cm" svg:y2="13cm">
          <text:p/>
        </draw:line>
        <draw:custom-shape draw:style-name="gr175" draw:text-style-name="P45" draw:layer="layout" svg:width="6cm" svg:height="2cm" svg:x="12.901cm" svg:y="8.005cm">
          <text:p text:style-name="P6"><text:span text:style-name="T28">1. </text:span><text:span text:style-name="T28">토스 페이 </text:span></text:p>
          <text:p text:style-name="P6"><text:span text:style-name="T28">2. </text:span><text:span text:style-name="T28">카카오 페이</text:span></text:p>
          <text:p text:style-name="P6"><text:span text:style-name="T28">3. </text:span><text:span text:style-name="T28">페이코 </text:span></text:p>
          <draw:enhanced-geometry svg:viewBox="0 0 21600 21600" draw:text-areas="800 800 20800 20800" draw:type="round-rectangular-callout" draw:modifiers="20484.1859690052 -15015.29235382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자유형: 도형 153" draw:style-name="gr176" draw:text-style-name="P32" draw:layer="layout" svg:width="4.1cm" svg:height="2.294cm" svg:x="12.9cm" svg:y="4.806cm">
          <text:p text:style-name="P31"><text:span text:style-name="T23">인원수 날짜등 그 외 </text:span></text:p>
          <text:p text:style-name="P31"><text:span text:style-name="T23">예약 할 <text:s/></text:span></text:p>
          <text:p text:style-name="P31"><text:span text:style-name="T23">기본 정보 입력</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2">
          <draw:frame draw:name="슬라이드 번호 개체 틀 20" draw:style-name="gr9" draw:text-style-name="P34" draw:layer="layout" svg:width="9.113cm" svg:height="1.484cm" svg:x="11.886cm" svg:y="28.215cm">
            <draw:text-box>
              <text:p text:style-name="P20"><text:span text:style-name="T1"><text:page-number>&lt;숫자&gt;</text:page-number></text:span></text:p>
            </draw:text-box>
          </draw:frame>
          <draw:page-thumbnail draw:name="슬라이드 이미지 개체 틀 10" draw:style-name="gr10" draw:layer="layout" svg:width="19.786cm" svg:height="11.135cm" svg:x="0.604cm" svg:y="2.258cm" draw:page-number="17" presentation:class="page"/>
          <draw:frame draw:name="슬라이드 노트 개체 틀 11" presentation:style-name="pr1" draw:text-style-name="P9" draw:layer="layout" svg:width="16.799cm" svg:height="13.364cm" svg:x="2.1cm" svg:y="14.107cm" presentation:class="notes" presentation:placeholder="true">
            <draw:text-box/>
          </draw:frame>
        </presentation:notes>
      </draw:page>
      <draw:page draw:name="page18" draw:style-name="dp1" draw:master-page-name="Master2-Layout2-blank-빈-화면" presentation:presentation-page-layout-name="AL1T14">
        <draw:frame draw:name="그림 10"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날짜 개체 틀 11" draw:style-name="gr2" draw:text-style-name="P33" draw:layer="layout" svg:width="6.5cm" svg:height="1cm" svg:x="1cm" svg:y="14.5cm">
          <draw:text-box>
            <text:p text:style-name="P25"><text:span text:style-name="T1"><text:date style:data-style-name="D1" text:date-value="2026-01-15">1/15/26</text:date></text:span></text:p>
          </draw:text-box>
        </draw:frame>
        <draw:frame draw:name="슬라이드 번호 개체 틀 21" draw:style-name="gr2" draw:text-style-name="P34" draw:layer="layout" svg:width="6.5cm" svg:height="1cm" svg:x="20.5cm" svg:y="14.5cm">
          <draw:text-box>
            <text:p text:style-name="P20"><text:span text:style-name="T1"><text:page-number>&lt;숫자&gt;</text:page-number></text:span></text:p>
          </draw:text-box>
        </draw:frame>
        <draw:frame draw:name="TextBox 15" draw:style-name="gr15" draw:text-style-name="P35" draw:layer="layout" svg:width="3.298cm" svg:height="1.026cm" svg:x="0.181cm" svg:y="0.127cm">
          <draw:text-box>
            <text:p text:style-name="P16"><text:span text:style-name="T6">PROCESS</text:span></text:p>
          </draw:text-box>
        </draw:frame>
        <draw:custom-shape draw:style-name="gr19" draw:text-style-name="P18" draw:layer="layout" svg:width="27.5cm" svg:height="0.9cm" svg:x="0.3cm" svg:y="1.302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5cm">
          <draw:text-box>
            <text:p><text:span text:style-name="T7">프로세스 명</text:span></text:p>
          </draw:text-box>
        </draw:frame>
        <draw:frame draw:style-name="gr47" draw:text-style-name="P19" draw:layer="layout" svg:width="2.9cm" svg:height="1.267cm" svg:x="24.2cm" svg:y="1.172cm">
          <draw:text-box>
            <text:p><text:span text:style-name="T7">환불</text:span></text:p>
          </draw:text-box>
        </draw:frame>
        <draw:line draw:style-name="gr21" draw:text-style-name="P15" draw:layer="layout" svg:x1="14.1cm" svg:y1="1.302cm" svg:x2="14.1cm" svg:y2="2.202cm">
          <text:p/>
        </draw:line>
        <draw:line draw:style-name="gr21" draw:text-style-name="P15" draw:layer="layout" svg:x1="6.9cm" svg:y1="1.302cm" svg:x2="6.9cm" svg:y2="2.202cm">
          <text:p/>
        </draw:line>
        <draw:line draw:style-name="gr21" draw:text-style-name="P15" draw:layer="layout" svg:x1="21.5cm" svg:y1="1.302cm" svg:x2="21.5cm" svg:y2="2.202cm">
          <text:p/>
        </draw:line>
        <draw:custom-shape draw:name="자유형: 도형 92" draw:style-name="gr123" draw:text-style-name="P42" draw:layer="layout" svg:width="5.799cm" svg:height="1.25cm" svg:x="0.801cm" svg:y="2.702cm">
          <text:p text:style-name="P38"><text:span text:style-name="T10">일반 회원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94" draw:style-name="gr166" draw:text-style-name="P32" draw:layer="layout" svg:width="3.7cm" svg:height="1.694cm" svg:x="12.9cm" svg:y="8.406cm">
          <text:p text:style-name="P31"><text:span text:style-name="T23">예약된 가게 </text:span></text:p>
          <text:p text:style-name="P31"><text:span text:style-name="T23">예약 취소 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95" draw:style-name="gr177" draw:text-style-name="P37" draw:layer="layout" svg:width="4.399cm" svg:height="1.596cm" svg:x="0.801cm" svg:y="8.304cm">
          <text:p text:style-name="P36"><text:span text:style-name="T23">마이 페이지 이동</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6" draw:style-name="gr149" draw:text-style-name="P32" draw:layer="layout" svg:width="3.999cm" svg:height="1.5cm" svg:x="7.101cm" svg:y="8.4cm">
          <text:p text:style-name="P31"><text:span text:style-name="T23">예약내역 확인 창 </text:span></text:p>
          <text:p text:style-name="P31"><text:span text:style-name="T23">선택</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7" draw:style-name="gr166" draw:text-style-name="P32" draw:layer="layout" svg:width="3.7cm" svg:height="1.694cm" svg:x="18.101cm" svg:y="8.407cm">
          <text:p text:style-name="P31"><text:span text:style-name="T23">환불 내역 </text:span></text:p>
          <text:p text:style-name="P31"><text:span text:style-name="T23">취소 창 출력</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9" draw:style-name="gr166" draw:text-style-name="P32" draw:layer="layout" svg:width="3.7cm" svg:height="1.694cm" svg:x="23.502cm" svg:y="8.308cm">
          <text:p text:style-name="P31"><text:span text:style-name="T23">취소 후 </text:span></text:p>
          <text:p text:style-name="P31"><text:span text:style-name="T23">환불 </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style-name="gr178" draw:text-style-name="P45" draw:layer="layout" svg:width="6cm" svg:height="1.3cm" svg:x="21.5cm" svg:y="11.9cm">
          <text:p text:style-name="P6"><text:span text:style-name="T28">시간 </text:span><text:span text:style-name="T28">/ </text:span><text:span text:style-name="T28">기준 단계별 환불 방식</text:span></text:p>
          <draw:enhanced-geometry svg:viewBox="0 0 21600 21600" draw:text-areas="800 800 20800 20800" draw:type="round-rectangular-callout" draw:modifiers="20484.1859690052 -23094.2352036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8" draw:text-style-name="P15" draw:layer="layout" svg:x1="5.2cm" svg:y1="9.1cm" svg:x2="7.101cm" svg:y2="9.1cm">
          <text:p/>
        </draw:line>
        <draw:line draw:style-name="gr169" draw:text-style-name="P15" draw:layer="layout" svg:x1="11.1cm" svg:y1="9.2cm" svg:x2="12.9cm" svg:y2="9.2cm">
          <text:p/>
        </draw:line>
        <draw:line draw:style-name="gr170" draw:text-style-name="P15" draw:layer="layout" svg:x1="16.6cm" svg:y1="9.2cm" svg:x2="18.101cm" svg:y2="9.2cm">
          <text:p/>
        </draw:line>
        <draw:line draw:style-name="gr171" draw:text-style-name="P15" draw:layer="layout" svg:x1="21.801cm" svg:y1="9.1cm" svg:x2="23.502cm" svg:y2="9.1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2">
          <draw:frame draw:name="슬라이드 번호 개체 틀 22" draw:style-name="gr9" draw:text-style-name="P34" draw:layer="layout" svg:width="9.113cm" svg:height="1.484cm" svg:x="11.886cm" svg:y="28.215cm">
            <draw:text-box>
              <text:p text:style-name="P20"><text:span text:style-name="T1"><text:page-number>&lt;숫자&gt;</text:page-number></text:span></text:p>
            </draw:text-box>
          </draw:frame>
          <draw:page-thumbnail draw:name="슬라이드 이미지 개체 틀 11" draw:style-name="gr10" draw:layer="layout" svg:width="19.786cm" svg:height="11.135cm" svg:x="0.604cm" svg:y="2.258cm" draw:page-number="18" presentation:class="page"/>
          <draw:frame draw:name="슬라이드 노트 개체 틀 12" presentation:style-name="pr1" draw:text-style-name="P9" draw:layer="layout" svg:width="16.799cm" svg:height="13.364cm" svg:x="2.1cm" svg:y="14.107cm" presentation:class="notes" presentation:placeholder="true">
            <draw:text-box/>
          </draw:frame>
        </presentation:notes>
      </draw:page>
      <draw:page draw:name="Slide19" draw:style-name="dp1" draw:master-page-name="Master2-Layout2-blank-빈-화면" presentation:presentation-page-layout-name="AL1T14">
        <draw:frame draw:name="그림 37"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슬라이드 번호 개체 틀 3" draw:style-name="gr2" draw:text-style-name="P17" draw:layer="layout" svg:width="6.5cm" svg:height="1cm" svg:x="20.5cm" svg:y="14.5cm">
          <draw:text-box>
            <text:p text:style-name="P20"><text:span text:style-name="T1"><text:page-number>&lt;숫자&gt;</text:page-number></text:span></text:p>
          </draw:text-box>
        </draw:frame>
        <draw:custom-shape draw:name="자유형: 도형 36" draw:style-name="gr67" draw:text-style-name="P13" draw:layer="layout" svg:width="4cm" svg:height="1.25cm" svg:x="0.497cm" svg:y="2.849cm">
          <text:p text:style-name="P11"><text:span text:style-name="T10">관리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style-name="gr19" draw:text-style-name="P18" draw:layer="layout" svg:width="27.5cm" svg:height="0.9cm" svg:x="0.3cm" svg:y="1.303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6cm">
          <draw:text-box>
            <text:p><text:span text:style-name="T7">프로세스 명</text:span></text:p>
          </draw:text-box>
        </draw:frame>
        <draw:frame draw:style-name="gr47" draw:text-style-name="P19" draw:layer="layout" svg:width="3.5cm" svg:height="1.267cm" svg:x="23cm" svg:y="1.173cm">
          <draw:text-box>
            <text:p><text:span text:style-name="T7">홍보 상품 관리</text:span></text:p>
          </draw:text-box>
        </draw:frame>
        <draw:line draw:style-name="gr21" draw:text-style-name="P15" draw:layer="layout" svg:x1="6.9cm" svg:y1="1.303cm" svg:x2="6.9cm" svg:y2="2.203cm">
          <text:p/>
        </draw:line>
        <draw:line draw:style-name="gr21" draw:text-style-name="P15" draw:layer="layout" svg:x1="21.5cm" svg:y1="1.303cm" svg:x2="21.5cm" svg:y2="2.203cm">
          <text:p/>
        </draw:line>
        <draw:custom-shape draw:style-name="gr19" draw:text-style-name="P18" draw:layer="layout" svg:width="27.5cm" svg:height="0.9cm" svg:x="0.3cm" svg:y="1.303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6cm">
          <draw:text-box>
            <text:p><text:span text:style-name="T7">프로세스 명</text:span></text:p>
          </draw:text-box>
        </draw:frame>
        <draw:frame draw:style-name="gr47" draw:text-style-name="P19" draw:layer="layout" svg:width="2.9cm" svg:height="1.267cm" svg:x="24cm" svg:y="1.173cm">
          <draw:text-box>
            <text:p><text:span text:style-name="T7"><text:s/></text:span><text:span text:style-name="T7">홍보</text:span></text:p>
          </draw:text-box>
        </draw:frame>
        <draw:line draw:style-name="gr21" draw:text-style-name="P15" draw:layer="layout" svg:x1="6.9cm" svg:y1="1.303cm" svg:x2="6.9cm" svg:y2="2.203cm">
          <text:p/>
        </draw:line>
        <draw:line draw:style-name="gr21" draw:text-style-name="P15" draw:layer="layout" svg:x1="21.5cm" svg:y1="1.303cm" svg:x2="21.5cm" svg:y2="2.203cm">
          <text:p/>
        </draw:line>
        <draw:line draw:style-name="gr21" draw:text-style-name="P15" draw:layer="layout" svg:x1="14.1cm" svg:y1="1.302cm" svg:x2="14.1cm" svg:y2="2.202cm">
          <text:p/>
        </draw:line>
        <draw:custom-shape draw:name="자유형: 도형 127" draw:style-name="gr179" draw:text-style-name="P23" xml:id="id74" draw:id="id74" draw:layer="layout" svg:width="4.199cm" svg:height="1.999cm" svg:x="0.801cm" svg:y="7.901cm">
          <text:p text:style-name="P11"><text:span text:style-name="T29">관리자 상품 통합 </text:span></text:p>
          <text:p text:style-name="P11"><text:span text:style-name="T29">관리 페이지로 이동</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84" draw:style-name="gr180" draw:text-style-name="P46" xml:id="id76" draw:id="id76" draw:layer="layout" svg:width="4.199cm" svg:height="1.999cm" svg:x="8.201cm" svg:y="5.901cm">
          <text:p text:style-name="P11"><text:span text:style-name="T29">등록 할 상품 이미지</text:span></text:p>
          <text:p text:style-name="P11"><text:span text:style-name="T29">또는 상세 내역 입력</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85" draw:style-name="gr181" draw:text-style-name="P23" xml:id="id75" draw:id="id75" draw:layer="layout" svg:width="5.199cm" svg:height="1.999cm" svg:x="7.901cm" svg:y="10.601cm">
          <text:p text:style-name="P11"><text:span text:style-name="T29">실시간 상품 목록 조회</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90" draw:style-name="gr182" draw:text-style-name="P46" draw:layer="layout" svg:width="4.199cm" svg:height="1.999cm" svg:x="15.501cm" svg:y="5.901cm">
          <text:p text:style-name="P11"><text:span text:style-name="T29">상품 등록 버튼 클릭</text:span></text:p>
          <draw:enhanced-geometry svg:viewBox="0 0 21600 21600" draw:path-stretchpoint-x="10800" draw:path-stretchpoint-y="10800" draw:text-areas="?f3 ?f4 ?f5 ?f6" draw:mirror-horizontal="false" draw:mirror-vertical="false"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18" draw:style-name="gr183" draw:text-style-name="P46" draw:layer="layout" svg:width="4.199cm" svg:height="1.999cm" svg:x="22.601cm" svg:y="5.901cm">
          <text:p text:style-name="P11"><text:span text:style-name="T29">상품 등록 완료</text:span></text:p>
          <draw:enhanced-geometry svg:viewBox="0 0 21600 21600" draw:path-stretchpoint-x="10800" draw:path-stretchpoint-y="10800" draw:text-areas="?f3 ?f4 ?f5 ?f6" draw:mirror-horizontal="false" draw:mirror-vertical="false"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style-name="gr73" draw:text-style-name="P15" draw:layer="layout" draw:type="line" svg:x1="5cm" svg:y1="8.9cm" svg:x2="7.901cm" svg:y2="11.6cm" draw:start-shape="id74" draw:start-glue-point="1" draw:end-shape="id75" draw:end-glue-point="3" svg:d="M5000 8900l2901 2700" svg:viewBox="0 0 2902 2701">
          <text:p/>
        </draw:connector>
        <draw:connector draw:style-name="gr73" draw:text-style-name="P15" draw:layer="layout" draw:type="line" svg:x1="5cm" svg:y1="8.9cm" svg:x2="8.201cm" svg:y2="6.9cm" draw:start-shape="id74" draw:start-glue-point="1" draw:end-shape="id76" draw:end-glue-point="3" svg:d="M5000 8900l3201-2000" svg:viewBox="0 0 3202 2001">
          <text:p/>
        </draw:connector>
        <draw:line draw:style-name="gr73" draw:text-style-name="P15" draw:layer="layout" svg:x1="12.4cm" svg:y1="7cm" svg:x2="15.501cm" svg:y2="7cm">
          <text:p/>
        </draw:line>
        <draw:line draw:style-name="gr73" draw:text-style-name="P15" draw:layer="layout" svg:x1="19.7cm" svg:y1="7cm" svg:x2="22.601cm" svg:y2="7cm">
          <text:p/>
        </draw:line>
        <draw:custom-shape draw:name="자유형: 도형 125" draw:style-name="gr184" draw:text-style-name="P48" draw:layer="layout" svg:width="6.363cm" svg:height="1.405cm" svg:x="18.037cm" svg:y="8.6cm">
          <text:p text:style-name="P47"><text:span text:style-name="T30">관리자는 해당 상품 삭제 가능</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3">
          <draw:frame draw:name="슬라이드 번호 개체 틀 6"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1" draw:style-name="gr10" draw:layer="layout" svg:width="19.786cm" svg:height="11.135cm" svg:x="0.604cm" svg:y="2.258cm" draw:page-number="19" presentation:class="page"/>
          <draw:frame draw:name="슬라이드 노트 개체 틀 2" presentation:style-name="pr1" draw:text-style-name="P21" draw:layer="layout" svg:width="16.799cm" svg:height="13.364cm" svg:x="2.1cm" svg:y="14.107cm" presentation:class="notes" presentation:placeholder="true">
            <draw:text-box/>
          </draw:frame>
        </presentation:notes>
      </draw:page>
      <draw:page draw:name="page20" draw:style-name="dp1" draw:master-page-name="Master2-Layout2-blank-빈-화면" presentation:presentation-page-layout-name="AL1T14">
        <draw:frame draw:name="그림 12"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슬라이드 번호 개체 틀 25" draw:style-name="gr2" draw:text-style-name="P17" draw:layer="layout" svg:width="6.5cm" svg:height="1cm" svg:x="20.5cm" svg:y="14.5cm">
          <draw:text-box>
            <text:p text:style-name="P20"><text:span text:style-name="T1"><text:page-number>&lt;숫자&gt;</text:page-number></text:span></text:p>
          </draw:text-box>
        </draw:frame>
        <draw:custom-shape draw:name="자유형: 도형 163" draw:style-name="gr67" draw:text-style-name="P13" draw:layer="layout" svg:width="4cm" svg:height="1.25cm" svg:x="0.497cm" svg:y="2.849cm">
          <text:p text:style-name="P11"><text:span text:style-name="T10">관리자</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자유형: 도형 164" draw:style-name="gr185" draw:text-style-name="P23" draw:layer="layout" svg:width="4.199cm" svg:height="1.999cm" svg:x="0.801cm" svg:y="5.001cm">
          <text:p text:style-name="P11"><text:span text:style-name="T29">메인 페이지 우측하단 </text:span></text:p>
          <text:p text:style-name="P11"><text:span text:style-name="T29">영달 봇 클릭</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style-name="gr19" draw:text-style-name="P18" draw:layer="layout" svg:width="27.5cm" svg:height="0.9cm" svg:x="0.3cm" svg:y="1.303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6cm">
          <draw:text-box>
            <text:p><text:span text:style-name="T7">프로세스 명</text:span></text:p>
          </draw:text-box>
        </draw:frame>
        <draw:frame draw:style-name="gr47" draw:text-style-name="P19" draw:layer="layout" svg:width="3.5cm" svg:height="1.267cm" svg:x="23cm" svg:y="1.173cm">
          <draw:text-box>
            <text:p><text:span text:style-name="T7">홍보 상품 관리</text:span></text:p>
          </draw:text-box>
        </draw:frame>
        <draw:line draw:style-name="gr21" draw:text-style-name="P15" draw:layer="layout" svg:x1="6.9cm" svg:y1="1.303cm" svg:x2="6.9cm" svg:y2="2.203cm">
          <text:p/>
        </draw:line>
        <draw:line draw:style-name="gr21" draw:text-style-name="P15" draw:layer="layout" svg:x1="21.5cm" svg:y1="1.303cm" svg:x2="21.5cm" svg:y2="2.203cm">
          <text:p/>
        </draw:line>
        <draw:custom-shape draw:style-name="gr19" draw:text-style-name="P18" draw:layer="layout" svg:width="27.5cm" svg:height="0.9cm" svg:x="0.3cm" svg:y="1.303cm">
          <text:p/>
          <draw:enhanced-geometry svg:viewBox="0 0 21600 21600" draw:mirror-horizontal="false" draw:mirror-vertical="false" draw:type="rectangle" draw:enhanced-path="M 0 0 L 21600 0 21600 21600 0 21600 0 0 Z N"/>
        </draw:custom-shape>
        <draw:frame draw:style-name="gr20" draw:text-style-name="P19" draw:layer="layout" svg:width="2.568cm" svg:height="0.759cm" svg:x="16.5cm" svg:y="1.426cm">
          <draw:text-box>
            <text:p><text:span text:style-name="T7">프로세스 명</text:span></text:p>
          </draw:text-box>
        </draw:frame>
        <draw:frame draw:style-name="gr47" draw:text-style-name="P19" draw:layer="layout" svg:width="2.9cm" svg:height="1.267cm" svg:x="23.6cm" svg:y="1.173cm">
          <draw:text-box>
            <text:p><text:span text:style-name="T7">AI <text:s/></text:span><text:span text:style-name="T7">영달 봇</text:span></text:p>
          </draw:text-box>
        </draw:frame>
        <draw:line draw:style-name="gr21" draw:text-style-name="P15" draw:layer="layout" svg:x1="6.9cm" svg:y1="1.303cm" svg:x2="6.9cm" svg:y2="2.203cm">
          <text:p/>
        </draw:line>
        <draw:line draw:style-name="gr21" draw:text-style-name="P15" draw:layer="layout" svg:x1="21.5cm" svg:y1="1.303cm" svg:x2="21.5cm" svg:y2="2.203cm">
          <text:p/>
        </draw:line>
        <draw:line draw:style-name="gr21" draw:text-style-name="P15" draw:layer="layout" svg:x1="14.1cm" svg:y1="1.302cm" svg:x2="14.1cm" svg:y2="2.202cm">
          <text:p/>
        </draw:line>
        <draw:custom-shape draw:name="자유형: 도형 165" draw:style-name="gr186" draw:text-style-name="P46" draw:layer="layout" svg:width="4.199cm" svg:height="1.999cm" svg:x="7.701cm" svg:y="5.001cm">
          <text:p text:style-name="P49"><text:span text:style-name="T31">원하는 키워드 </text:span><text:span text:style-name="T31">/</text:span><text:span text:style-name="T31">가게 </text:span></text:p>
          <text:p text:style-name="P49"><text:span text:style-name="T31">검색</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66" draw:style-name="gr187" draw:text-style-name="P46" draw:layer="layout" svg:width="5.199cm" svg:height="2.599cm" svg:x="14.301cm" svg:y="4.701cm">
          <text:p text:style-name="P49"><text:span text:style-name="T31">검색된 카테고리를 </text:span><text:span text:style-name="T31">AI</text:span><text:span text:style-name="T31">가 </text:span></text:p>
          <text:p text:style-name="P49"><text:span text:style-name="T31">연관된 다양한 가게 출력 <text:s text:c="2"/></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67" draw:style-name="gr188" draw:text-style-name="P46" draw:layer="layout" svg:width="4.599cm" svg:height="1.899cm" svg:x="22.001cm" svg:y="5.101cm">
          <text:p text:style-name="P49"><text:span text:style-name="T31"><text:s/></text:span><text:span text:style-name="T31">가게를 클릭하면 <text:s/>해당 </text:span></text:p>
          <text:p text:style-name="P49"><text:span text:style-name="T31">가게로 이동 <text: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189" draw:text-style-name="P15" draw:layer="layout" svg:x1="11.9cm" svg:y1="6.1cm" svg:x2="14.301cm" svg:y2="6.1cm">
          <text:p/>
        </draw:line>
        <draw:line draw:style-name="gr190" draw:text-style-name="P15" draw:layer="layout" svg:x1="19.5cm" svg:y1="6.1cm" svg:x2="22.001cm" svg:y2="6.1cm">
          <text:p/>
        </draw:line>
        <draw:custom-shape draw:name="자유형: 도형 168" draw:style-name="gr191" draw:text-style-name="P46" draw:layer="layout" svg:width="4.199cm" svg:height="1.999cm" svg:x="7.701cm" svg:y="10.701cm">
          <text:p text:style-name="P49"><text:span text:style-name="T31">카테고리 선택</text:span><text:span text:style-name="T31">,</text:span></text:p>
          <text:p text:style-name="P49"><text:span text:style-name="T31">룰렛 슬롯 추가 </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69" draw:style-name="gr192" draw:text-style-name="P23" draw:layer="layout" svg:width="4.199cm" svg:height="1.999cm" svg:x="0.801cm" svg:y="10.701cm">
          <text:p text:style-name="P11"><text:span text:style-name="T29">메인 페이지 하단 </text:span></text:p>
          <text:p text:style-name="P11"><text:span text:style-name="T29">영달 룰렛 클릭</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70" draw:style-name="gr193" draw:text-style-name="P46" draw:layer="layout" svg:width="3.999cm" svg:height="1.299cm" svg:x="14.101cm" svg:y="11.101cm">
          <text:p text:style-name="P49"><text:span text:style-name="T31">룰렛 버튼 클릭 </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자유형: 도형 171" draw:style-name="gr194" draw:text-style-name="P46" draw:layer="layout" svg:width="4.499cm" svg:height="1.899cm" svg:x="21.001cm" svg:y="10.801cm">
          <text:p text:style-name="P49"><text:span text:style-name="T31">AI</text:span><text:span text:style-name="T31">가 자동으로 랜덤 </text:span></text:p>
          <text:p text:style-name="P49"><text:span text:style-name="T31">맛집 출력 </text:span></text:p>
          <draw:enhanced-geometry svg:viewBox="0 0 21600 21600" draw:path-stretchpoint-x="10800" draw:path-stretchpoint-y="10800" draw:text-areas="?f3 ?f4 ?f5 ?f6" draw:mirror-horizontal="false" draw:mirror-vertical="false"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line draw:style-name="gr73" draw:text-style-name="P15" draw:layer="layout" svg:x1="5cm" svg:y1="6cm" svg:x2="7.701cm" svg:y2="6cm">
          <text:p/>
        </draw:line>
        <draw:line draw:style-name="gr73" draw:text-style-name="P15" draw:layer="layout" svg:x1="5cm" svg:y1="11.7cm" svg:x2="7.701cm" svg:y2="11.7cm">
          <text:p/>
        </draw:line>
        <draw:line draw:style-name="gr73" draw:text-style-name="P15" draw:layer="layout" svg:x1="11.9cm" svg:y1="11.7cm" svg:x2="14.101cm" svg:y2="11.7cm">
          <text:p/>
        </draw:line>
        <draw:line draw:style-name="gr73" draw:text-style-name="P15" draw:layer="layout" svg:x1="18.1cm" svg:y1="11.7cm" svg:x2="21.001cm" svg:y2="11.7cm">
          <text:p/>
        </draw:line>
        <draw:frame draw:style-name="gr20" draw:text-style-name="P19" draw:layer="layout" svg:width="2.568cm" svg:height="0.759cm" svg:x="2.5cm" svg:y="1.324cm">
          <draw:text-box>
            <text:p><text:span text:style-name="T7">작성 조명</text:span></text:p>
          </draw:text-box>
        </draw:frame>
        <draw:frame draw:style-name="gr22" draw:text-style-name="P19" draw:layer="layout" svg:width="3.868cm" svg:height="0.759cm" svg:x="9.1cm" svg:y="1.325cm">
          <draw:text-box>
            <text:p><text:span text:style-name="T7">우리 뭐 먹조</text:span><text:span text:style-name="T7">?</text:span></text:p>
          </draw:text-box>
        </draw:frame>
        <presentation:notes draw:style-name="dp2">
          <draw:frame draw:name="슬라이드 번호 개체 틀 26"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13" draw:style-name="gr10" draw:layer="layout" svg:width="19.786cm" svg:height="11.135cm" svg:x="0.604cm" svg:y="2.258cm" draw:page-number="20" presentation:class="page"/>
          <draw:frame draw:name="슬라이드 노트 개체 틀 14" presentation:style-name="pr1" draw:text-style-name="P21" draw:layer="layout" svg:width="16.799cm" svg:height="13.364cm" svg:x="2.1cm" svg:y="14.107cm" presentation:class="notes" presentation:placeholder="true">
            <draw:text-box/>
          </draw:frame>
        </presentation:notes>
      </draw:page>
      <draw:page draw:name="page21" draw:style-name="dp1" draw:master-page-name="Master2-Layout2-blank-빈-화면" presentation:presentation-page-layout-name="AL1T14">
        <draw:frame draw:name="그림 13" draw:style-name="gr1" draw:text-style-name="P1" draw:layer="layout" svg:width="28.002cm" svg:height="15.751cm" svg:x="0cm" svg:y="0cm">
          <draw:image xlink:href="Pictures/100000000000078000000438C2DE3366.jpg" xlink:type="simple" xlink:show="embed" xlink:actuate="onLoad" draw:mime-type="image/jpeg">
            <text:p/>
          </draw:image>
          <svg:desc>스크린샷, 직사각형, 사진 액자, 프레임이(가) 표시된 사진

AI 생성 콘텐츠는 정확하지 않을 수 있습니다.</svg:desc>
        </draw:frame>
        <draw:frame draw:name="슬라이드 번호 개체 틀 27" draw:style-name="gr2" draw:text-style-name="P17" draw:layer="layout" svg:width="6.5cm" svg:height="1cm" svg:x="20.5cm" svg:y="14.5cm">
          <draw:text-box>
            <text:p text:style-name="P20"><text:span text:style-name="T1"><text:page-number>&lt;숫자&gt;</text:page-number></text:span></text:p>
          </draw:text-box>
        </draw:frame>
        <draw:frame draw:style-name="gr3" draw:text-style-name="P51" draw:layer="layout" svg:width="18cm" svg:height="5.5cm" svg:x="4.7cm" svg:y="4.9cm">
          <draw:text-box>
            <text:p text:style-name="P50"><text:span text:style-name="T32">Thank you!</text:span></text:p>
          </draw:text-box>
        </draw:frame>
        <draw:custom-shape draw:style-name="gr195" draw:text-style-name="P6" draw:layer="layout" svg:width="16cm" svg:height="0.001cm" svg:x="6cm" svg:y="10cm">
          <text:p/>
          <draw:enhanced-geometry svg:viewBox="0 0 21600 21600" draw:text-areas="2540 0 19060 21600" draw:type="flowchart-predefined-process" draw:enhanced-path="M 0 0 L 21600 0 21600 21600 0 21600 Z N M 2540 0 L 2540 21600 N M 19060 0 L 19060 21600 N"/>
        </draw:custom-shape>
        <draw:custom-shape draw:style-name="gr5" draw:text-style-name="P6" draw:layer="layout" svg:width="16cm" svg:height="0.001cm" svg:x="6.001cm" svg:y="5.6cm">
          <text:p/>
          <draw:enhanced-geometry svg:viewBox="0 0 21600 21600" draw:text-areas="2540 0 19060 21600" draw:type="flowchart-predefined-process" draw:enhanced-path="M 0 0 L 21600 0 21600 21600 0 21600 Z N M 2540 0 L 2540 21600 N M 19060 0 L 19060 21600 N"/>
        </draw:custom-shape>
        <draw:custom-shape draw:style-name="gr6" draw:text-style-name="P6" draw:layer="layout" svg:width="16cm" svg:height="0.001cm" svg:x="6.002cm" svg:y="5.8cm">
          <text:p/>
          <draw:enhanced-geometry svg:viewBox="0 0 21600 21600" draw:text-areas="2540 0 19060 21600" draw:type="flowchart-predefined-process" draw:enhanced-path="M 0 0 L 21600 0 21600 21600 0 21600 Z N M 2540 0 L 2540 21600 N M 19060 0 L 19060 21600 N"/>
        </draw:custom-shape>
        <draw:custom-shape draw:style-name="gr6" draw:text-style-name="P6" draw:layer="layout" svg:width="16cm" svg:height="0.001cm" svg:x="6.003cm" svg:y="9.8cm">
          <text:p/>
          <draw:enhanced-geometry svg:viewBox="0 0 21600 21600" draw:text-areas="2540 0 19060 21600" draw:type="flowchart-predefined-process" draw:enhanced-path="M 0 0 L 21600 0 21600 21600 0 21600 Z N M 2540 0 L 2540 21600 N M 19060 0 L 19060 21600 N"/>
        </draw:custom-shape>
        <presentation:notes draw:style-name="dp2">
          <draw:frame draw:name="슬라이드 번호 개체 틀 28" draw:style-name="gr9" draw:text-style-name="P17" draw:layer="layout" svg:width="9.113cm" svg:height="1.484cm" svg:x="11.886cm" svg:y="28.215cm">
            <draw:text-box>
              <text:p text:style-name="P20"><text:span text:style-name="T1"><text:page-number>&lt;숫자&gt;</text:page-number></text:span></text:p>
            </draw:text-box>
          </draw:frame>
          <draw:page-thumbnail draw:name="슬라이드 이미지 개체 틀 14" draw:style-name="gr10" draw:layer="layout" svg:width="19.786cm" svg:height="11.135cm" svg:x="0.604cm" svg:y="2.258cm" draw:page-number="21" presentation:class="page"/>
          <draw:frame draw:name="슬라이드 노트 개체 틀 15" presentation:style-name="pr1" draw:text-style-name="P21"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 Black" svg:font-family="'Arial Black'" style:font-family-generic="swiss"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KR" svg:font-family="'Noto Sans KR'" style:font-family-generic="roman" style:font-pitch="variable"/>
    <style:font-face style:name="Noto Sans KR1" svg:font-family="'Noto Sans KR'" style:font-family-generic="swiss" style:font-pitch="variable"/>
    <style:font-face style:name="Noto Sans KR2" svg:font-family="'Noto Sans KR'" style:font-pitch="variable"/>
    <style:font-face style:name="Noto Sans KR3" svg:font-family="'Noto Sans KR'" style:font-family-generic="system" style:font-pitch="variable"/>
    <style:font-face style:name="Noto Sans KR4" svg:font-family="'Noto Sans KR'" style:font-family-generic="modern" style:font-pitch="variable"/>
    <style:font-face style:name="Noto Serif KR" svg:font-family="'Noto Serif KR'" style:font-family-generic="roman" style:font-pitch="variable"/>
    <style:font-face style:name="Noto Serif KR1" svg:font-family="'Noto Serif KR'" style:font-pitch="variable"/>
    <style:font-face style:name="Noto Serif KR2" svg:font-family="'Noto Serif KR'" style:font-family-generic="system" style:font-pitch="variable"/>
    <style:font-face style:name="Tahoma" svg:font-family="Tahoma" style:font-family-generic="system" style:font-pitch="variable"/>
    <style:font-face style:name="Tahoma1" svg:font-family="Tahoma" style:font-pitch="variable"/>
    <style:font-face style:name="맑은 고딕" svg:font-family="'맑은 고딕'" style:font-pitch="variable"/>
    <style:font-face style:name="맑은 고딕1" svg:font-family="'맑은 고딕'"/>
    <style:font-face style:name="맑은 고딕2" svg:font-family="'맑은 고딕'" style:font-family-generic="modern" style:font-pitch="variable"/>
  </office:font-face-decls>
  <office:styles>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노란색으로_20_채움" draw:display-name="노란색으로 채움"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녹색으로_20_채움" draw:display-name="녹색으로 채움"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빨간색으로_20_채움" draw:display-name="빨간색으로 채움"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채움"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파란색으로_20_채움" draw:display-name="파란색으로 채움"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marker draw:name="Arrow" svg:viewBox="0 0 20 20" svg:d="M0 20l10-20 10 20z"/>
    <draw:marker draw:name="a1021" svg:viewBox="0 0 20 30" svg:d="M10 0l-10 30h20z"/>
    <draw:marker draw:name="a1023" svg:viewBox="0 0 20 30" svg:d="M10 0l-10 30h20z"/>
    <draw:marker draw:name="a1054" svg:viewBox="0 0 20 30" svg:d="M10 0l-10 30h20z"/>
    <draw:marker draw:name="a1056" svg:viewBox="0 0 20 30" svg:d="M10 0l-10 30h20z"/>
    <draw:marker draw:name="a1058" svg:viewBox="0 0 20 30" svg:d="M10 0l-10 30h20z"/>
    <draw:marker draw:name="a1060" svg:viewBox="0 0 20 30" svg:d="M10 0l-10 30h20z"/>
    <draw:marker draw:name="a1062" svg:viewBox="0 0 20 30" svg:d="M10 0l-10 30h20z"/>
    <draw:marker draw:name="a1120" svg:viewBox="0 0 20 30" svg:d="M10 0l-10 30h20z"/>
    <draw:marker draw:name="a733" svg:viewBox="0 0 20 30" svg:d="M10 0l-10 30h20z"/>
    <draw:marker draw:name="a847" svg:viewBox="0 0 20 30" svg:d="M10 0l-10 30h20z"/>
    <draw:marker draw:name="a851" svg:viewBox="0 0 20 30" svg:d="M10 0l-10 30h20z"/>
    <draw:marker draw:name="a855" svg:viewBox="0 0 20 30" svg:d="M10 0l-10 30h20z"/>
    <draw:marker draw:name="a859" svg:viewBox="0 0 20 30" svg:d="M10 0l-10 30h20z"/>
    <draw:marker draw:name="a863" svg:viewBox="0 0 20 30" svg:d="M10 0l-10 30h20z"/>
    <draw:marker draw:name="a867" svg:viewBox="0 0 20 30" svg:d="M10 0l-10 30h20z"/>
    <draw:marker draw:name="a871" svg:viewBox="0 0 20 30" svg:d="M10 0l-10 30h20z"/>
    <draw:marker draw:name="a881" svg:viewBox="0 0 20 30" svg:d="M10 0l-10 30h20z"/>
    <draw:marker draw:name="a885" svg:viewBox="0 0 20 30" svg:d="M10 0l-10 30h20z"/>
    <draw:marker draw:name="a952" svg:viewBox="0 0 20 30" svg:d="M10 0l-10 30h20z"/>
    <draw:marker draw:name="a955" svg:viewBox="0 0 20 30" svg:d="M10 0l-10 30h20z"/>
    <draw:marker draw:name="a957" svg:viewBox="0 0 20 30" svg:d="M10 0l-10 30h20z"/>
    <draw:marker draw:name="화살촉_20_10" draw:display-name="화살촉 10" svg:viewBox="0 0 20 20" svg:d="M0 20l10-20 10 20z"/>
    <draw:marker draw:name="화살촉_20_11" draw:display-name="화살촉 11" svg:viewBox="0 0 20 20" svg:d="M0 20l10-20 10 20z"/>
    <draw:marker draw:name="화살촉_20_111" draw:display-name="화살촉 111" svg:viewBox="0 0 20 20" svg:d="M0 20l10-20 10 20z"/>
    <draw:marker draw:name="화살촉_20_112" draw:display-name="화살촉 112" svg:viewBox="0 0 20 20" svg:d="M0 20l10-20 10 20z"/>
    <draw:marker draw:name="화살촉_20_113" draw:display-name="화살촉 113" svg:viewBox="0 0 20 20" svg:d="M0 20l10-20 10 20z"/>
    <draw:marker draw:name="화살촉_20_114" draw:display-name="화살촉 114" svg:viewBox="0 0 20 20" svg:d="M0 20l10-20 10 20z"/>
    <draw:marker draw:name="화살촉_20_115" draw:display-name="화살촉 115" svg:viewBox="0 0 20 20" svg:d="M0 20l10-20 10 20z"/>
    <draw:marker draw:name="화살촉_20_116" draw:display-name="화살촉 116" svg:viewBox="0 0 20 20" svg:d="M0 20l10-20 10 20z"/>
    <draw:marker draw:name="화살촉_20_117" draw:display-name="화살촉 117" svg:viewBox="0 0 20 20" svg:d="M0 20l10-20 10 20z"/>
    <draw:marker draw:name="화살촉_20_118" draw:display-name="화살촉 118" svg:viewBox="0 0 20 20" svg:d="M0 20l10-20 10 20z"/>
    <draw:marker draw:name="화살촉_20_119" draw:display-name="화살촉 119" svg:viewBox="0 0 20 20" svg:d="M0 20l10-20 10 20z"/>
    <draw:marker draw:name="화살촉_20_12" draw:display-name="화살촉 12" svg:viewBox="0 0 20 20" svg:d="M0 20l10-20 10 20z"/>
    <draw:marker draw:name="화살촉_20_120" draw:display-name="화살촉 120" svg:viewBox="0 0 20 20" svg:d="M0 20l10-20 10 20z"/>
    <draw:marker draw:name="화살촉_20_121" draw:display-name="화살촉 121" svg:viewBox="0 0 20 20" svg:d="M0 20l10-20 10 20z"/>
    <draw:marker draw:name="화살촉_20_123" draw:display-name="화살촉 123" svg:viewBox="0 0 20 20" svg:d="M0 20l10-20 10 20z"/>
    <draw:marker draw:name="화살촉_20_124" draw:display-name="화살촉 124" svg:viewBox="0 0 20 20" svg:d="M0 20l10-20 10 20z"/>
    <draw:marker draw:name="화살촉_20_125" draw:display-name="화살촉 125" svg:viewBox="0 0 20 20" svg:d="M0 20l10-20 10 20z"/>
    <draw:marker draw:name="화살촉_20_126" draw:display-name="화살촉 126" svg:viewBox="0 0 20 20" svg:d="M0 20l10-20 10 20z"/>
    <draw:marker draw:name="화살촉_20_127" draw:display-name="화살촉 127" svg:viewBox="0 0 20 20" svg:d="M0 20l10-20 10 20z"/>
    <draw:marker draw:name="화살촉_20_129" draw:display-name="화살촉 129" svg:viewBox="0 0 20 20" svg:d="M0 20l10-20 10 20z"/>
    <draw:marker draw:name="화살촉_20_13" draw:display-name="화살촉 13" svg:viewBox="0 0 20 20" svg:d="M0 20l10-20 10 20z"/>
    <draw:marker draw:name="화살촉_20_131" draw:display-name="화살촉 131" svg:viewBox="0 0 20 20" svg:d="M0 20l10-20 10 20z"/>
    <draw:marker draw:name="화살촉_20_132" draw:display-name="화살촉 132" svg:viewBox="0 0 20 20" svg:d="M0 20l10-20 10 20z"/>
    <draw:marker draw:name="화살촉_20_135" draw:display-name="화살촉 135" svg:viewBox="0 0 20 20" svg:d="M0 20l10-20 10 20z"/>
    <draw:marker draw:name="화살촉_20_136" draw:display-name="화살촉 136" svg:viewBox="0 0 20 20" svg:d="M0 20l10-20 10 20z"/>
    <draw:marker draw:name="화살촉_20_137" draw:display-name="화살촉 137" svg:viewBox="0 0 20 20" svg:d="M0 20l10-20 10 20z"/>
    <draw:marker draw:name="화살촉_20_138" draw:display-name="화살촉 138" svg:viewBox="0 0 20 20" svg:d="M0 20l10-20 10 20z"/>
    <draw:marker draw:name="화살촉_20_139" draw:display-name="화살촉 139" svg:viewBox="0 0 20 20" svg:d="M0 20l10-20 10 20z"/>
    <draw:marker draw:name="화살촉_20_14" draw:display-name="화살촉 14" svg:viewBox="0 0 20 20" svg:d="M0 20l10-20 10 20z"/>
    <draw:marker draw:name="화살촉_20_140" draw:display-name="화살촉 140" svg:viewBox="0 0 20 20" svg:d="M0 20l10-20 10 20z"/>
    <draw:marker draw:name="화살촉_20_143" draw:display-name="화살촉 143" svg:viewBox="0 0 20 20" svg:d="M0 20l10-20 10 20z"/>
    <draw:marker draw:name="화살촉_20_144" draw:display-name="화살촉 144" svg:viewBox="0 0 20 20" svg:d="M0 20l10-20 10 20z"/>
    <draw:marker draw:name="화살촉_20_145" draw:display-name="화살촉 145" svg:viewBox="0 0 20 20" svg:d="M0 20l10-20 10 20z"/>
    <draw:marker draw:name="화살촉_20_146" draw:display-name="화살촉 146" svg:viewBox="0 0 20 20" svg:d="M0 20l10-20 10 20z"/>
    <draw:marker draw:name="화살촉_20_147" draw:display-name="화살촉 147" svg:viewBox="0 0 20 20" svg:d="M0 20l10-20 10 20z"/>
    <draw:marker draw:name="화살촉_20_149" draw:display-name="화살촉 149" svg:viewBox="0 0 20 20" svg:d="M0 20l10-20 10 20z"/>
    <draw:marker draw:name="화살촉_20_153" draw:display-name="화살촉 153" svg:viewBox="0 0 20 20" svg:d="M0 20l10-20 10 20z"/>
    <draw:marker draw:name="화살촉_20_154" draw:display-name="화살촉 154" svg:viewBox="0 0 20 20" svg:d="M0 20l10-20 10 20z"/>
    <draw:marker draw:name="화살촉_20_155" draw:display-name="화살촉 155" svg:viewBox="0 0 20 20" svg:d="M0 20l10-20 10 20z"/>
    <draw:marker draw:name="화살촉_20_156" draw:display-name="화살촉 156" svg:viewBox="0 0 20 20" svg:d="M0 20l10-20 10 20z"/>
    <draw:marker draw:name="화살촉_20_157" draw:display-name="화살촉 157" svg:viewBox="0 0 20 20" svg:d="M0 20l10-20 10 20z"/>
    <draw:marker draw:name="화살촉_20_158" draw:display-name="화살촉 158" svg:viewBox="0 0 20 20" svg:d="M0 20l10-20 10 20z"/>
    <draw:marker draw:name="화살촉_20_159" draw:display-name="화살촉 159" svg:viewBox="0 0 20 20" svg:d="M0 20l10-20 10 20z"/>
    <draw:marker draw:name="화살촉_20_162" draw:display-name="화살촉 162" svg:viewBox="0 0 20 20" svg:d="M0 20l10-20 10 20z"/>
    <draw:marker draw:name="화살촉_20_163" draw:display-name="화살촉 163" svg:viewBox="0 0 20 20" svg:d="M0 20l10-20 10 20z"/>
    <draw:marker draw:name="화살촉_20_164" draw:display-name="화살촉 164" svg:viewBox="0 0 20 20" svg:d="M0 20l10-20 10 20z"/>
    <draw:marker draw:name="화살촉_20_165" draw:display-name="화살촉 165" svg:viewBox="0 0 20 20" svg:d="M0 20l10-20 10 20z"/>
    <draw:marker draw:name="화살촉_20_166" draw:display-name="화살촉 166" svg:viewBox="0 0 20 20" svg:d="M0 20l10-20 10 20z"/>
    <draw:marker draw:name="화살촉_20_169" draw:display-name="화살촉 169" svg:viewBox="0 0 20 20" svg:d="M0 20l10-20 10 20z"/>
    <draw:marker draw:name="화살촉_20_170" draw:display-name="화살촉 170" svg:viewBox="0 0 20 20" svg:d="M0 20l10-20 10 20z"/>
    <draw:marker draw:name="화살촉_20_171" draw:display-name="화살촉 171" svg:viewBox="0 0 20 20" svg:d="M0 20l10-20 10 20z"/>
    <draw:marker draw:name="화살촉_20_172" draw:display-name="화살촉 172" svg:viewBox="0 0 20 20" svg:d="M0 20l10-20 10 20z"/>
    <draw:marker draw:name="화살촉_20_173" draw:display-name="화살촉 173" svg:viewBox="0 0 20 20" svg:d="M0 20l10-20 10 20z"/>
    <draw:marker draw:name="화살촉_20_32" draw:display-name="화살촉 32" svg:viewBox="0 0 20 20" svg:d="M0 20l10-20 10 20z"/>
    <draw:marker draw:name="화살촉_20_33" draw:display-name="화살촉 33" svg:viewBox="0 0 20 20" svg:d="M0 20l10-20 10 20z"/>
    <draw:marker draw:name="화살촉_20_34" draw:display-name="화살촉 34" svg:viewBox="0 0 20 20" svg:d="M0 20l10-20 10 20z"/>
    <draw:marker draw:name="화살촉_20_61" draw:display-name="화살촉 61" svg:viewBox="0 0 20 20" svg:d="M0 20l10-20 10 20z"/>
    <draw:marker draw:name="화살촉_20_62" draw:display-name="화살촉 62" svg:viewBox="0 0 20 20" svg:d="M0 20l10-20 10 20z"/>
    <draw:marker draw:name="화살촉_20_72" draw:display-name="화살촉 72" svg:viewBox="0 0 20 20" svg:d="M0 20l10-20 10 20z"/>
    <draw:marker draw:name="화살촉_20_73" draw:display-name="화살촉 73" svg:viewBox="0 0 20 20" svg:d="M0 20l10-20 10 20z"/>
    <draw:marker draw:name="화살촉_20_9" draw:display-name="화살촉 9"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Long_20_Dash_20_Dot" draw:display-name="Long Dash Dot" draw:style="rect" draw:dots1="1" draw:dots1-length="400%" draw:dots2="1" draw:dots2-length="100%" draw:distance="300%"/>
    <style:default-style style:family="graphic">
      <style:graphic-properties draw:stroke="solid" svg:stroke-width="0.053cm" svg:stroke-color="#042433" draw:stroke-linejoin="miter" svg:stroke-linecap="butt" draw:fill-color="#156082" fo:wrap-option="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KR" fo:font-size="24pt" fo:language="en" fo:country="US" style:font-name-asian="Noto Serif KR2" style:font-size-asian="24pt" style:language-asian="ko" style:country-asian="KR" style:font-name-complex="Tahoma" style:font-size-complex="24pt" style:language-complex="hi" style:country-complex="IN"/>
    </style:default-style>
    <style:style style:name="standard" style:family="graphic">
      <style:graphic-properties draw:stroke="solid" draw:stroke-dash="Dash_20_Dot_20_4" svg:stroke-width="0.1cm" svg:stroke-color="#7f7f7f" draw:marker-start-width="0.35cm" draw:marker-start-center="false" draw:marker-end-width="0.35cm" draw:marker-end-center="false" draw:stroke-linejoin="round" svg:stroke-linecap="round" draw:fill="solid" draw:fill-color="#729fcf" draw:textarea-horizontal-align="center" draw:textarea-vertical-align="middl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18pt" fo:font-style="normal" fo:text-shadow="none" style:text-underline-style="none" fo:font-weight="normal" style:letter-kerning="true" style:font-name-asian="Noto Sans KR3" style:font-family-asian="'Noto Sans KR'"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width="0.03cm" svg:stroke-color="#7f7f7f" draw:marker-start-width="0.25cm" draw:marker-end-width="0.25cm"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style:style>
    <style:style style:name="Filled_20_Green" style:display-name="Filled Green" style:family="graphic" style:parent-style-name="Filled">
      <style:graphic-properties draw:fill-gradient-name="녹색으로_20_채움"/>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style:style>
    <style:style style:name="Filled_20_Yellow" style:display-name="Filled Yellow" style:family="graphic" style:parent-style-name="Filled">
      <style:graphic-properties draw:fill-gradient-name="노란색으로_20_채움"/>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HDOfficeLightV0-background" style:family="presentation">
      <style:graphic-properties draw:stroke="none" draw:fill="solid" draw:fill-color="#ffffff" draw:opacity="100%"/>
      <style:text-properties style:letter-kerning="true"/>
    </style:style>
    <style:style style:name="Master1-HDOfficeLightV0-backgroundobjects" style:family="presentation">
      <style:graphic-properties draw:textarea-horizontal-align="justify" draw:shadow="hidden" draw:shadow-offset-x="0.2cm" draw:shadow-offset-y="0.2cm" draw:shadow-color="#808080"/>
      <style:text-properties style:letter-kerning="true"/>
    </style:style>
    <style:style style:name="Master1-HDOfficeLightV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HDOfficeLightV0-outline1" style:family="presentation">
      <style:graphic-properties draw:stroke="none" draw:fill="none" draw:auto-grow-height="false" draw:fit-to-size="false" style:shrink-to-fit="true">
        <text:list-style style:name="Master1-HDOfficeLightV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HDOfficeLightV0-outline2" style:family="presentation" style:parent-style-name="Master1-HDOfficeLightV0-outline1">
      <style:paragraph-properties fo:margin-top="0.4cm" fo:margin-bottom="0cm"/>
      <style:text-properties fo:font-size="28pt" style:font-size-asian="28pt" style:font-size-complex="28pt"/>
    </style:style>
    <style:style style:name="Master1-HDOfficeLightV0-outline3" style:family="presentation" style:parent-style-name="Master1-HDOfficeLightV0-outline2">
      <style:paragraph-properties fo:margin-top="0.3cm" fo:margin-bottom="0cm"/>
      <style:text-properties fo:font-size="24pt" style:font-size-asian="24pt" style:font-size-complex="24pt"/>
    </style:style>
    <style:style style:name="Master1-HDOfficeLightV0-outline4" style:family="presentation" style:parent-style-name="Master1-HDOfficeLightV0-outline3">
      <style:paragraph-properties fo:margin-top="0.2cm" fo:margin-bottom="0cm"/>
      <style:text-properties fo:font-size="20pt" style:font-size-asian="20pt" style:font-size-complex="20pt"/>
    </style:style>
    <style:style style:name="Master1-HDOfficeLightV0-outline5" style:family="presentation" style:parent-style-name="Master1-HDOfficeLightV0-outline4">
      <style:paragraph-properties fo:margin-top="0.1cm" fo:margin-bottom="0cm"/>
      <style:text-properties fo:font-size="20pt" style:font-size-asian="20pt" style:font-size-complex="20pt"/>
    </style:style>
    <style:style style:name="Master1-HDOfficeLightV0-outline6" style:family="presentation" style:parent-style-name="Master1-HDOfficeLightV0-outline5">
      <style:paragraph-properties fo:margin-top="0.1cm" fo:margin-bottom="0cm"/>
      <style:text-properties fo:font-size="20pt" style:font-size-asian="20pt" style:font-size-complex="20pt"/>
    </style:style>
    <style:style style:name="Master1-HDOfficeLightV0-outline7" style:family="presentation" style:parent-style-name="Master1-HDOfficeLightV0-outline6">
      <style:paragraph-properties fo:margin-top="0.1cm" fo:margin-bottom="0cm"/>
      <style:text-properties fo:font-size="20pt" style:font-size-asian="20pt" style:font-size-complex="20pt"/>
    </style:style>
    <style:style style:name="Master1-HDOfficeLightV0-outline8" style:family="presentation" style:parent-style-name="Master1-HDOfficeLightV0-outline7">
      <style:paragraph-properties fo:margin-top="0.1cm" fo:margin-bottom="0cm"/>
      <style:text-properties fo:font-size="20pt" style:font-size-asian="20pt" style:font-size-complex="20pt"/>
    </style:style>
    <style:style style:name="Master1-HDOfficeLightV0-outline9" style:family="presentation" style:parent-style-name="Master1-HDOfficeLightV0-outline8">
      <style:paragraph-properties fo:margin-top="0.1cm" fo:margin-bottom="0cm"/>
      <style:text-properties fo:font-size="20pt" style:font-size-asian="20pt" style:font-size-complex="20pt"/>
    </style:style>
    <style:style style:name="Master1-HDOfficeLightV0-subtitle" style:family="presentation">
      <style:graphic-properties draw:stroke="none" draw:fill="none" draw:textarea-vertical-align="middle">
        <text:list-style style:name="Master1-HDOfficeLightV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HDOfficeLightV0-title" style:family="presentation">
      <style:graphic-properties draw:stroke="none" draw:fill="none" draw:textarea-vertical-align="middle">
        <text:list-style style:name="Master1-HDOfficeLightV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제목-슬라이드-background" style:family="presentation">
      <style:graphic-properties draw:stroke="none" draw:fill="solid" draw:fill-color="#ffffff" draw:opacity="100%"/>
      <style:text-properties style:letter-kerning="true"/>
    </style:style>
    <style:style style:name="Master1-Layout1-title-제목-슬라이드-backgroundobjects" style:family="presentation">
      <style:graphic-properties draw:textarea-horizontal-align="justify" draw:shadow="hidden" draw:shadow-offset-x="0.2cm" draw:shadow-offset-y="0.2cm" draw:shadow-color="#808080"/>
      <style:text-properties style:letter-kerning="true"/>
    </style:style>
    <style:style style:name="Master1-Layout1-title-제목-슬라이드-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제목-슬라이드-outline1" style:family="presentation">
      <style:graphic-properties draw:stroke="none" draw:fill="none" draw:auto-grow-height="false" draw:fit-to-size="false" style:shrink-to-fit="true">
        <text:list-style style:name="Master1-Layout1-title-제목-슬라이드-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제목-슬라이드-outline2" style:family="presentation" style:parent-style-name="Master1-Layout1-title-제목-슬라이드-outline1">
      <style:paragraph-properties fo:margin-top="0.4cm" fo:margin-bottom="0cm"/>
      <style:text-properties fo:font-size="28pt" style:font-size-asian="28pt" style:font-size-complex="28pt"/>
    </style:style>
    <style:style style:name="Master1-Layout1-title-제목-슬라이드-outline3" style:family="presentation" style:parent-style-name="Master1-Layout1-title-제목-슬라이드-outline2">
      <style:paragraph-properties fo:margin-top="0.3cm" fo:margin-bottom="0cm"/>
      <style:text-properties fo:font-size="24pt" style:font-size-asian="24pt" style:font-size-complex="24pt"/>
    </style:style>
    <style:style style:name="Master1-Layout1-title-제목-슬라이드-outline4" style:family="presentation" style:parent-style-name="Master1-Layout1-title-제목-슬라이드-outline3">
      <style:paragraph-properties fo:margin-top="0.2cm" fo:margin-bottom="0cm"/>
      <style:text-properties fo:font-size="20pt" style:font-size-asian="20pt" style:font-size-complex="20pt"/>
    </style:style>
    <style:style style:name="Master1-Layout1-title-제목-슬라이드-outline5" style:family="presentation" style:parent-style-name="Master1-Layout1-title-제목-슬라이드-outline4">
      <style:paragraph-properties fo:margin-top="0.1cm" fo:margin-bottom="0cm"/>
      <style:text-properties fo:font-size="20pt" style:font-size-asian="20pt" style:font-size-complex="20pt"/>
    </style:style>
    <style:style style:name="Master1-Layout1-title-제목-슬라이드-outline6" style:family="presentation" style:parent-style-name="Master1-Layout1-title-제목-슬라이드-outline5">
      <style:paragraph-properties fo:margin-top="0.1cm" fo:margin-bottom="0cm"/>
      <style:text-properties fo:font-size="20pt" style:font-size-asian="20pt" style:font-size-complex="20pt"/>
    </style:style>
    <style:style style:name="Master1-Layout1-title-제목-슬라이드-outline7" style:family="presentation" style:parent-style-name="Master1-Layout1-title-제목-슬라이드-outline6">
      <style:paragraph-properties fo:margin-top="0.1cm" fo:margin-bottom="0cm"/>
      <style:text-properties fo:font-size="20pt" style:font-size-asian="20pt" style:font-size-complex="20pt"/>
    </style:style>
    <style:style style:name="Master1-Layout1-title-제목-슬라이드-outline8" style:family="presentation" style:parent-style-name="Master1-Layout1-title-제목-슬라이드-outline7">
      <style:paragraph-properties fo:margin-top="0.1cm" fo:margin-bottom="0cm"/>
      <style:text-properties fo:font-size="20pt" style:font-size-asian="20pt" style:font-size-complex="20pt"/>
    </style:style>
    <style:style style:name="Master1-Layout1-title-제목-슬라이드-outline9" style:family="presentation" style:parent-style-name="Master1-Layout1-title-제목-슬라이드-outline8">
      <style:paragraph-properties fo:margin-top="0.1cm" fo:margin-bottom="0cm"/>
      <style:text-properties fo:font-size="20pt" style:font-size-asian="20pt" style:font-size-complex="20pt"/>
    </style:style>
    <style:style style:name="Master1-Layout1-title-제목-슬라이드-subtitle" style:family="presentation">
      <style:graphic-properties draw:stroke="none" draw:fill="none" draw:textarea-vertical-align="middle">
        <text:list-style style:name="Master1-Layout1-title-제목-슬라이드-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제목-슬라이드-title" style:family="presentation">
      <style:graphic-properties draw:stroke="none" draw:fill="none" draw:textarea-vertical-align="middle">
        <text:list-style style:name="Master1-Layout1-title-제목-슬라이드-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제목-및-내용-background" style:family="presentation">
      <style:graphic-properties draw:stroke="none" draw:fill="solid" draw:fill-color="#ffffff" draw:opacity="100%"/>
      <style:text-properties style:letter-kerning="true"/>
    </style:style>
    <style:style style:name="Master1-Layout2-obj-제목-및-내용-backgroundobjects" style:family="presentation">
      <style:graphic-properties draw:textarea-horizontal-align="justify" draw:shadow="hidden" draw:shadow-offset-x="0.2cm" draw:shadow-offset-y="0.2cm" draw:shadow-color="#808080"/>
      <style:text-properties style:letter-kerning="true"/>
    </style:style>
    <style:style style:name="Master1-Layout2-obj-제목-및-내용-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제목-및-내용-outline1" style:family="presentation">
      <style:graphic-properties draw:stroke="none" draw:fill="none" draw:auto-grow-height="false" draw:fit-to-size="false" style:shrink-to-fit="true">
        <text:list-style style:name="Master1-Layout2-obj-제목-및-내용-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제목-및-내용-outline2" style:family="presentation" style:parent-style-name="Master1-Layout2-obj-제목-및-내용-outline1">
      <style:paragraph-properties fo:margin-top="0.4cm" fo:margin-bottom="0cm"/>
      <style:text-properties fo:font-size="28pt" style:font-size-asian="28pt" style:font-size-complex="28pt"/>
    </style:style>
    <style:style style:name="Master1-Layout2-obj-제목-및-내용-outline3" style:family="presentation" style:parent-style-name="Master1-Layout2-obj-제목-및-내용-outline2">
      <style:paragraph-properties fo:margin-top="0.3cm" fo:margin-bottom="0cm"/>
      <style:text-properties fo:font-size="24pt" style:font-size-asian="24pt" style:font-size-complex="24pt"/>
    </style:style>
    <style:style style:name="Master1-Layout2-obj-제목-및-내용-outline4" style:family="presentation" style:parent-style-name="Master1-Layout2-obj-제목-및-내용-outline3">
      <style:paragraph-properties fo:margin-top="0.2cm" fo:margin-bottom="0cm"/>
      <style:text-properties fo:font-size="20pt" style:font-size-asian="20pt" style:font-size-complex="20pt"/>
    </style:style>
    <style:style style:name="Master1-Layout2-obj-제목-및-내용-outline5" style:family="presentation" style:parent-style-name="Master1-Layout2-obj-제목-및-내용-outline4">
      <style:paragraph-properties fo:margin-top="0.1cm" fo:margin-bottom="0cm"/>
      <style:text-properties fo:font-size="20pt" style:font-size-asian="20pt" style:font-size-complex="20pt"/>
    </style:style>
    <style:style style:name="Master1-Layout2-obj-제목-및-내용-outline6" style:family="presentation" style:parent-style-name="Master1-Layout2-obj-제목-및-내용-outline5">
      <style:paragraph-properties fo:margin-top="0.1cm" fo:margin-bottom="0cm"/>
      <style:text-properties fo:font-size="20pt" style:font-size-asian="20pt" style:font-size-complex="20pt"/>
    </style:style>
    <style:style style:name="Master1-Layout2-obj-제목-및-내용-outline7" style:family="presentation" style:parent-style-name="Master1-Layout2-obj-제목-및-내용-outline6">
      <style:paragraph-properties fo:margin-top="0.1cm" fo:margin-bottom="0cm"/>
      <style:text-properties fo:font-size="20pt" style:font-size-asian="20pt" style:font-size-complex="20pt"/>
    </style:style>
    <style:style style:name="Master1-Layout2-obj-제목-및-내용-outline8" style:family="presentation" style:parent-style-name="Master1-Layout2-obj-제목-및-내용-outline7">
      <style:paragraph-properties fo:margin-top="0.1cm" fo:margin-bottom="0cm"/>
      <style:text-properties fo:font-size="20pt" style:font-size-asian="20pt" style:font-size-complex="20pt"/>
    </style:style>
    <style:style style:name="Master1-Layout2-obj-제목-및-내용-outline9" style:family="presentation" style:parent-style-name="Master1-Layout2-obj-제목-및-내용-outline8">
      <style:paragraph-properties fo:margin-top="0.1cm" fo:margin-bottom="0cm"/>
      <style:text-properties fo:font-size="20pt" style:font-size-asian="20pt" style:font-size-complex="20pt"/>
    </style:style>
    <style:style style:name="Master1-Layout2-obj-제목-및-내용-subtitle" style:family="presentation">
      <style:graphic-properties draw:stroke="none" draw:fill="none" draw:textarea-vertical-align="middle">
        <text:list-style style:name="Master1-Layout2-obj-제목-및-내용-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제목-및-내용-title" style:family="presentation">
      <style:graphic-properties draw:stroke="none" draw:fill="none" draw:textarea-vertical-align="middle">
        <text:list-style style:name="Master1-Layout2-obj-제목-및-내용-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구역-머리글-background" style:family="presentation">
      <style:graphic-properties draw:stroke="none" draw:fill="solid" draw:fill-color="#ffffff" draw:opacity="100%"/>
      <style:text-properties style:letter-kerning="true"/>
    </style:style>
    <style:style style:name="Master1-Layout3-secHead-구역-머리글-backgroundobjects" style:family="presentation">
      <style:graphic-properties draw:textarea-horizontal-align="justify" draw:shadow="hidden" draw:shadow-offset-x="0.2cm" draw:shadow-offset-y="0.2cm" draw:shadow-color="#808080"/>
      <style:text-properties style:letter-kerning="true"/>
    </style:style>
    <style:style style:name="Master1-Layout3-secHead-구역-머리글-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구역-머리글-outline1" style:family="presentation">
      <style:graphic-properties draw:stroke="none" draw:fill="none" draw:auto-grow-height="false" draw:fit-to-size="false" style:shrink-to-fit="true">
        <text:list-style style:name="Master1-Layout3-secHead-구역-머리글-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구역-머리글-outline2" style:family="presentation" style:parent-style-name="Master1-Layout3-secHead-구역-머리글-outline1">
      <style:paragraph-properties fo:margin-top="0.4cm" fo:margin-bottom="0cm"/>
      <style:text-properties fo:font-size="28pt" style:font-size-asian="28pt" style:font-size-complex="28pt"/>
    </style:style>
    <style:style style:name="Master1-Layout3-secHead-구역-머리글-outline3" style:family="presentation" style:parent-style-name="Master1-Layout3-secHead-구역-머리글-outline2">
      <style:paragraph-properties fo:margin-top="0.3cm" fo:margin-bottom="0cm"/>
      <style:text-properties fo:font-size="24pt" style:font-size-asian="24pt" style:font-size-complex="24pt"/>
    </style:style>
    <style:style style:name="Master1-Layout3-secHead-구역-머리글-outline4" style:family="presentation" style:parent-style-name="Master1-Layout3-secHead-구역-머리글-outline3">
      <style:paragraph-properties fo:margin-top="0.2cm" fo:margin-bottom="0cm"/>
      <style:text-properties fo:font-size="20pt" style:font-size-asian="20pt" style:font-size-complex="20pt"/>
    </style:style>
    <style:style style:name="Master1-Layout3-secHead-구역-머리글-outline5" style:family="presentation" style:parent-style-name="Master1-Layout3-secHead-구역-머리글-outline4">
      <style:paragraph-properties fo:margin-top="0.1cm" fo:margin-bottom="0cm"/>
      <style:text-properties fo:font-size="20pt" style:font-size-asian="20pt" style:font-size-complex="20pt"/>
    </style:style>
    <style:style style:name="Master1-Layout3-secHead-구역-머리글-outline6" style:family="presentation" style:parent-style-name="Master1-Layout3-secHead-구역-머리글-outline5">
      <style:paragraph-properties fo:margin-top="0.1cm" fo:margin-bottom="0cm"/>
      <style:text-properties fo:font-size="20pt" style:font-size-asian="20pt" style:font-size-complex="20pt"/>
    </style:style>
    <style:style style:name="Master1-Layout3-secHead-구역-머리글-outline7" style:family="presentation" style:parent-style-name="Master1-Layout3-secHead-구역-머리글-outline6">
      <style:paragraph-properties fo:margin-top="0.1cm" fo:margin-bottom="0cm"/>
      <style:text-properties fo:font-size="20pt" style:font-size-asian="20pt" style:font-size-complex="20pt"/>
    </style:style>
    <style:style style:name="Master1-Layout3-secHead-구역-머리글-outline8" style:family="presentation" style:parent-style-name="Master1-Layout3-secHead-구역-머리글-outline7">
      <style:paragraph-properties fo:margin-top="0.1cm" fo:margin-bottom="0cm"/>
      <style:text-properties fo:font-size="20pt" style:font-size-asian="20pt" style:font-size-complex="20pt"/>
    </style:style>
    <style:style style:name="Master1-Layout3-secHead-구역-머리글-outline9" style:family="presentation" style:parent-style-name="Master1-Layout3-secHead-구역-머리글-outline8">
      <style:paragraph-properties fo:margin-top="0.1cm" fo:margin-bottom="0cm"/>
      <style:text-properties fo:font-size="20pt" style:font-size-asian="20pt" style:font-size-complex="20pt"/>
    </style:style>
    <style:style style:name="Master1-Layout3-secHead-구역-머리글-subtitle" style:family="presentation">
      <style:graphic-properties draw:stroke="none" draw:fill="none" draw:textarea-vertical-align="middle">
        <text:list-style style:name="Master1-Layout3-secHead-구역-머리글-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구역-머리글-title" style:family="presentation">
      <style:graphic-properties draw:stroke="none" draw:fill="none" draw:textarea-vertical-align="middle">
        <text:list-style style:name="Master1-Layout3-secHead-구역-머리글-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콘텐츠-2개-background" style:family="presentation">
      <style:graphic-properties draw:stroke="none" draw:fill="solid" draw:fill-color="#ffffff" draw:opacity="100%"/>
      <style:text-properties style:letter-kerning="true"/>
    </style:style>
    <style:style style:name="Master1-Layout4-twoObj-콘텐츠-2개-backgroundobjects" style:family="presentation">
      <style:graphic-properties draw:textarea-horizontal-align="justify" draw:shadow="hidden" draw:shadow-offset-x="0.2cm" draw:shadow-offset-y="0.2cm" draw:shadow-color="#808080"/>
      <style:text-properties style:letter-kerning="true"/>
    </style:style>
    <style:style style:name="Master1-Layout4-twoObj-콘텐츠-2개-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콘텐츠-2개-outline1" style:family="presentation">
      <style:graphic-properties draw:stroke="none" draw:fill="none" draw:auto-grow-height="false" draw:fit-to-size="false" style:shrink-to-fit="true">
        <text:list-style style:name="Master1-Layout4-twoObj-콘텐츠-2개-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콘텐츠-2개-outline2" style:family="presentation" style:parent-style-name="Master1-Layout4-twoObj-콘텐츠-2개-outline1">
      <style:paragraph-properties fo:margin-top="0.4cm" fo:margin-bottom="0cm"/>
      <style:text-properties fo:font-size="28pt" style:font-size-asian="28pt" style:font-size-complex="28pt"/>
    </style:style>
    <style:style style:name="Master1-Layout4-twoObj-콘텐츠-2개-outline3" style:family="presentation" style:parent-style-name="Master1-Layout4-twoObj-콘텐츠-2개-outline2">
      <style:paragraph-properties fo:margin-top="0.3cm" fo:margin-bottom="0cm"/>
      <style:text-properties fo:font-size="24pt" style:font-size-asian="24pt" style:font-size-complex="24pt"/>
    </style:style>
    <style:style style:name="Master1-Layout4-twoObj-콘텐츠-2개-outline4" style:family="presentation" style:parent-style-name="Master1-Layout4-twoObj-콘텐츠-2개-outline3">
      <style:paragraph-properties fo:margin-top="0.2cm" fo:margin-bottom="0cm"/>
      <style:text-properties fo:font-size="20pt" style:font-size-asian="20pt" style:font-size-complex="20pt"/>
    </style:style>
    <style:style style:name="Master1-Layout4-twoObj-콘텐츠-2개-outline5" style:family="presentation" style:parent-style-name="Master1-Layout4-twoObj-콘텐츠-2개-outline4">
      <style:paragraph-properties fo:margin-top="0.1cm" fo:margin-bottom="0cm"/>
      <style:text-properties fo:font-size="20pt" style:font-size-asian="20pt" style:font-size-complex="20pt"/>
    </style:style>
    <style:style style:name="Master1-Layout4-twoObj-콘텐츠-2개-outline6" style:family="presentation" style:parent-style-name="Master1-Layout4-twoObj-콘텐츠-2개-outline5">
      <style:paragraph-properties fo:margin-top="0.1cm" fo:margin-bottom="0cm"/>
      <style:text-properties fo:font-size="20pt" style:font-size-asian="20pt" style:font-size-complex="20pt"/>
    </style:style>
    <style:style style:name="Master1-Layout4-twoObj-콘텐츠-2개-outline7" style:family="presentation" style:parent-style-name="Master1-Layout4-twoObj-콘텐츠-2개-outline6">
      <style:paragraph-properties fo:margin-top="0.1cm" fo:margin-bottom="0cm"/>
      <style:text-properties fo:font-size="20pt" style:font-size-asian="20pt" style:font-size-complex="20pt"/>
    </style:style>
    <style:style style:name="Master1-Layout4-twoObj-콘텐츠-2개-outline8" style:family="presentation" style:parent-style-name="Master1-Layout4-twoObj-콘텐츠-2개-outline7">
      <style:paragraph-properties fo:margin-top="0.1cm" fo:margin-bottom="0cm"/>
      <style:text-properties fo:font-size="20pt" style:font-size-asian="20pt" style:font-size-complex="20pt"/>
    </style:style>
    <style:style style:name="Master1-Layout4-twoObj-콘텐츠-2개-outline9" style:family="presentation" style:parent-style-name="Master1-Layout4-twoObj-콘텐츠-2개-outline8">
      <style:paragraph-properties fo:margin-top="0.1cm" fo:margin-bottom="0cm"/>
      <style:text-properties fo:font-size="20pt" style:font-size-asian="20pt" style:font-size-complex="20pt"/>
    </style:style>
    <style:style style:name="Master1-Layout4-twoObj-콘텐츠-2개-subtitle" style:family="presentation">
      <style:graphic-properties draw:stroke="none" draw:fill="none" draw:textarea-vertical-align="middle">
        <text:list-style style:name="Master1-Layout4-twoObj-콘텐츠-2개-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콘텐츠-2개-title" style:family="presentation">
      <style:graphic-properties draw:stroke="none" draw:fill="none" draw:textarea-vertical-align="middle">
        <text:list-style style:name="Master1-Layout4-twoObj-콘텐츠-2개-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비교-background" style:family="presentation">
      <style:graphic-properties draw:stroke="none" draw:fill="solid" draw:fill-color="#ffffff" draw:opacity="100%"/>
      <style:text-properties style:letter-kerning="true"/>
    </style:style>
    <style:style style:name="Master1-Layout5-cust-비교-backgroundobjects" style:family="presentation">
      <style:graphic-properties draw:textarea-horizontal-align="justify" draw:shadow="hidden" draw:shadow-offset-x="0.2cm" draw:shadow-offset-y="0.2cm" draw:shadow-color="#808080"/>
      <style:text-properties style:letter-kerning="true"/>
    </style:style>
    <style:style style:name="Master1-Layout5-cust-비교-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비교-outline1" style:family="presentation">
      <style:graphic-properties draw:stroke="none" draw:fill="none" draw:auto-grow-height="false" draw:fit-to-size="false" style:shrink-to-fit="true">
        <text:list-style style:name="Master1-Layout5-cust-비교-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비교-outline2" style:family="presentation" style:parent-style-name="Master1-Layout5-cust-비교-outline1">
      <style:paragraph-properties fo:margin-top="0.4cm" fo:margin-bottom="0cm"/>
      <style:text-properties fo:font-size="28pt" style:font-size-asian="28pt" style:font-size-complex="28pt"/>
    </style:style>
    <style:style style:name="Master1-Layout5-cust-비교-outline3" style:family="presentation" style:parent-style-name="Master1-Layout5-cust-비교-outline2">
      <style:paragraph-properties fo:margin-top="0.3cm" fo:margin-bottom="0cm"/>
      <style:text-properties fo:font-size="24pt" style:font-size-asian="24pt" style:font-size-complex="24pt"/>
    </style:style>
    <style:style style:name="Master1-Layout5-cust-비교-outline4" style:family="presentation" style:parent-style-name="Master1-Layout5-cust-비교-outline3">
      <style:paragraph-properties fo:margin-top="0.2cm" fo:margin-bottom="0cm"/>
      <style:text-properties fo:font-size="20pt" style:font-size-asian="20pt" style:font-size-complex="20pt"/>
    </style:style>
    <style:style style:name="Master1-Layout5-cust-비교-outline5" style:family="presentation" style:parent-style-name="Master1-Layout5-cust-비교-outline4">
      <style:paragraph-properties fo:margin-top="0.1cm" fo:margin-bottom="0cm"/>
      <style:text-properties fo:font-size="20pt" style:font-size-asian="20pt" style:font-size-complex="20pt"/>
    </style:style>
    <style:style style:name="Master1-Layout5-cust-비교-outline6" style:family="presentation" style:parent-style-name="Master1-Layout5-cust-비교-outline5">
      <style:paragraph-properties fo:margin-top="0.1cm" fo:margin-bottom="0cm"/>
      <style:text-properties fo:font-size="20pt" style:font-size-asian="20pt" style:font-size-complex="20pt"/>
    </style:style>
    <style:style style:name="Master1-Layout5-cust-비교-outline7" style:family="presentation" style:parent-style-name="Master1-Layout5-cust-비교-outline6">
      <style:paragraph-properties fo:margin-top="0.1cm" fo:margin-bottom="0cm"/>
      <style:text-properties fo:font-size="20pt" style:font-size-asian="20pt" style:font-size-complex="20pt"/>
    </style:style>
    <style:style style:name="Master1-Layout5-cust-비교-outline8" style:family="presentation" style:parent-style-name="Master1-Layout5-cust-비교-outline7">
      <style:paragraph-properties fo:margin-top="0.1cm" fo:margin-bottom="0cm"/>
      <style:text-properties fo:font-size="20pt" style:font-size-asian="20pt" style:font-size-complex="20pt"/>
    </style:style>
    <style:style style:name="Master1-Layout5-cust-비교-outline9" style:family="presentation" style:parent-style-name="Master1-Layout5-cust-비교-outline8">
      <style:paragraph-properties fo:margin-top="0.1cm" fo:margin-bottom="0cm"/>
      <style:text-properties fo:font-size="20pt" style:font-size-asian="20pt" style:font-size-complex="20pt"/>
    </style:style>
    <style:style style:name="Master1-Layout5-cust-비교-subtitle" style:family="presentation">
      <style:graphic-properties draw:stroke="none" draw:fill="none" draw:textarea-vertical-align="middle">
        <text:list-style style:name="Master1-Layout5-cust-비교-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비교-title" style:family="presentation">
      <style:graphic-properties draw:stroke="none" draw:fill="none" draw:textarea-vertical-align="middle">
        <text:list-style style:name="Master1-Layout5-cust-비교-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cust-제목만-background" style:family="presentation">
      <style:graphic-properties draw:stroke="none" draw:fill="solid" draw:fill-color="#ffffff" draw:opacity="100%"/>
      <style:text-properties style:letter-kerning="true"/>
    </style:style>
    <style:style style:name="Master1-Layout6-cust-제목만-backgroundobjects" style:family="presentation">
      <style:graphic-properties draw:textarea-horizontal-align="justify" draw:shadow="hidden" draw:shadow-offset-x="0.2cm" draw:shadow-offset-y="0.2cm" draw:shadow-color="#808080"/>
      <style:text-properties style:letter-kerning="true"/>
    </style:style>
    <style:style style:name="Master1-Layout6-cust-제목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cust-제목만-outline1" style:family="presentation">
      <style:graphic-properties draw:stroke="none" draw:fill="none" draw:auto-grow-height="false" draw:fit-to-size="false" style:shrink-to-fit="true">
        <text:list-style style:name="Master1-Layout6-cust-제목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제목만-outline2" style:family="presentation" style:parent-style-name="Master1-Layout6-cust-제목만-outline1">
      <style:paragraph-properties fo:margin-top="0.4cm" fo:margin-bottom="0cm"/>
      <style:text-properties fo:font-size="28pt" style:font-size-asian="28pt" style:font-size-complex="28pt"/>
    </style:style>
    <style:style style:name="Master1-Layout6-cust-제목만-outline3" style:family="presentation" style:parent-style-name="Master1-Layout6-cust-제목만-outline2">
      <style:paragraph-properties fo:margin-top="0.3cm" fo:margin-bottom="0cm"/>
      <style:text-properties fo:font-size="24pt" style:font-size-asian="24pt" style:font-size-complex="24pt"/>
    </style:style>
    <style:style style:name="Master1-Layout6-cust-제목만-outline4" style:family="presentation" style:parent-style-name="Master1-Layout6-cust-제목만-outline3">
      <style:paragraph-properties fo:margin-top="0.2cm" fo:margin-bottom="0cm"/>
      <style:text-properties fo:font-size="20pt" style:font-size-asian="20pt" style:font-size-complex="20pt"/>
    </style:style>
    <style:style style:name="Master1-Layout6-cust-제목만-outline5" style:family="presentation" style:parent-style-name="Master1-Layout6-cust-제목만-outline4">
      <style:paragraph-properties fo:margin-top="0.1cm" fo:margin-bottom="0cm"/>
      <style:text-properties fo:font-size="20pt" style:font-size-asian="20pt" style:font-size-complex="20pt"/>
    </style:style>
    <style:style style:name="Master1-Layout6-cust-제목만-outline6" style:family="presentation" style:parent-style-name="Master1-Layout6-cust-제목만-outline5">
      <style:paragraph-properties fo:margin-top="0.1cm" fo:margin-bottom="0cm"/>
      <style:text-properties fo:font-size="20pt" style:font-size-asian="20pt" style:font-size-complex="20pt"/>
    </style:style>
    <style:style style:name="Master1-Layout6-cust-제목만-outline7" style:family="presentation" style:parent-style-name="Master1-Layout6-cust-제목만-outline6">
      <style:paragraph-properties fo:margin-top="0.1cm" fo:margin-bottom="0cm"/>
      <style:text-properties fo:font-size="20pt" style:font-size-asian="20pt" style:font-size-complex="20pt"/>
    </style:style>
    <style:style style:name="Master1-Layout6-cust-제목만-outline8" style:family="presentation" style:parent-style-name="Master1-Layout6-cust-제목만-outline7">
      <style:paragraph-properties fo:margin-top="0.1cm" fo:margin-bottom="0cm"/>
      <style:text-properties fo:font-size="20pt" style:font-size-asian="20pt" style:font-size-complex="20pt"/>
    </style:style>
    <style:style style:name="Master1-Layout6-cust-제목만-outline9" style:family="presentation" style:parent-style-name="Master1-Layout6-cust-제목만-outline8">
      <style:paragraph-properties fo:margin-top="0.1cm" fo:margin-bottom="0cm"/>
      <style:text-properties fo:font-size="20pt" style:font-size-asian="20pt" style:font-size-complex="20pt"/>
    </style:style>
    <style:style style:name="Master1-Layout6-cust-제목만-subtitle" style:family="presentation">
      <style:graphic-properties draw:stroke="none" draw:fill="none" draw:textarea-vertical-align="middle">
        <text:list-style style:name="Master1-Layout6-cust-제목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제목만-title" style:family="presentation">
      <style:graphic-properties draw:stroke="none" draw:fill="none" draw:textarea-vertical-align="middle">
        <text:list-style style:name="Master1-Layout6-cust-제목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빈-화면-background" style:family="presentation">
      <style:graphic-properties draw:stroke="none" draw:fill="solid" draw:fill-color="#ffffff" draw:opacity="100%"/>
      <style:text-properties style:letter-kerning="true"/>
    </style:style>
    <style:style style:name="Master1-Layout7-blank-빈-화면-backgroundobjects" style:family="presentation">
      <style:graphic-properties draw:textarea-horizontal-align="justify" draw:shadow="hidden" draw:shadow-offset-x="0.2cm" draw:shadow-offset-y="0.2cm" draw:shadow-color="#808080"/>
      <style:text-properties style:letter-kerning="true"/>
    </style:style>
    <style:style style:name="Master1-Layout7-blank-빈-화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빈-화면-outline1" style:family="presentation">
      <style:graphic-properties draw:stroke="none" draw:fill="none" draw:auto-grow-height="false" draw:fit-to-size="false" style:shrink-to-fit="true">
        <text:list-style style:name="Master1-Layout7-blank-빈-화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빈-화면-outline2" style:family="presentation" style:parent-style-name="Master1-Layout7-blank-빈-화면-outline1">
      <style:paragraph-properties fo:margin-top="0.4cm" fo:margin-bottom="0cm"/>
      <style:text-properties fo:font-size="28pt" style:font-size-asian="28pt" style:font-size-complex="28pt"/>
    </style:style>
    <style:style style:name="Master1-Layout7-blank-빈-화면-outline3" style:family="presentation" style:parent-style-name="Master1-Layout7-blank-빈-화면-outline2">
      <style:paragraph-properties fo:margin-top="0.3cm" fo:margin-bottom="0cm"/>
      <style:text-properties fo:font-size="24pt" style:font-size-asian="24pt" style:font-size-complex="24pt"/>
    </style:style>
    <style:style style:name="Master1-Layout7-blank-빈-화면-outline4" style:family="presentation" style:parent-style-name="Master1-Layout7-blank-빈-화면-outline3">
      <style:paragraph-properties fo:margin-top="0.2cm" fo:margin-bottom="0cm"/>
      <style:text-properties fo:font-size="20pt" style:font-size-asian="20pt" style:font-size-complex="20pt"/>
    </style:style>
    <style:style style:name="Master1-Layout7-blank-빈-화면-outline5" style:family="presentation" style:parent-style-name="Master1-Layout7-blank-빈-화면-outline4">
      <style:paragraph-properties fo:margin-top="0.1cm" fo:margin-bottom="0cm"/>
      <style:text-properties fo:font-size="20pt" style:font-size-asian="20pt" style:font-size-complex="20pt"/>
    </style:style>
    <style:style style:name="Master1-Layout7-blank-빈-화면-outline6" style:family="presentation" style:parent-style-name="Master1-Layout7-blank-빈-화면-outline5">
      <style:paragraph-properties fo:margin-top="0.1cm" fo:margin-bottom="0cm"/>
      <style:text-properties fo:font-size="20pt" style:font-size-asian="20pt" style:font-size-complex="20pt"/>
    </style:style>
    <style:style style:name="Master1-Layout7-blank-빈-화면-outline7" style:family="presentation" style:parent-style-name="Master1-Layout7-blank-빈-화면-outline6">
      <style:paragraph-properties fo:margin-top="0.1cm" fo:margin-bottom="0cm"/>
      <style:text-properties fo:font-size="20pt" style:font-size-asian="20pt" style:font-size-complex="20pt"/>
    </style:style>
    <style:style style:name="Master1-Layout7-blank-빈-화면-outline8" style:family="presentation" style:parent-style-name="Master1-Layout7-blank-빈-화면-outline7">
      <style:paragraph-properties fo:margin-top="0.1cm" fo:margin-bottom="0cm"/>
      <style:text-properties fo:font-size="20pt" style:font-size-asian="20pt" style:font-size-complex="20pt"/>
    </style:style>
    <style:style style:name="Master1-Layout7-blank-빈-화면-outline9" style:family="presentation" style:parent-style-name="Master1-Layout7-blank-빈-화면-outline8">
      <style:paragraph-properties fo:margin-top="0.1cm" fo:margin-bottom="0cm"/>
      <style:text-properties fo:font-size="20pt" style:font-size-asian="20pt" style:font-size-complex="20pt"/>
    </style:style>
    <style:style style:name="Master1-Layout7-blank-빈-화면-subtitle" style:family="presentation">
      <style:graphic-properties draw:stroke="none" draw:fill="none" draw:textarea-vertical-align="middle">
        <text:list-style style:name="Master1-Layout7-blank-빈-화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빈-화면-title" style:family="presentation">
      <style:graphic-properties draw:stroke="none" draw:fill="none" draw:textarea-vertical-align="middle">
        <text:list-style style:name="Master1-Layout7-blank-빈-화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캡션-있는-콘텐츠-background" style:family="presentation">
      <style:graphic-properties draw:stroke="none" draw:fill="solid" draw:fill-color="#ffffff" draw:opacity="100%"/>
      <style:text-properties style:letter-kerning="true"/>
    </style:style>
    <style:style style:name="Master1-Layout8-objTx-캡션-있는-콘텐츠-backgroundobjects" style:family="presentation">
      <style:graphic-properties draw:textarea-horizontal-align="justify" draw:shadow="hidden" draw:shadow-offset-x="0.2cm" draw:shadow-offset-y="0.2cm" draw:shadow-color="#808080"/>
      <style:text-properties style:letter-kerning="true"/>
    </style:style>
    <style:style style:name="Master1-Layout8-objTx-캡션-있는-콘텐츠-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캡션-있는-콘텐츠-outline1" style:family="presentation">
      <style:graphic-properties draw:stroke="none" draw:fill="none" draw:auto-grow-height="false" draw:fit-to-size="false" style:shrink-to-fit="true">
        <text:list-style style:name="Master1-Layout8-objTx-캡션-있는-콘텐츠-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캡션-있는-콘텐츠-outline2" style:family="presentation" style:parent-style-name="Master1-Layout8-objTx-캡션-있는-콘텐츠-outline1">
      <style:paragraph-properties fo:margin-top="0.4cm" fo:margin-bottom="0cm"/>
      <style:text-properties fo:font-size="28pt" style:font-size-asian="28pt" style:font-size-complex="28pt"/>
    </style:style>
    <style:style style:name="Master1-Layout8-objTx-캡션-있는-콘텐츠-outline3" style:family="presentation" style:parent-style-name="Master1-Layout8-objTx-캡션-있는-콘텐츠-outline2">
      <style:paragraph-properties fo:margin-top="0.3cm" fo:margin-bottom="0cm"/>
      <style:text-properties fo:font-size="24pt" style:font-size-asian="24pt" style:font-size-complex="24pt"/>
    </style:style>
    <style:style style:name="Master1-Layout8-objTx-캡션-있는-콘텐츠-outline4" style:family="presentation" style:parent-style-name="Master1-Layout8-objTx-캡션-있는-콘텐츠-outline3">
      <style:paragraph-properties fo:margin-top="0.2cm" fo:margin-bottom="0cm"/>
      <style:text-properties fo:font-size="20pt" style:font-size-asian="20pt" style:font-size-complex="20pt"/>
    </style:style>
    <style:style style:name="Master1-Layout8-objTx-캡션-있는-콘텐츠-outline5" style:family="presentation" style:parent-style-name="Master1-Layout8-objTx-캡션-있는-콘텐츠-outline4">
      <style:paragraph-properties fo:margin-top="0.1cm" fo:margin-bottom="0cm"/>
      <style:text-properties fo:font-size="20pt" style:font-size-asian="20pt" style:font-size-complex="20pt"/>
    </style:style>
    <style:style style:name="Master1-Layout8-objTx-캡션-있는-콘텐츠-outline6" style:family="presentation" style:parent-style-name="Master1-Layout8-objTx-캡션-있는-콘텐츠-outline5">
      <style:paragraph-properties fo:margin-top="0.1cm" fo:margin-bottom="0cm"/>
      <style:text-properties fo:font-size="20pt" style:font-size-asian="20pt" style:font-size-complex="20pt"/>
    </style:style>
    <style:style style:name="Master1-Layout8-objTx-캡션-있는-콘텐츠-outline7" style:family="presentation" style:parent-style-name="Master1-Layout8-objTx-캡션-있는-콘텐츠-outline6">
      <style:paragraph-properties fo:margin-top="0.1cm" fo:margin-bottom="0cm"/>
      <style:text-properties fo:font-size="20pt" style:font-size-asian="20pt" style:font-size-complex="20pt"/>
    </style:style>
    <style:style style:name="Master1-Layout8-objTx-캡션-있는-콘텐츠-outline8" style:family="presentation" style:parent-style-name="Master1-Layout8-objTx-캡션-있는-콘텐츠-outline7">
      <style:paragraph-properties fo:margin-top="0.1cm" fo:margin-bottom="0cm"/>
      <style:text-properties fo:font-size="20pt" style:font-size-asian="20pt" style:font-size-complex="20pt"/>
    </style:style>
    <style:style style:name="Master1-Layout8-objTx-캡션-있는-콘텐츠-outline9" style:family="presentation" style:parent-style-name="Master1-Layout8-objTx-캡션-있는-콘텐츠-outline8">
      <style:paragraph-properties fo:margin-top="0.1cm" fo:margin-bottom="0cm"/>
      <style:text-properties fo:font-size="20pt" style:font-size-asian="20pt" style:font-size-complex="20pt"/>
    </style:style>
    <style:style style:name="Master1-Layout8-objTx-캡션-있는-콘텐츠-subtitle" style:family="presentation">
      <style:graphic-properties draw:stroke="none" draw:fill="none" draw:textarea-vertical-align="middle">
        <text:list-style style:name="Master1-Layout8-objTx-캡션-있는-콘텐츠-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캡션-있는-콘텐츠-title" style:family="presentation">
      <style:graphic-properties draw:stroke="none" draw:fill="none" draw:textarea-vertical-align="middle">
        <text:list-style style:name="Master1-Layout8-objTx-캡션-있는-콘텐츠-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캡션-있는-그림-background" style:family="presentation">
      <style:graphic-properties draw:stroke="none" draw:fill="solid" draw:fill-color="#ffffff" draw:opacity="100%"/>
      <style:text-properties style:letter-kerning="true"/>
    </style:style>
    <style:style style:name="Master1-Layout9-picTx-캡션-있는-그림-backgroundobjects" style:family="presentation">
      <style:graphic-properties draw:textarea-horizontal-align="justify" draw:shadow="hidden" draw:shadow-offset-x="0.2cm" draw:shadow-offset-y="0.2cm" draw:shadow-color="#808080"/>
      <style:text-properties style:letter-kerning="true"/>
    </style:style>
    <style:style style:name="Master1-Layout9-picTx-캡션-있는-그림-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캡션-있는-그림-outline1" style:family="presentation">
      <style:graphic-properties draw:stroke="none" draw:fill="none" draw:auto-grow-height="false" draw:fit-to-size="false" style:shrink-to-fit="true">
        <text:list-style style:name="Master1-Layout9-picTx-캡션-있는-그림-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캡션-있는-그림-outline2" style:family="presentation" style:parent-style-name="Master1-Layout9-picTx-캡션-있는-그림-outline1">
      <style:paragraph-properties fo:margin-top="0.4cm" fo:margin-bottom="0cm"/>
      <style:text-properties fo:font-size="28pt" style:font-size-asian="28pt" style:font-size-complex="28pt"/>
    </style:style>
    <style:style style:name="Master1-Layout9-picTx-캡션-있는-그림-outline3" style:family="presentation" style:parent-style-name="Master1-Layout9-picTx-캡션-있는-그림-outline2">
      <style:paragraph-properties fo:margin-top="0.3cm" fo:margin-bottom="0cm"/>
      <style:text-properties fo:font-size="24pt" style:font-size-asian="24pt" style:font-size-complex="24pt"/>
    </style:style>
    <style:style style:name="Master1-Layout9-picTx-캡션-있는-그림-outline4" style:family="presentation" style:parent-style-name="Master1-Layout9-picTx-캡션-있는-그림-outline3">
      <style:paragraph-properties fo:margin-top="0.2cm" fo:margin-bottom="0cm"/>
      <style:text-properties fo:font-size="20pt" style:font-size-asian="20pt" style:font-size-complex="20pt"/>
    </style:style>
    <style:style style:name="Master1-Layout9-picTx-캡션-있는-그림-outline5" style:family="presentation" style:parent-style-name="Master1-Layout9-picTx-캡션-있는-그림-outline4">
      <style:paragraph-properties fo:margin-top="0.1cm" fo:margin-bottom="0cm"/>
      <style:text-properties fo:font-size="20pt" style:font-size-asian="20pt" style:font-size-complex="20pt"/>
    </style:style>
    <style:style style:name="Master1-Layout9-picTx-캡션-있는-그림-outline6" style:family="presentation" style:parent-style-name="Master1-Layout9-picTx-캡션-있는-그림-outline5">
      <style:paragraph-properties fo:margin-top="0.1cm" fo:margin-bottom="0cm"/>
      <style:text-properties fo:font-size="20pt" style:font-size-asian="20pt" style:font-size-complex="20pt"/>
    </style:style>
    <style:style style:name="Master1-Layout9-picTx-캡션-있는-그림-outline7" style:family="presentation" style:parent-style-name="Master1-Layout9-picTx-캡션-있는-그림-outline6">
      <style:paragraph-properties fo:margin-top="0.1cm" fo:margin-bottom="0cm"/>
      <style:text-properties fo:font-size="20pt" style:font-size-asian="20pt" style:font-size-complex="20pt"/>
    </style:style>
    <style:style style:name="Master1-Layout9-picTx-캡션-있는-그림-outline8" style:family="presentation" style:parent-style-name="Master1-Layout9-picTx-캡션-있는-그림-outline7">
      <style:paragraph-properties fo:margin-top="0.1cm" fo:margin-bottom="0cm"/>
      <style:text-properties fo:font-size="20pt" style:font-size-asian="20pt" style:font-size-complex="20pt"/>
    </style:style>
    <style:style style:name="Master1-Layout9-picTx-캡션-있는-그림-outline9" style:family="presentation" style:parent-style-name="Master1-Layout9-picTx-캡션-있는-그림-outline8">
      <style:paragraph-properties fo:margin-top="0.1cm" fo:margin-bottom="0cm"/>
      <style:text-properties fo:font-size="20pt" style:font-size-asian="20pt" style:font-size-complex="20pt"/>
    </style:style>
    <style:style style:name="Master1-Layout9-picTx-캡션-있는-그림-subtitle" style:family="presentation">
      <style:graphic-properties draw:stroke="none" draw:fill="none" draw:textarea-vertical-align="middle">
        <text:list-style style:name="Master1-Layout9-picTx-캡션-있는-그림-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캡션-있는-그림-title" style:family="presentation">
      <style:graphic-properties draw:stroke="none" draw:fill="none" draw:textarea-vertical-align="middle">
        <text:list-style style:name="Master1-Layout9-picTx-캡션-있는-그림-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제목-및-세로-텍스트-background" style:family="presentation">
      <style:graphic-properties draw:stroke="none" draw:fill="solid" draw:fill-color="#ffffff" draw:opacity="100%"/>
      <style:text-properties style:letter-kerning="true"/>
    </style:style>
    <style:style style:name="Master1-Layout10-vertTx-제목-및-세로-텍스트-backgroundobjects" style:family="presentation">
      <style:graphic-properties draw:textarea-horizontal-align="justify" draw:shadow="hidden" draw:shadow-offset-x="0.2cm" draw:shadow-offset-y="0.2cm" draw:shadow-color="#808080"/>
      <style:text-properties style:letter-kerning="true"/>
    </style:style>
    <style:style style:name="Master1-Layout10-vertTx-제목-및-세로-텍스트-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제목-및-세로-텍스트-outline1" style:family="presentation">
      <style:graphic-properties draw:stroke="none" draw:fill="none" draw:auto-grow-height="false" draw:fit-to-size="false" style:shrink-to-fit="true">
        <text:list-style style:name="Master1-Layout10-vertTx-제목-및-세로-텍스트-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제목-및-세로-텍스트-outline2" style:family="presentation" style:parent-style-name="Master1-Layout10-vertTx-제목-및-세로-텍스트-outline1">
      <style:paragraph-properties fo:margin-top="0.4cm" fo:margin-bottom="0cm"/>
      <style:text-properties fo:font-size="28pt" style:font-size-asian="28pt" style:font-size-complex="28pt"/>
    </style:style>
    <style:style style:name="Master1-Layout10-vertTx-제목-및-세로-텍스트-outline3" style:family="presentation" style:parent-style-name="Master1-Layout10-vertTx-제목-및-세로-텍스트-outline2">
      <style:paragraph-properties fo:margin-top="0.3cm" fo:margin-bottom="0cm"/>
      <style:text-properties fo:font-size="24pt" style:font-size-asian="24pt" style:font-size-complex="24pt"/>
    </style:style>
    <style:style style:name="Master1-Layout10-vertTx-제목-및-세로-텍스트-outline4" style:family="presentation" style:parent-style-name="Master1-Layout10-vertTx-제목-및-세로-텍스트-outline3">
      <style:paragraph-properties fo:margin-top="0.2cm" fo:margin-bottom="0cm"/>
      <style:text-properties fo:font-size="20pt" style:font-size-asian="20pt" style:font-size-complex="20pt"/>
    </style:style>
    <style:style style:name="Master1-Layout10-vertTx-제목-및-세로-텍스트-outline5" style:family="presentation" style:parent-style-name="Master1-Layout10-vertTx-제목-및-세로-텍스트-outline4">
      <style:paragraph-properties fo:margin-top="0.1cm" fo:margin-bottom="0cm"/>
      <style:text-properties fo:font-size="20pt" style:font-size-asian="20pt" style:font-size-complex="20pt"/>
    </style:style>
    <style:style style:name="Master1-Layout10-vertTx-제목-및-세로-텍스트-outline6" style:family="presentation" style:parent-style-name="Master1-Layout10-vertTx-제목-및-세로-텍스트-outline5">
      <style:paragraph-properties fo:margin-top="0.1cm" fo:margin-bottom="0cm"/>
      <style:text-properties fo:font-size="20pt" style:font-size-asian="20pt" style:font-size-complex="20pt"/>
    </style:style>
    <style:style style:name="Master1-Layout10-vertTx-제목-및-세로-텍스트-outline7" style:family="presentation" style:parent-style-name="Master1-Layout10-vertTx-제목-및-세로-텍스트-outline6">
      <style:paragraph-properties fo:margin-top="0.1cm" fo:margin-bottom="0cm"/>
      <style:text-properties fo:font-size="20pt" style:font-size-asian="20pt" style:font-size-complex="20pt"/>
    </style:style>
    <style:style style:name="Master1-Layout10-vertTx-제목-및-세로-텍스트-outline8" style:family="presentation" style:parent-style-name="Master1-Layout10-vertTx-제목-및-세로-텍스트-outline7">
      <style:paragraph-properties fo:margin-top="0.1cm" fo:margin-bottom="0cm"/>
      <style:text-properties fo:font-size="20pt" style:font-size-asian="20pt" style:font-size-complex="20pt"/>
    </style:style>
    <style:style style:name="Master1-Layout10-vertTx-제목-및-세로-텍스트-outline9" style:family="presentation" style:parent-style-name="Master1-Layout10-vertTx-제목-및-세로-텍스트-outline8">
      <style:paragraph-properties fo:margin-top="0.1cm" fo:margin-bottom="0cm"/>
      <style:text-properties fo:font-size="20pt" style:font-size-asian="20pt" style:font-size-complex="20pt"/>
    </style:style>
    <style:style style:name="Master1-Layout10-vertTx-제목-및-세로-텍스트-subtitle" style:family="presentation">
      <style:graphic-properties draw:stroke="none" draw:fill="none" draw:textarea-vertical-align="middle">
        <text:list-style style:name="Master1-Layout10-vertTx-제목-및-세로-텍스트-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제목-및-세로-텍스트-title" style:family="presentation">
      <style:graphic-properties draw:stroke="none" draw:fill="none" draw:textarea-vertical-align="middle">
        <text:list-style style:name="Master1-Layout10-vertTx-제목-및-세로-텍스트-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세로-제목-및-텍스트-background" style:family="presentation">
      <style:graphic-properties draw:stroke="none" draw:fill="solid" draw:fill-color="#ffffff" draw:opacity="100%"/>
      <style:text-properties style:letter-kerning="true"/>
    </style:style>
    <style:style style:name="Master1-Layout11-vertTitleAndTx-세로-제목-및-텍스트-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세로-제목-및-텍스트-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세로-제목-및-텍스트-outline1" style:family="presentation">
      <style:graphic-properties draw:stroke="none" draw:fill="none" draw:auto-grow-height="false" draw:fit-to-size="false" style:shrink-to-fit="true">
        <text:list-style style:name="Master1-Layout11-vertTitleAndTx-세로-제목-및-텍스트-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세로-제목-및-텍스트-outline2" style:family="presentation" style:parent-style-name="Master1-Layout11-vertTitleAndTx-세로-제목-및-텍스트-outline1">
      <style:paragraph-properties fo:margin-top="0.4cm" fo:margin-bottom="0cm"/>
      <style:text-properties fo:font-size="28pt" style:font-size-asian="28pt" style:font-size-complex="28pt"/>
    </style:style>
    <style:style style:name="Master1-Layout11-vertTitleAndTx-세로-제목-및-텍스트-outline3" style:family="presentation" style:parent-style-name="Master1-Layout11-vertTitleAndTx-세로-제목-및-텍스트-outline2">
      <style:paragraph-properties fo:margin-top="0.3cm" fo:margin-bottom="0cm"/>
      <style:text-properties fo:font-size="24pt" style:font-size-asian="24pt" style:font-size-complex="24pt"/>
    </style:style>
    <style:style style:name="Master1-Layout11-vertTitleAndTx-세로-제목-및-텍스트-outline4" style:family="presentation" style:parent-style-name="Master1-Layout11-vertTitleAndTx-세로-제목-및-텍스트-outline3">
      <style:paragraph-properties fo:margin-top="0.2cm" fo:margin-bottom="0cm"/>
      <style:text-properties fo:font-size="20pt" style:font-size-asian="20pt" style:font-size-complex="20pt"/>
    </style:style>
    <style:style style:name="Master1-Layout11-vertTitleAndTx-세로-제목-및-텍스트-outline5" style:family="presentation" style:parent-style-name="Master1-Layout11-vertTitleAndTx-세로-제목-및-텍스트-outline4">
      <style:paragraph-properties fo:margin-top="0.1cm" fo:margin-bottom="0cm"/>
      <style:text-properties fo:font-size="20pt" style:font-size-asian="20pt" style:font-size-complex="20pt"/>
    </style:style>
    <style:style style:name="Master1-Layout11-vertTitleAndTx-세로-제목-및-텍스트-outline6" style:family="presentation" style:parent-style-name="Master1-Layout11-vertTitleAndTx-세로-제목-및-텍스트-outline5">
      <style:paragraph-properties fo:margin-top="0.1cm" fo:margin-bottom="0cm"/>
      <style:text-properties fo:font-size="20pt" style:font-size-asian="20pt" style:font-size-complex="20pt"/>
    </style:style>
    <style:style style:name="Master1-Layout11-vertTitleAndTx-세로-제목-및-텍스트-outline7" style:family="presentation" style:parent-style-name="Master1-Layout11-vertTitleAndTx-세로-제목-및-텍스트-outline6">
      <style:paragraph-properties fo:margin-top="0.1cm" fo:margin-bottom="0cm"/>
      <style:text-properties fo:font-size="20pt" style:font-size-asian="20pt" style:font-size-complex="20pt"/>
    </style:style>
    <style:style style:name="Master1-Layout11-vertTitleAndTx-세로-제목-및-텍스트-outline8" style:family="presentation" style:parent-style-name="Master1-Layout11-vertTitleAndTx-세로-제목-및-텍스트-outline7">
      <style:paragraph-properties fo:margin-top="0.1cm" fo:margin-bottom="0cm"/>
      <style:text-properties fo:font-size="20pt" style:font-size-asian="20pt" style:font-size-complex="20pt"/>
    </style:style>
    <style:style style:name="Master1-Layout11-vertTitleAndTx-세로-제목-및-텍스트-outline9" style:family="presentation" style:parent-style-name="Master1-Layout11-vertTitleAndTx-세로-제목-및-텍스트-outline8">
      <style:paragraph-properties fo:margin-top="0.1cm" fo:margin-bottom="0cm"/>
      <style:text-properties fo:font-size="20pt" style:font-size-asian="20pt" style:font-size-complex="20pt"/>
    </style:style>
    <style:style style:name="Master1-Layout11-vertTitleAndTx-세로-제목-및-텍스트-subtitle" style:family="presentation">
      <style:graphic-properties draw:stroke="none" draw:fill="none" draw:textarea-vertical-align="middle">
        <text:list-style style:name="Master1-Layout11-vertTitleAndTx-세로-제목-및-텍스트-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세로-제목-및-텍스트-title" style:family="presentation">
      <style:graphic-properties draw:stroke="none" draw:fill="none" draw:textarea-vertical-align="middle">
        <text:list-style style:name="Master1-Layout11-vertTitleAndTx-세로-제목-및-텍스트-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제목을-입력하세요-_28_2_29_-background" style:display-name="Master2-제목을-입력하세요-(2)-background" style:family="presentation">
      <style:graphic-properties draw:stroke="none" draw:fill="solid" draw:fill-color="#ffffff" draw:opacity="100%"/>
      <style:text-properties style:letter-kerning="true"/>
    </style:style>
    <style:style style:name="Master2-제목을-입력하세요-_28_2_29_-backgroundobjects" style:display-name="Master2-제목을-입력하세요-(2)-backgroundobjects" style:family="presentation">
      <style:graphic-properties draw:textarea-horizontal-align="justify" draw:shadow="hidden" draw:shadow-offset-x="0.2cm" draw:shadow-offset-y="0.2cm" draw:shadow-color="#808080"/>
      <style:text-properties style:letter-kerning="true"/>
    </style:style>
    <style:style style:name="Master2-제목을-입력하세요-_28_2_29_-notes" style:display-name="Master2-제목을-입력하세요-(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제목을-입력하세요-_28_2_29_-outline1" style:display-name="Master2-제목을-입력하세요-(2)-outline1" style:family="presentation">
      <style:graphic-properties draw:stroke="none" draw:fill="none" draw:auto-grow-height="false" draw:fit-to-size="false" style:shrink-to-fit="true">
        <text:list-style style:name="Master2-제목을-입력하세요-_28_2_29_-outline1" style:display-name="Master2-제목을-입력하세요-(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제목을-입력하세요-_28_2_29_-outline2" style:display-name="Master2-제목을-입력하세요-(2)-outline2" style:family="presentation" style:parent-style-name="Master2-제목을-입력하세요-_28_2_29_-outline1">
      <style:paragraph-properties fo:margin-top="0.4cm" fo:margin-bottom="0cm"/>
      <style:text-properties fo:font-size="28pt" style:font-size-asian="28pt" style:font-size-complex="28pt"/>
    </style:style>
    <style:style style:name="Master2-제목을-입력하세요-_28_2_29_-outline3" style:display-name="Master2-제목을-입력하세요-(2)-outline3" style:family="presentation" style:parent-style-name="Master2-제목을-입력하세요-_28_2_29_-outline2">
      <style:paragraph-properties fo:margin-top="0.3cm" fo:margin-bottom="0cm"/>
      <style:text-properties fo:font-size="24pt" style:font-size-asian="24pt" style:font-size-complex="24pt"/>
    </style:style>
    <style:style style:name="Master2-제목을-입력하세요-_28_2_29_-outline4" style:display-name="Master2-제목을-입력하세요-(2)-outline4" style:family="presentation" style:parent-style-name="Master2-제목을-입력하세요-_28_2_29_-outline3">
      <style:paragraph-properties fo:margin-top="0.2cm" fo:margin-bottom="0cm"/>
      <style:text-properties fo:font-size="20pt" style:font-size-asian="20pt" style:font-size-complex="20pt"/>
    </style:style>
    <style:style style:name="Master2-제목을-입력하세요-_28_2_29_-outline5" style:display-name="Master2-제목을-입력하세요-(2)-outline5" style:family="presentation" style:parent-style-name="Master2-제목을-입력하세요-_28_2_29_-outline4">
      <style:paragraph-properties fo:margin-top="0.1cm" fo:margin-bottom="0cm"/>
      <style:text-properties fo:font-size="20pt" style:font-size-asian="20pt" style:font-size-complex="20pt"/>
    </style:style>
    <style:style style:name="Master2-제목을-입력하세요-_28_2_29_-outline6" style:display-name="Master2-제목을-입력하세요-(2)-outline6" style:family="presentation" style:parent-style-name="Master2-제목을-입력하세요-_28_2_29_-outline5">
      <style:paragraph-properties fo:margin-top="0.1cm" fo:margin-bottom="0cm"/>
      <style:text-properties fo:font-size="20pt" style:font-size-asian="20pt" style:font-size-complex="20pt"/>
    </style:style>
    <style:style style:name="Master2-제목을-입력하세요-_28_2_29_-outline7" style:display-name="Master2-제목을-입력하세요-(2)-outline7" style:family="presentation" style:parent-style-name="Master2-제목을-입력하세요-_28_2_29_-outline6">
      <style:paragraph-properties fo:margin-top="0.1cm" fo:margin-bottom="0cm"/>
      <style:text-properties fo:font-size="20pt" style:font-size-asian="20pt" style:font-size-complex="20pt"/>
    </style:style>
    <style:style style:name="Master2-제목을-입력하세요-_28_2_29_-outline8" style:display-name="Master2-제목을-입력하세요-(2)-outline8" style:family="presentation" style:parent-style-name="Master2-제목을-입력하세요-_28_2_29_-outline7">
      <style:paragraph-properties fo:margin-top="0.1cm" fo:margin-bottom="0cm"/>
      <style:text-properties fo:font-size="20pt" style:font-size-asian="20pt" style:font-size-complex="20pt"/>
    </style:style>
    <style:style style:name="Master2-제목을-입력하세요-_28_2_29_-outline9" style:display-name="Master2-제목을-입력하세요-(2)-outline9" style:family="presentation" style:parent-style-name="Master2-제목을-입력하세요-_28_2_29_-outline8">
      <style:paragraph-properties fo:margin-top="0.1cm" fo:margin-bottom="0cm"/>
      <style:text-properties fo:font-size="20pt" style:font-size-asian="20pt" style:font-size-complex="20pt"/>
    </style:style>
    <style:style style:name="Master2-제목을-입력하세요-_28_2_29_-subtitle" style:display-name="Master2-제목을-입력하세요-(2)-subtitle" style:family="presentation">
      <style:graphic-properties draw:stroke="none" draw:fill="none" draw:textarea-vertical-align="middle">
        <text:list-style style:name="Master2-제목을-입력하세요-_28_2_29_-subtitle" style:display-name="Master2-제목을-입력하세요-(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제목을-입력하세요-_28_2_29_-title" style:display-name="Master2-제목을-입력하세요-(2)-title" style:family="presentation">
      <style:graphic-properties draw:stroke="none" draw:fill="none" draw:textarea-vertical-align="middle">
        <text:list-style style:name="Master2-제목을-입력하세요-_28_2_29_-title" style:display-name="Master2-제목을-입력하세요-(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cust-DEFAULT-background" style:family="presentation">
      <style:graphic-properties draw:stroke="none" draw:fill="solid" draw:fill-color="#ffffff" draw:opacity="100%"/>
      <style:text-properties style:letter-kerning="true"/>
    </style:style>
    <style:style style:name="Master2-Layout1-cust-DEFAULT-backgroundobjects" style:family="presentation">
      <style:graphic-properties draw:textarea-horizontal-align="justify" draw:shadow="hidden" draw:shadow-offset-x="0.2cm" draw:shadow-offset-y="0.2cm" draw:shadow-color="#808080"/>
      <style:text-properties style:letter-kerning="true"/>
    </style:style>
    <style:style style:name="Master2-Layout1-cust-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cust-DEFAULT-outline1" style:family="presentation">
      <style:graphic-properties draw:stroke="none" draw:fill="none" draw:auto-grow-height="false" draw:fit-to-size="false" style:shrink-to-fit="true">
        <text:list-style style:name="Master2-Layout1-cust-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cust-DEFAULT-outline2" style:family="presentation" style:parent-style-name="Master2-Layout1-cust-DEFAULT-outline1">
      <style:paragraph-properties fo:margin-top="0.4cm" fo:margin-bottom="0cm"/>
      <style:text-properties fo:font-size="28pt" style:font-size-asian="28pt" style:font-size-complex="28pt"/>
    </style:style>
    <style:style style:name="Master2-Layout1-cust-DEFAULT-outline3" style:family="presentation" style:parent-style-name="Master2-Layout1-cust-DEFAULT-outline2">
      <style:paragraph-properties fo:margin-top="0.3cm" fo:margin-bottom="0cm"/>
      <style:text-properties fo:font-size="24pt" style:font-size-asian="24pt" style:font-size-complex="24pt"/>
    </style:style>
    <style:style style:name="Master2-Layout1-cust-DEFAULT-outline4" style:family="presentation" style:parent-style-name="Master2-Layout1-cust-DEFAULT-outline3">
      <style:paragraph-properties fo:margin-top="0.2cm" fo:margin-bottom="0cm"/>
      <style:text-properties fo:font-size="20pt" style:font-size-asian="20pt" style:font-size-complex="20pt"/>
    </style:style>
    <style:style style:name="Master2-Layout1-cust-DEFAULT-outline5" style:family="presentation" style:parent-style-name="Master2-Layout1-cust-DEFAULT-outline4">
      <style:paragraph-properties fo:margin-top="0.1cm" fo:margin-bottom="0cm"/>
      <style:text-properties fo:font-size="20pt" style:font-size-asian="20pt" style:font-size-complex="20pt"/>
    </style:style>
    <style:style style:name="Master2-Layout1-cust-DEFAULT-outline6" style:family="presentation" style:parent-style-name="Master2-Layout1-cust-DEFAULT-outline5">
      <style:paragraph-properties fo:margin-top="0.1cm" fo:margin-bottom="0cm"/>
      <style:text-properties fo:font-size="20pt" style:font-size-asian="20pt" style:font-size-complex="20pt"/>
    </style:style>
    <style:style style:name="Master2-Layout1-cust-DEFAULT-outline7" style:family="presentation" style:parent-style-name="Master2-Layout1-cust-DEFAULT-outline6">
      <style:paragraph-properties fo:margin-top="0.1cm" fo:margin-bottom="0cm"/>
      <style:text-properties fo:font-size="20pt" style:font-size-asian="20pt" style:font-size-complex="20pt"/>
    </style:style>
    <style:style style:name="Master2-Layout1-cust-DEFAULT-outline8" style:family="presentation" style:parent-style-name="Master2-Layout1-cust-DEFAULT-outline7">
      <style:paragraph-properties fo:margin-top="0.1cm" fo:margin-bottom="0cm"/>
      <style:text-properties fo:font-size="20pt" style:font-size-asian="20pt" style:font-size-complex="20pt"/>
    </style:style>
    <style:style style:name="Master2-Layout1-cust-DEFAULT-outline9" style:family="presentation" style:parent-style-name="Master2-Layout1-cust-DEFAULT-outline8">
      <style:paragraph-properties fo:margin-top="0.1cm" fo:margin-bottom="0cm"/>
      <style:text-properties fo:font-size="20pt" style:font-size-asian="20pt" style:font-size-complex="20pt"/>
    </style:style>
    <style:style style:name="Master2-Layout1-cust-DEFAULT-subtitle" style:family="presentation">
      <style:graphic-properties draw:stroke="none" draw:fill="none" draw:textarea-vertical-align="middle">
        <text:list-style style:name="Master2-Layout1-cust-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cust-DEFAULT-title" style:family="presentation">
      <style:graphic-properties draw:stroke="none" draw:fill="none" draw:textarea-vertical-align="middle">
        <text:list-style style:name="Master2-Layout1-cust-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blank-빈-화면-background" style:family="presentation">
      <style:graphic-properties draw:stroke="none" draw:fill="solid" draw:fill-color="#ffffff" draw:opacity="100%"/>
      <style:text-properties style:letter-kerning="true"/>
    </style:style>
    <style:style style:name="Master2-Layout2-blank-빈-화면-backgroundobjects" style:family="presentation">
      <style:graphic-properties draw:textarea-horizontal-align="justify" draw:shadow="hidden" draw:shadow-offset-x="0.2cm" draw:shadow-offset-y="0.2cm" draw:shadow-color="#808080"/>
      <style:text-properties style:letter-kerning="true"/>
    </style:style>
    <style:style style:name="Master2-Layout2-blank-빈-화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20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blank-빈-화면-outline1" style:family="presentation">
      <style:graphic-properties draw:stroke="none" draw:fill="none" draw:auto-grow-height="false" draw:fit-to-size="false" style:shrink-to-fit="true">
        <text:list-style style:name="Master2-Layout2-blank-빈-화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blank-빈-화면-outline2" style:family="presentation" style:parent-style-name="Master2-Layout2-blank-빈-화면-outline1">
      <style:paragraph-properties fo:margin-top="0.4cm" fo:margin-bottom="0cm"/>
      <style:text-properties fo:font-size="28pt" style:font-size-asian="28pt" style:font-size-complex="28pt"/>
    </style:style>
    <style:style style:name="Master2-Layout2-blank-빈-화면-outline3" style:family="presentation" style:parent-style-name="Master2-Layout2-blank-빈-화면-outline2">
      <style:paragraph-properties fo:margin-top="0.3cm" fo:margin-bottom="0cm"/>
      <style:text-properties fo:font-size="24pt" style:font-size-asian="24pt" style:font-size-complex="24pt"/>
    </style:style>
    <style:style style:name="Master2-Layout2-blank-빈-화면-outline4" style:family="presentation" style:parent-style-name="Master2-Layout2-blank-빈-화면-outline3">
      <style:paragraph-properties fo:margin-top="0.2cm" fo:margin-bottom="0cm"/>
      <style:text-properties fo:font-size="20pt" style:font-size-asian="20pt" style:font-size-complex="20pt"/>
    </style:style>
    <style:style style:name="Master2-Layout2-blank-빈-화면-outline5" style:family="presentation" style:parent-style-name="Master2-Layout2-blank-빈-화면-outline4">
      <style:paragraph-properties fo:margin-top="0.1cm" fo:margin-bottom="0cm"/>
      <style:text-properties fo:font-size="20pt" style:font-size-asian="20pt" style:font-size-complex="20pt"/>
    </style:style>
    <style:style style:name="Master2-Layout2-blank-빈-화면-outline6" style:family="presentation" style:parent-style-name="Master2-Layout2-blank-빈-화면-outline5">
      <style:paragraph-properties fo:margin-top="0.1cm" fo:margin-bottom="0cm"/>
      <style:text-properties fo:font-size="20pt" style:font-size-asian="20pt" style:font-size-complex="20pt"/>
    </style:style>
    <style:style style:name="Master2-Layout2-blank-빈-화면-outline7" style:family="presentation" style:parent-style-name="Master2-Layout2-blank-빈-화면-outline6">
      <style:paragraph-properties fo:margin-top="0.1cm" fo:margin-bottom="0cm"/>
      <style:text-properties fo:font-size="20pt" style:font-size-asian="20pt" style:font-size-complex="20pt"/>
    </style:style>
    <style:style style:name="Master2-Layout2-blank-빈-화면-outline8" style:family="presentation" style:parent-style-name="Master2-Layout2-blank-빈-화면-outline7">
      <style:paragraph-properties fo:margin-top="0.1cm" fo:margin-bottom="0cm"/>
      <style:text-properties fo:font-size="20pt" style:font-size-asian="20pt" style:font-size-complex="20pt"/>
    </style:style>
    <style:style style:name="Master2-Layout2-blank-빈-화면-outline9" style:family="presentation" style:parent-style-name="Master2-Layout2-blank-빈-화면-outline8">
      <style:paragraph-properties fo:margin-top="0.1cm" fo:margin-bottom="0cm"/>
      <style:text-properties fo:font-size="20pt" style:font-size-asian="20pt" style:font-size-complex="20pt"/>
    </style:style>
    <style:style style:name="Master2-Layout2-blank-빈-화면-subtitle" style:family="presentation">
      <style:graphic-properties draw:stroke="none" draw:fill="none" draw:textarea-vertical-align="middle">
        <text:list-style style:name="Master2-Layout2-blank-빈-화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32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blank-빈-화면-title" style:family="presentation">
      <style:graphic-properties draw:stroke="none" draw:fill="none" draw:textarea-vertical-align="middle">
        <text:list-style style:name="Master2-Layout2-blank-빈-화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KR" fo:font-family="'Noto Sans KR'" style:font-family-generic="roman" style:font-pitch="variable" fo:font-size="44pt" fo:font-style="normal" fo:text-shadow="none" style:text-underline-style="none" fo:font-weight="normal" style:letter-kerning="true" fo:background-color="transparent" style:font-name-asian="Noto Sans KR3" style:font-family-asian="'Noto Sans KR'"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pr1" style:family="presentation" style:parent-style-name="Master1-HDOfficeLightV0-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HDOfficeLightV0-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HDOfficeLightV0-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HDOfficeLightV0-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HDOfficeLightV0-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HDOfficeLightV0-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HDOfficeLightV0-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제목-슬라이드-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제목-슬라이드-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0" style:family="presentation" style:parent-style-name="Master1-Layout1-title-제목-슬라이드-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제목-슬라이드-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2" style:family="presentation" style:parent-style-name="Master1-Layout1-title-제목-슬라이드-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1-title-제목-슬라이드-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1-title-제목-슬라이드-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1-Layout2-obj-제목-및-내용-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6" style:family="presentation" style:parent-style-name="Master1-Layout2-obj-제목-및-내용-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7" style:family="presentation" style:parent-style-name="Master1-Layout2-obj-제목-및-내용-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8" style:family="presentation" style:parent-style-name="Master1-Layout2-obj-제목-및-내용-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9" style:family="presentation" style:parent-style-name="Master1-Layout2-obj-제목-및-내용-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2-obj-제목-및-내용-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1" style:family="presentation" style:parent-style-name="Master1-Layout2-obj-제목-및-내용-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2" style:family="presentation" style:parent-style-name="Master1-Layout3-secHead-구역-머리글-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3" style:family="presentation" style:parent-style-name="Master1-Layout3-secHead-구역-머리글-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 style:family="presentation" style:parent-style-name="Master1-Layout3-secHead-구역-머리글-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3-secHead-구역-머리글-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3-secHead-구역-머리글-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7" style:family="presentation" style:parent-style-name="Master1-Layout3-secHead-구역-머리글-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8" style:family="presentation" style:parent-style-name="Master1-Layout3-secHead-구역-머리글-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4-twoObj-콘텐츠-2개-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 style:family="presentation" style:parent-style-name="Master1-Layout4-twoObj-콘텐츠-2개-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1" style:family="presentation" style:parent-style-name="Master1-Layout4-twoObj-콘텐츠-2개-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2" style:family="presentation" style:parent-style-name="Master1-Layout4-twoObj-콘텐츠-2개-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3" style:family="presentation" style:parent-style-name="Master1-Layout4-twoObj-콘텐츠-2개-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4" style:family="presentation" style:parent-style-name="Master1-Layout4-twoObj-콘텐츠-2개-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4-twoObj-콘텐츠-2개-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5-cust-비교-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7" style:family="presentation" style:parent-style-name="Master1-Layout5-cust-비교-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8" style:family="presentation" style:parent-style-name="Master1-Layout5-cust-비교-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9" style:family="presentation" style:parent-style-name="Master1-Layout5-cust-비교-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5-cust-비교-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1" style:family="presentation" style:parent-style-name="Master1-Layout5-cust-비교-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2" style:family="presentation" style:parent-style-name="Master1-Layout5-cust-비교-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5-cust-비교-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1-Layout6-cust-제목만-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6-cust-제목만-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6" style:family="presentation" style:parent-style-name="Master1-Layout6-cust-제목만-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7" style:family="presentation" style:parent-style-name="Master1-Layout6-cust-제목만-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8" style:family="presentation" style:parent-style-name="Master1-Layout6-cust-제목만-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9" style:family="presentation" style:parent-style-name="Master1-Layout6-cust-제목만-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0" style:family="presentation" style:parent-style-name="Master1-Layout7-blank-빈-화면-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7-blank-빈-화면-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7-blank-빈-화면-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1-Layout7-blank-빈-화면-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1-Layout7-blank-빈-화면-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5" style:family="presentation" style:parent-style-name="Master1-Layout8-objTx-캡션-있는-콘텐츠-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8-objTx-캡션-있는-콘텐츠-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8-objTx-캡션-있는-콘텐츠-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8" style:family="presentation" style:parent-style-name="Master1-Layout8-objTx-캡션-있는-콘텐츠-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8-objTx-캡션-있는-콘텐츠-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0" style:family="presentation" style:parent-style-name="Master1-Layout8-objTx-캡션-있는-콘텐츠-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1-Layout8-objTx-캡션-있는-콘텐츠-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2" style:family="presentation" style:parent-style-name="Master1-Layout8-objTx-캡션-있는-콘텐츠-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3" style:family="presentation" style:parent-style-name="Master1-Layout9-picTx-캡션-있는-그림-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4" style:family="presentation" style:parent-style-name="Master1-Layout9-picTx-캡션-있는-그림-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5" style:family="presentation" style:parent-style-name="Master1-Layout9-picTx-캡션-있는-그림-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6" style:family="presentation" style:parent-style-name="Master1-Layout9-picTx-캡션-있는-그림-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1-Layout9-picTx-캡션-있는-그림-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1-Layout9-picTx-캡션-있는-그림-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9" style:family="presentation" style:parent-style-name="Master1-Layout9-picTx-캡션-있는-그림-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1-Layout9-picTx-캡션-있는-그림-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1" style:family="presentation" style:parent-style-name="Master1-Layout10-vertTx-제목-및-세로-텍스트-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72" style:family="presentation" style:parent-style-name="Master1-Layout10-vertTx-제목-및-세로-텍스트-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73" style:family="presentation" style:parent-style-name="Master1-Layout10-vertTx-제목-및-세로-텍스트-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1-Layout10-vertTx-제목-및-세로-텍스트-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1-Layout10-vertTx-제목-및-세로-텍스트-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6" style:family="presentation" style:parent-style-name="Master1-Layout10-vertTx-제목-및-세로-텍스트-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7" style:family="presentation" style:parent-style-name="Master1-Layout10-vertTx-제목-및-세로-텍스트-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8" style:family="presentation" style:parent-style-name="Master1-Layout11-vertTitleAndTx-세로-제목-및-텍스트-title">
      <style:graphic-properties draw:stroke="none" draw:fill="none" draw:textarea-horizontal-align="right" draw:textarea-vertical-align="middle" draw:auto-grow-height="false" draw:auto-grow-width="false" draw:fit-to-size="false" style:shrink-to-fit="true" fo:min-width="25.201cm" fo:padding-top="0.127cm" fo:padding-bottom="0.127cm" fo:padding-left="0.254cm" fo:padding-right="0.254cm" fo:wrap-option="wrap" loext:decorative="false"/>
      <style:paragraph-properties style:writing-mode="tb-rl"/>
    </style:style>
    <style:style style:name="Mpr79" style:family="presentation" style:parent-style-name="Master1-Layout11-vertTitleAndTx-세로-제목-및-텍스트-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80" style:family="presentation" style:parent-style-name="Master1-Layout11-vertTitleAndTx-세로-제목-및-텍스트-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1-Layout11-vertTitleAndTx-세로-제목-및-텍스트-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2" style:family="presentation" style:parent-style-name="Master1-Layout11-vertTitleAndTx-세로-제목-및-텍스트-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3" style:family="presentation" style:parent-style-name="Master1-Layout11-vertTitleAndTx-세로-제목-및-텍스트-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4" style:family="presentation" style:parent-style-name="Master1-Layout11-vertTitleAndTx-세로-제목-및-텍스트-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5" style:family="presentation" style:parent-style-name="Master2-제목을-입력하세요-_28_2_29_-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6" style:family="presentation" style:parent-style-name="Master2-제목을-입력하세요-_28_2_29_-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7" style:family="presentation" style:parent-style-name="Master2-제목을-입력하세요-_28_2_29_-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8" style:family="presentation" style:parent-style-name="Master2-Layout1-cust-DEFAUL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9" style:family="presentation" style:parent-style-name="Master2-Layout1-cust-DEFAUL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90" style:family="presentation" style:parent-style-name="Master2-Layout1-cust-DEFAUL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1" style:family="presentation" style:parent-style-name="Master2-Layout2-blank-빈-화면-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2" style:family="presentation" style:parent-style-name="Master2-Layout2-blank-빈-화면-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93" style:family="presentation" style:parent-style-name="Master2-Layout2-blank-빈-화면-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94" style:family="presentation" style:parent-style-name="Master2-Layout2-blank-빈-화면-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4" style:family="paragraph">
      <loext:graphic-properties draw:fill="none"/>
      <style:paragraph-properties style:font-independent-line-spacing="true"/>
    </style:style>
    <style:style style:name="MP5" style:family="paragraph">
      <style:paragraph-properties fo:margin-left="0.525cm" fo:margin-right="0cm" fo:margin-top="0.291cm" fo:margin-bottom="0cm" fo:line-height="90%" fo:text-align="start" fo:text-indent="-0.525cm" style:punctuation-wrap="hanging" loext:tab-stop-distance="0cm" style:writing-mode="lr-tb">
        <style:tab-stops/>
      </style:paragraph-properties>
    </style:style>
    <style:style style:name="MP6" style:family="paragraph">
      <style:paragraph-properties fo:margin-left="1.575cm" fo:margin-right="0cm" fo:margin-top="0.146cm" fo:margin-bottom="0cm" fo:line-height="90%" fo:text-align="start" fo:text-indent="-0.525cm" style:punctuation-wrap="hanging" loext:tab-stop-distance="0cm" style:writing-mode="lr-tb">
        <style:tab-stops/>
      </style:paragraph-properties>
    </style:style>
    <style:style style:name="MP7" style:family="paragraph">
      <style:paragraph-properties fo:margin-left="2.625cm" fo:margin-right="0cm" fo:margin-top="0.146cm" fo:margin-bottom="0cm" fo:line-height="90%" fo:text-align="start" fo:text-indent="-0.525cm" style:punctuation-wrap="hanging" loext:tab-stop-distance="0cm" style:writing-mode="lr-tb">
        <style:tab-stops/>
      </style:paragraph-properties>
    </style:style>
    <style:style style:name="MP8" style:family="paragraph">
      <style:paragraph-properties fo:margin-left="3.675cm" fo:margin-right="0cm" fo:margin-top="0.146cm" fo:margin-bottom="0cm" fo:line-height="90%" fo:text-align="start" fo:text-indent="-0.525cm" style:punctuation-wrap="hanging" loext:tab-stop-distance="0cm" style:writing-mode="lr-tb">
        <style:tab-stops/>
      </style:paragraph-properties>
    </style:style>
    <style:style style:name="MP9" style:family="paragraph">
      <style:paragraph-properties fo:margin-left="4.725cm" fo:margin-right="0cm" fo:margin-top="0.146cm" fo:margin-bottom="0cm" fo:line-height="90%" fo:text-align="start" fo:text-indent="-0.525cm" style:punctuation-wrap="hanging" loext:tab-stop-distance="0cm" style:writing-mode="lr-tb">
        <style:tab-stops/>
      </style:paragraph-properties>
    </style:style>
    <style:style style:name="MP1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1"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2" style:family="paragraph">
      <style:paragraph-properties fo:margin-left="0cm" fo:margin-right="0cm" fo:margin-top="0.291cm" fo:margin-bottom="0cm" fo:line-height="90%" fo:text-align="center" fo:text-indent="0cm" style:punctuation-wrap="hanging" loext:tab-stop-distance="0cm" style:writing-mode="lr-tb">
        <style:tab-stops/>
      </style:paragraph-properties>
    </style:style>
    <style:style style:name="MP13" style:family="paragraph">
      <style:paragraph-properties fo:margin-left="0cm" fo:margin-right="0cm" fo:margin-top="0.291cm" fo:margin-bottom="0cm" fo:line-height="90%" fo:text-align="start" fo:text-indent="0cm" style:punctuation-wrap="hanging" loext:tab-stop-distance="0cm" style:writing-mode="lr-tb">
        <style:tab-stops/>
      </style:paragraph-properties>
    </style:style>
    <style:style style:name="MP1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erif KR1" style:font-size-asian="14pt" style:font-style-asian="normal" style:font-weight-asian="normal" style:font-name-complex="Tahoma1"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1" fo:font-size="36.4000015258789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36.4000015258789pt" style:language-asian="ko" style:country-asian="KR" style:font-style-asian="normal" style:font-weight-asian="normal" style:font-size-complex="36.4000015258789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3.2000007629395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23.2000007629395pt" style:language-asian="ko" style:country-asian="KR" style:font-style-asian="normal" style:font-weight-asian="normal" style:font-size-complex="23.2000007629395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19.7999992370605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19.7999992370605pt" style:language-asian="ko" style:country-asian="KR" style:font-style-asian="normal" style:font-weight-asian="normal" style:font-size-complex="19.7999992370605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16.6000003814697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16.6000003814697pt" style:language-asian="ko" style:country-asian="KR" style:font-style-asian="normal" style:font-weight-asian="normal" style:font-size-complex="16.6000003814697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4.8999996185303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14.8999996185303pt" style:language-asian="ko" style:country-asian="KR" style:font-style-asian="normal" style:font-weight-asian="normal" style:font-size-complex="14.8999996185303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9.10000038146973pt" fo:letter-spacing="normal" fo:language="en" fo:country="US" fo:font-style="normal" style:text-underline-style="none" fo:font-weight="normal" style:text-underline-mode="continuous" style:text-overline-mode="continuous" style:text-line-through-mode="continuous" style:letter-kerning="true" style:font-size-asian="9.10000038146973pt" style:font-style-asian="normal" style:font-weight-asian="normal" style:font-size-complex="9.10000038146973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erif KR1" style:font-size-asian="14pt" style:font-style-asian="normal" style:font-weight-asian="normal" style:font-name-complex="Tahoma1"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1" fo:font-size="49.5999984741211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49.5999984741211pt" style:language-asian="ko" style:country-asian="KR" style:font-style-asian="normal" style:font-weight-asian="normal" style:font-size-complex="49.5999984741211pt" style:font-style-complex="normal" style:font-weight-complex="normal"/>
    </style:style>
    <style:style style:name="MT10" style:family="text">
      <style:text-properties fo:font-variant="normal" fo:text-transform="none" fo:color="#404040" loext:opacity="100%" style:text-line-through-style="none" style:text-line-through-type="none" style:text-position="0% 100%" style:font-name="Calibri1" fo:font-size="19.7999992370605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19.7999992370605pt" style:language-asian="ko" style:country-asian="KR" style:font-style-asian="normal" style:font-weight-asian="normal" style:font-size-complex="19.7999992370605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19.7999992370605pt" fo:letter-spacing="normal" fo:language="en" fo:country="US" fo:font-style="normal" style:text-underline-style="none" fo:font-weight="bold" style:text-underline-mode="continuous" style:text-overline-mode="continuous" style:text-line-through-mode="continuous" style:letter-kerning="true" style:font-name-asian="맑은 고딕2" style:font-size-asian="19.7999992370605pt" style:language-asian="ko" style:country-asian="KR" style:font-style-asian="normal" style:font-weight-asian="bold" style:font-size-complex="19.7999992370605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Light1" fo:font-size="26.3999996185303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26.3999996185303pt" style:language-asian="ko" style:country-asian="KR" style:font-style-asian="normal" style:font-weight-asian="normal" style:font-size-complex="26.3999996185303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26.3999996185303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26.3999996185303pt" style:language-asian="ko" style:country-asian="KR" style:font-style-asian="normal" style:font-weight-asian="normal" style:font-size-complex="26.3999996185303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13.1999998092651pt" fo:letter-spacing="normal" fo:language="en" fo:country="US" fo:font-style="normal" style:text-underline-style="none" fo:font-weight="normal" style:text-underline-mode="continuous" style:text-overline-mode="continuous" style:text-line-through-mode="continuous" style:letter-kerning="true" style:font-name-asian="맑은 고딕2" style:font-size-asian="13.1999998092651pt" style:language-asian="ko" style:country-asian="KR" style:font-style-asian="normal" style:font-weight-asian="normal" style:font-size-complex="13.1999998092651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525cm"/>
        <style:text-properties fo:font-family="'Wingdings 2'" style:font-family-generic="roman" style:font-pitch="variable" style:font-charset="x-symbol" style:use-window-font-color="true" fo:font-size="100%"/>
      </text:list-level-style-bullet>
      <text:list-level-style-bullet text:level="2" text:bullet-char="">
        <style:list-level-properties text:space-before="1.05cm" text:min-label-width="0.525cm"/>
        <style:text-properties fo:font-family="'Wingdings 2'" style:font-family-generic="roman" style:font-pitch="variable" style:font-charset="x-symbol" style:use-window-font-color="true" fo:font-size="100%"/>
      </text:list-level-style-bullet>
      <text:list-level-style-bullet text:level="3" text:bullet-char="">
        <style:list-level-properties text:space-before="2.1cm" text:min-label-width="0.525cm"/>
        <style:text-properties fo:font-family="'Wingdings 2'" style:font-family-generic="roman" style:font-pitch="variable" style:font-charset="x-symbol" style:use-window-font-color="true" fo:font-size="100%"/>
      </text:list-level-style-bullet>
      <text:list-level-style-bullet text:level="4" text:bullet-char="">
        <style:list-level-properties text:space-before="3.15cm" text:min-label-width="0.525cm"/>
        <style:text-properties fo:font-family="'Wingdings 2'" style:font-family-generic="roman" style:font-pitch="variable" style:font-charset="x-symbol" style:use-window-font-color="true" fo:font-size="100%"/>
      </text:list-level-style-bullet>
      <text:list-level-style-bullet text:level="5" text:bullet-char="">
        <style:list-level-properties text:space-before="4.2cm" text:min-label-width="0.525cm"/>
        <style:text-properties fo:font-family="'Wingdings 2'" style:font-family-generic="roman" style:font-pitch="variable" style:font-charset="x-symbol" style:use-window-font-color="true" fo:font-size="100%"/>
      </text:list-level-style-bullet>
      <text:list-level-style-bullet text:level="6" text:bullet-char="">
        <style:list-level-properties text:space-before="5.25cm" text:min-label-width="0.525cm"/>
        <style:text-properties fo:font-family="'Wingdings 2'" style:font-family-generic="roman" style:font-pitch="variable" style:font-charset="x-symbol" style:use-window-font-color="true" fo:font-size="100%"/>
      </text:list-level-style-bullet>
      <text:list-level-style-bullet text:level="7" text:bullet-char="">
        <style:list-level-properties text:space-before="6.3cm" text:min-label-width="0.525cm"/>
        <style:text-properties fo:font-family="'Wingdings 2'" style:font-family-generic="roman" style:font-pitch="variable" style:font-charset="x-symbol" style:use-window-font-color="true" fo:font-size="100%"/>
      </text:list-level-style-bullet>
      <text:list-level-style-bullet text:level="8" text:bullet-char="">
        <style:list-level-properties text:space-before="7.35cm" text:min-label-width="0.525cm"/>
        <style:text-properties fo:font-family="'Wingdings 2'" style:font-family-generic="roman" style:font-pitch="variable" style:font-charset="x-symbol" style:use-window-font-color="true" fo:font-size="100%"/>
      </text:list-level-style-bullet>
      <text:list-level-style-bullet text:level="9" text:bullet-char="">
        <style:list-level-properties text:space-before="8.4cm" text:min-label-width="0.525cm"/>
        <style:text-properties fo:font-family="'Wingdings 2'" style:font-family-generic="roman" style:font-pitch="variable" style:font-charset="x-symbo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05cm"/>
        <style:text-properties style:use-window-font-color="true" fo:font-size="45%"/>
      </text:list-level-style-number>
      <text:list-level-style-number text:level="3" style:num-format="">
        <style:list-level-properties text:space-before="2.1cm"/>
        <style:text-properties style:use-window-font-color="true" fo:font-size="45%"/>
      </text:list-level-style-number>
      <text:list-level-style-number text:level="4" style:num-format="">
        <style:list-level-properties text:space-before="3.15cm"/>
        <style:text-properties style:use-window-font-color="true" fo:font-size="45%"/>
      </text:list-level-style-number>
      <text:list-level-style-number text:level="5" style:num-format="">
        <style:list-level-properties text:space-before="4.2cm"/>
        <style:text-properties style:use-window-font-color="true" fo:font-size="45%"/>
      </text:list-level-style-number>
      <text:list-level-style-number text:level="6" style:num-format="">
        <style:list-level-properties text:space-before="5.25cm"/>
        <style:text-properties style:use-window-font-color="true" fo:font-size="45%"/>
      </text:list-level-style-number>
      <text:list-level-style-number text:level="7" style:num-format="">
        <style:list-level-properties text:space-before="6.3cm"/>
        <style:text-properties style:use-window-font-color="true" fo:font-size="45%"/>
      </text:list-level-style-number>
      <text:list-level-style-number text:level="8" style:num-format="">
        <style:list-level-properties text:space-before="7.35cm"/>
        <style:text-properties style:use-window-font-color="true" fo:font-size="45%"/>
      </text:list-level-style-number>
      <text:list-level-style-number text:level="9" style:num-format="">
        <style:list-level-properties text:space-before="8.4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
      <draw:frame draw:name="머리글 개체 틀 1" draw:style-name="Mgr1" draw:text-style-name="MP1" draw:layer="backgroundobjects" svg:width="9.113cm" svg:height="1.484cm" svg:x="0cm" svg:y="0cm" presentation:class="header">
        <draw:text-box>
          <text:p/>
        </draw:text-box>
      </draw:frame>
      <draw:frame draw:name="날짜 개체 틀 2" draw:style-name="Mgr1" draw:text-style-name="MP1" draw:layer="backgroundobjects" svg:width="9.113cm" svg:height="1.484cm" svg:x="11.886cm" svg:y="0cm" presentation:class="date-time">
        <draw:text-box>
          <text:p/>
        </draw:text-box>
      </draw:frame>
      <draw:frame draw:name="바닥글 개체 틀 3" draw:style-name="Mgr2" draw:text-style-name="MP1" draw:layer="backgroundobjects" svg:width="9.113cm" svg:height="1.484cm" svg:x="0cm" svg:y="28.215cm" presentation:class="footer">
        <draw:text-box>
          <text:p/>
        </draw:text-box>
      </draw:frame>
      <draw:frame draw:name="슬라이드 번호 개체 틀 4" draw:style-name="Mgr2" draw:text-style-name="MP1" draw:layer="backgroundobjects" svg:width="9.113cm" svg:height="1.484cm" svg:x="11.886cm" svg:y="28.215cm" presentation:class="page-number">
        <draw:text-box>
          <text:p text:style-name="MP2"><text:span text:style-name="MT1"><text:page-number>&lt;숫자&gt;</text:page-number></text:span></text:p>
        </draw:text-box>
      </draw:frame>
      <draw:page-thumbnail draw:layer="backgroundobjects" svg:width="8.612cm" svg:height="4.842cm" svg:x="1.468cm" svg:y="3.814cm" draw:page-number="2"/>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HDOfficeLightV0"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4" draw:layer="backgroundobjects" svg:width="24.151cm" svg:height="3.045cm" svg:x="1.941cm" svg:y="0.84cm" presentation:class="title">
        <draw:text-box>
          <text:p text:style-name="MP3"><text:span text:style-name="MT2">마스터 제목 스타일 편집</text:span></text:p>
        </draw:text-box>
      </draw:frame>
      <draw:frame draw:name="Text Placeholder 2" presentation:style-name="Mpr2" draw:text-style-name="MP4" draw:layer="backgroundobjects" svg:width="24.151cm" svg:height="9.994cm" svg:x="1.941cm" svg:y="4.2cm" presentation:class="outline">
        <draw:text-box>
          <text:list text:style-name="ML2">
            <text:list-item>
              <text:p text:style-name="MP5"><text:span text:style-name="MT3">마스터 텍스트 스타일을 편집하려면 클릭</text:span></text:p>
              <text:list>
                <text:list-item>
                  <text:p text:style-name="MP6"><text:span text:style-name="MT4">두 번째 수준</text:span></text:p>
                  <text:list>
                    <text:list-item>
                      <text:p text:style-name="MP7"><text:span text:style-name="MT5">세 번째 수준</text:span></text:p>
                      <text:list>
                        <text:list-item>
                          <text:p text:style-name="MP8"><text:span text:style-name="MT6">네 번째 수준</text:span></text:p>
                          <text:list>
                            <text:list-item>
                              <text:p text:style-name="MP9"><text:span text:style-name="MT6">다섯 번째 수준</text:span></text:p>
                            </text:list-item>
                          </text:list>
                        </text:list-item>
                      </text:list>
                    </text:list-item>
                  </text:list>
                </text:list-item>
              </text:list>
            </text:list-item>
          </text:list>
        </draw:text-box>
      </draw:frame>
      <draw:frame draw:name="Date Placeholder 3" presentation:style-name="Mpr3" draw:text-style-name="MP4" draw:layer="backgroundobjects" svg:width="6.3cm" svg:height="0.839cm" svg:x="1.925cm" svg:y="14.599cm" presentation:class="date-time">
        <draw:text-box>
          <text:p/>
        </draw:text-box>
      </draw:frame>
      <draw:frame draw:name="Footer Placeholder 4" presentation:style-name="Mpr4" draw:text-style-name="MP4" draw:layer="backgroundobjects" svg:width="9.451cm" svg:height="0.839cm" svg:x="9.276cm" svg:y="14.599cm" presentation:class="footer">
        <draw:text-box>
          <text:p/>
        </draw:text-box>
      </draw:frame>
      <draw:frame draw:name="Slide Number Placeholder 5" presentation:style-name="Mpr3" draw:text-style-name="MP4" draw:layer="backgroundobjects" svg:width="6.3cm" svg:height="0.839cm" svg:x="19.792cm" svg:y="14.599cm" presentation:class="page-number">
        <draw:text-box>
          <text:p text:style-name="MP10"><text:span text:style-name="MT7"><text:page-number>&lt;숫자&gt;</text:page-number></text:span></text:p>
        </draw:text-box>
      </draw:frame>
      <presentation:notes style:page-layout-name="PM0">
        <draw:page-thumbnail draw:name="슬라이드 이미지 개체 틀 1" presentation:style-name="Master1-HDOfficeLightV0-title" draw:layer="backgroundobjects" svg:width="14.848cm" svg:height="11.136cm" svg:x="3.075cm" svg:y="2.257cm" presentation:class="page"/>
        <draw:frame draw:name="슬라이드 노트 개체 틀 2" presentation:style-name="Mpr5" draw:text-style-name="MP4" draw:layer="backgroundobjects" svg:width="16.799cm" svg:height="13.364cm" svg:x="2.1cm" svg:y="14.107cm" presentation:class="notes">
          <draw:text-box>
            <text:p/>
          </draw:text-box>
        </draw:frame>
        <draw:frame draw:name="머리글 개체 틀 3" presentation:style-name="Mpr6" draw:text-style-name="MP4" draw:layer="backgroundobjects" svg:width="9.113cm" svg:height="1.484cm" svg:x="0cm" svg:y="0cm" presentation:class="header">
          <draw:text-box>
            <text:p/>
          </draw:text-box>
        </draw:frame>
        <draw:frame draw:name="날짜 개체 틀 4" presentation:style-name="Mpr6" draw:text-style-name="MP4" draw:layer="backgroundobjects" svg:width="9.113cm" svg:height="1.484cm" svg:x="11.886cm" svg:y="0cm" presentation:class="date-time">
          <draw:text-box>
            <text:p/>
          </draw:text-box>
        </draw:frame>
        <draw:frame draw:name="바닥글 개체 틀 5" presentation:style-name="Mpr7" draw:text-style-name="MP4" draw:layer="backgroundobjects" svg:width="9.113cm" svg:height="1.484cm" svg:x="0cm" svg:y="28.215cm" presentation:class="footer">
          <draw:text-box>
            <text:p/>
          </draw:text-box>
        </draw:frame>
        <draw:frame draw:name="슬라이드 번호 개체 틀 6" presentation:style-name="Mpr7"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1-title-제목-슬라이드"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8" draw:text-style-name="MP4" draw:layer="backgroundobjects" svg:width="21.001cm" svg:height="5.484cm" svg:x="3.5cm" svg:y="2.583cm" presentation:class="title">
        <draw:text-box>
          <text:p text:style-name="MP11"><text:span text:style-name="MT9">마스터 제목 스타일 편집</text:span></text:p>
        </draw:text-box>
      </draw:frame>
      <draw:frame draw:name="Subtitle 2" presentation:style-name="Mpr9" draw:text-style-name="MP4" draw:layer="backgroundobjects" svg:width="21.001cm" svg:height="3.803cm" svg:x="3.5cm" svg:y="8.273cm" presentation:class="subtitle">
        <draw:text-box>
          <text:p text:style-name="MP12"><text:span text:style-name="MT10">클릭하여 마스터 부제목 스타일 편집</text:span></text:p>
        </draw:text-box>
      </draw:frame>
      <draw:frame draw:name="Date Placeholder 3" presentation:style-name="Mpr10" draw:text-style-name="MP4" draw:layer="backgroundobjects" svg:width="6.3cm" svg:height="0.839cm" svg:x="1.925cm" svg:y="14.599cm" presentation:class="date-time">
        <draw:text-box>
          <text:p/>
        </draw:text-box>
      </draw:frame>
      <draw:frame draw:name="Footer Placeholder 4" presentation:style-name="Mpr11" draw:text-style-name="MP4" draw:layer="backgroundobjects" svg:width="9.451cm" svg:height="0.839cm" svg:x="9.276cm" svg:y="14.599cm" presentation:class="footer">
        <draw:text-box>
          <text:p/>
        </draw:text-box>
      </draw:frame>
      <draw:frame draw:name="Slide Number Placeholder 5" presentation:style-name="Mpr10" draw:text-style-name="MP4" draw:layer="backgroundobjects" svg:width="6.3cm" svg:height="0.839cm" svg:x="19.792cm" svg:y="14.599cm" presentation:class="page-number">
        <draw:text-box>
          <text:p text:style-name="MP10"><text:span text:style-name="MT7"><text:page-number>&lt;숫자&gt;</text:page-number></text:span></text:p>
        </draw:text-box>
      </draw:frame>
      <presentation:notes style:page-layout-name="PM0">
        <draw:page-thumbnail draw:name="슬라이드 이미지 개체 틀 1" presentation:style-name="Master1-Layout1-title-제목-슬라이드-title" draw:layer="backgroundobjects" svg:width="14.848cm" svg:height="11.136cm" svg:x="3.075cm" svg:y="2.257cm" presentation:class="page"/>
        <draw:frame draw:name="슬라이드 노트 개체 틀 2" presentation:style-name="Mpr12" draw:text-style-name="MP4" draw:layer="backgroundobjects" svg:width="16.799cm" svg:height="13.364cm" svg:x="2.1cm" svg:y="14.107cm" presentation:class="notes">
          <draw:text-box>
            <text:p/>
          </draw:text-box>
        </draw:frame>
        <draw:frame draw:name="머리글 개체 틀 3" presentation:style-name="Mpr13" draw:text-style-name="MP4" draw:layer="backgroundobjects" svg:width="9.113cm" svg:height="1.484cm" svg:x="0cm" svg:y="0cm" presentation:class="header">
          <draw:text-box>
            <text:p/>
          </draw:text-box>
        </draw:frame>
        <draw:frame draw:name="날짜 개체 틀 4" presentation:style-name="Mpr13" draw:text-style-name="MP4" draw:layer="backgroundobjects" svg:width="9.113cm" svg:height="1.484cm" svg:x="11.886cm" svg:y="0cm" presentation:class="date-time">
          <draw:text-box>
            <text:p/>
          </draw:text-box>
        </draw:frame>
        <draw:frame draw:name="바닥글 개체 틀 5" presentation:style-name="Mpr14" draw:text-style-name="MP4" draw:layer="backgroundobjects" svg:width="9.113cm" svg:height="1.484cm" svg:x="0cm" svg:y="28.215cm" presentation:class="footer">
          <draw:text-box>
            <text:p/>
          </draw:text-box>
        </draw:frame>
        <draw:frame draw:name="슬라이드 번호 개체 틀 6" presentation:style-name="Mpr14"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2-obj-제목-및-내용"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5" draw:text-style-name="MP4" draw:layer="backgroundobjects" svg:width="24.151cm" svg:height="3.045cm" svg:x="1.941cm" svg:y="0.84cm" presentation:class="title">
        <draw:text-box>
          <text:p text:style-name="MP3"><text:span text:style-name="MT2">마스터 제목 스타일 편집</text:span></text:p>
        </draw:text-box>
      </draw:frame>
      <draw:frame draw:name="Content Placeholder 2" presentation:style-name="Mpr16" draw:text-style-name="MP4" draw:layer="backgroundobjects" svg:width="24.151cm" svg:height="9.994cm" svg:x="1.941cm" svg:y="4.2cm" presentation:class="title">
        <draw:text-box>
          <text:list text:style-name="ML4">
            <text:list-item>
              <text:p text:style-name="MP5"><text:span text:style-name="MT3">마스터 텍스트 스타일을 편집하려면 클릭</text:span></text:p>
              <text:list>
                <text:list-item>
                  <text:p text:style-name="MP6"><text:span text:style-name="MT4">두 번째 수준</text:span></text:p>
                  <text:list>
                    <text:list-item>
                      <text:p text:style-name="MP7"><text:span text:style-name="MT5">세 번째 수준</text:span></text:p>
                      <text:list>
                        <text:list-item>
                          <text:p text:style-name="MP8"><text:span text:style-name="MT6">네 번째 수준</text:span></text:p>
                          <text:list>
                            <text:list-item>
                              <text:p text:style-name="MP9"><text:span text:style-name="MT6">다섯 번째 수준</text:span></text:p>
                            </text:list-item>
                          </text:list>
                        </text:list-item>
                      </text:list>
                    </text:list-item>
                  </text:list>
                </text:list-item>
              </text:list>
            </text:list-item>
          </text:list>
        </draw:text-box>
      </draw:frame>
      <draw:frame draw:name="Date Placeholder 3" presentation:style-name="Mpr17" draw:text-style-name="MP4" draw:layer="backgroundobjects" svg:width="6.3cm" svg:height="0.839cm" svg:x="1.925cm" svg:y="14.599cm" presentation:class="date-time">
        <draw:text-box>
          <text:p/>
        </draw:text-box>
      </draw:frame>
      <draw:frame draw:name="Footer Placeholder 4" presentation:style-name="Mpr18" draw:text-style-name="MP4" draw:layer="backgroundobjects" svg:width="9.451cm" svg:height="0.839cm" svg:x="9.276cm" svg:y="14.599cm" presentation:class="footer">
        <draw:text-box>
          <text:p/>
        </draw:text-box>
      </draw:frame>
      <draw:frame draw:name="Slide Number Placeholder 5" presentation:style-name="Mpr17" draw:text-style-name="MP4" draw:layer="backgroundobjects" svg:width="6.3cm" svg:height="0.839cm" svg:x="19.792cm" svg:y="14.599cm" presentation:class="page-number">
        <draw:text-box>
          <text:p text:style-name="MP10"><text:span text:style-name="MT7"><text:page-number>&lt;숫자&gt;</text:page-number></text:span></text:p>
        </draw:text-box>
      </draw:frame>
      <presentation:notes style:page-layout-name="PM0">
        <draw:page-thumbnail draw:name="슬라이드 이미지 개체 틀 1" presentation:style-name="Master1-Layout2-obj-제목-및-내용-title" draw:layer="backgroundobjects" svg:width="14.848cm" svg:height="11.136cm" svg:x="3.075cm" svg:y="2.257cm" presentation:class="page"/>
        <draw:frame draw:name="슬라이드 노트 개체 틀 2" presentation:style-name="Mpr19" draw:text-style-name="MP4" draw:layer="backgroundobjects" svg:width="16.799cm" svg:height="13.364cm" svg:x="2.1cm" svg:y="14.107cm" presentation:class="notes">
          <draw:text-box>
            <text:p/>
          </draw:text-box>
        </draw:frame>
        <draw:frame draw:name="머리글 개체 틀 3" presentation:style-name="Mpr20" draw:text-style-name="MP4" draw:layer="backgroundobjects" svg:width="9.113cm" svg:height="1.484cm" svg:x="0cm" svg:y="0cm" presentation:class="header">
          <draw:text-box>
            <text:p/>
          </draw:text-box>
        </draw:frame>
        <draw:frame draw:name="날짜 개체 틀 4" presentation:style-name="Mpr20" draw:text-style-name="MP4" draw:layer="backgroundobjects" svg:width="9.113cm" svg:height="1.484cm" svg:x="11.886cm" svg:y="0cm" presentation:class="date-time">
          <draw:text-box>
            <text:p/>
          </draw:text-box>
        </draw:frame>
        <draw:frame draw:name="바닥글 개체 틀 5" presentation:style-name="Mpr21" draw:text-style-name="MP4" draw:layer="backgroundobjects" svg:width="9.113cm" svg:height="1.484cm" svg:x="0cm" svg:y="28.215cm" presentation:class="footer">
          <draw:text-box>
            <text:p/>
          </draw:text-box>
        </draw:frame>
        <draw:frame draw:name="슬라이드 번호 개체 틀 6" presentation:style-name="Mpr21"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3-secHead-구역-머리글"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2" draw:text-style-name="MP4" draw:layer="backgroundobjects" svg:width="24.151cm" svg:height="6.549cm" svg:x="1.911cm" svg:y="3.933cm" presentation:class="title">
        <draw:text-box>
          <text:p text:style-name="MP3"><text:span text:style-name="MT9">마스터 제목 스타일 편집</text:span></text:p>
        </draw:text-box>
      </draw:frame>
      <draw:frame draw:name="Text Placeholder 2" presentation:style-name="Mpr23" draw:text-style-name="MP4" draw:layer="backgroundobjects" svg:width="24.151cm" svg:height="3.446cm" svg:x="1.911cm" svg:y="10.457cm" presentation:class="outline">
        <draw:text-box>
          <text:list text:style-name="ML2">
            <text:list-item>
              <text:p text:style-name="MP13"><text:span text:style-name="MT10">마스터 텍스트 스타일을 편집하려면 클릭</text:span></text:p>
            </text:list-item>
          </text:list>
        </draw:text-box>
      </draw:frame>
      <draw:frame draw:name="Date Placeholder 3" presentation:style-name="Mpr24" draw:text-style-name="MP4" draw:layer="backgroundobjects" svg:width="6.3cm" svg:height="0.839cm" svg:x="1.925cm" svg:y="14.599cm" presentation:class="date-time">
        <draw:text-box>
          <text:p/>
        </draw:text-box>
      </draw:frame>
      <draw:frame draw:name="Footer Placeholder 4" presentation:style-name="Mpr25" draw:text-style-name="MP4" draw:layer="backgroundobjects" svg:width="9.451cm" svg:height="0.839cm" svg:x="9.276cm" svg:y="14.599cm" presentation:class="footer">
        <draw:text-box>
          <text:p/>
        </draw:text-box>
      </draw:frame>
      <draw:frame draw:name="Slide Number Placeholder 5" presentation:style-name="Mpr24" draw:text-style-name="MP4" draw:layer="backgroundobjects" svg:width="6.3cm" svg:height="0.839cm" svg:x="19.792cm" svg:y="14.599cm" presentation:class="page-number">
        <draw:text-box>
          <text:p text:style-name="MP10"><text:span text:style-name="MT7"><text:page-number>&lt;숫자&gt;</text:page-number></text:span></text:p>
        </draw:text-box>
      </draw:frame>
      <presentation:notes style:page-layout-name="PM0">
        <draw:page-thumbnail draw:name="슬라이드 이미지 개체 틀 1" presentation:style-name="Master1-Layout3-secHead-구역-머리글-title" draw:layer="backgroundobjects" svg:width="14.848cm" svg:height="11.136cm" svg:x="3.075cm" svg:y="2.257cm" presentation:class="page"/>
        <draw:frame draw:name="슬라이드 노트 개체 틀 2" presentation:style-name="Mpr26" draw:text-style-name="MP4" draw:layer="backgroundobjects" svg:width="16.799cm" svg:height="13.364cm" svg:x="2.1cm" svg:y="14.107cm" presentation:class="notes">
          <draw:text-box>
            <text:p/>
          </draw:text-box>
        </draw:frame>
        <draw:frame draw:name="머리글 개체 틀 3" presentation:style-name="Mpr27" draw:text-style-name="MP4" draw:layer="backgroundobjects" svg:width="9.113cm" svg:height="1.484cm" svg:x="0cm" svg:y="0cm" presentation:class="header">
          <draw:text-box>
            <text:p/>
          </draw:text-box>
        </draw:frame>
        <draw:frame draw:name="날짜 개체 틀 4" presentation:style-name="Mpr27" draw:text-style-name="MP4" draw:layer="backgroundobjects" svg:width="9.113cm" svg:height="1.484cm" svg:x="11.886cm" svg:y="0cm" presentation:class="date-time">
          <draw:text-box>
            <text:p/>
          </draw:text-box>
        </draw:frame>
        <draw:frame draw:name="바닥글 개체 틀 5" presentation:style-name="Mpr28" draw:text-style-name="MP4" draw:layer="backgroundobjects" svg:width="9.113cm" svg:height="1.484cm" svg:x="0cm" svg:y="28.215cm" presentation:class="footer">
          <draw:text-box>
            <text:p/>
          </draw:text-box>
        </draw:frame>
        <draw:frame draw:name="슬라이드 번호 개체 틀 6" presentation:style-name="Mpr28"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4-twoObj-콘텐츠-2개"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9" draw:text-style-name="MP4" draw:layer="backgroundobjects" svg:width="24.151cm" svg:height="3.045cm" svg:x="1.941cm" svg:y="0.84cm" presentation:class="title">
        <draw:text-box>
          <text:p text:style-name="MP3"><text:span text:style-name="MT2">마스터 제목 스타일 편집</text:span></text:p>
        </draw:text-box>
      </draw:frame>
      <draw:frame draw:name="Content Placeholder 2" presentation:style-name="Mpr30" draw:text-style-name="MP4" draw:layer="backgroundobjects" svg:width="11.901cm" svg:height="9.994cm" svg:x="1.941cm" svg:y="4.2cm" presentation:class="title">
        <draw:text-box>
          <text:list text:style-name="ML4">
            <text:list-item>
              <text:p text:style-name="MP5"><text:span text:style-name="MT3">마스터 텍스트 스타일을 편집하려면 클릭</text:span></text:p>
              <text:list>
                <text:list-item>
                  <text:p text:style-name="MP6"><text:span text:style-name="MT4">두 번째 수준</text:span></text:p>
                  <text:list>
                    <text:list-item>
                      <text:p text:style-name="MP7"><text:span text:style-name="MT5">세 번째 수준</text:span></text:p>
                      <text:list>
                        <text:list-item>
                          <text:p text:style-name="MP8"><text:span text:style-name="MT6">네 번째 수준</text:span></text:p>
                          <text:list>
                            <text:list-item>
                              <text:p text:style-name="MP9"><text:span text:style-name="MT6">다섯 번째 수준</text:span></text:p>
                            </text:list-item>
                          </text:list>
                        </text:list-item>
                      </text:list>
                    </text:list-item>
                  </text:list>
                </text:list-item>
              </text:list>
            </text:list-item>
          </text:list>
        </draw:text-box>
      </draw:frame>
      <draw:frame draw:name="Content Placeholder 3" presentation:style-name="Mpr30" draw:text-style-name="MP4" draw:layer="backgroundobjects" svg:width="11.901cm" svg:height="9.994cm" svg:x="14.176cm" svg:y="4.2cm" presentation:class="title">
        <draw:text-box>
          <text:list text:style-name="ML4">
            <text:list-item>
              <text:p text:style-name="MP5"><text:span text:style-name="MT3">마스터 텍스트 스타일을 편집하려면 클릭</text:span></text:p>
              <text:list>
                <text:list-item>
                  <text:p text:style-name="MP6"><text:span text:style-name="MT4">두 번째 수준</text:span></text:p>
                  <text:list>
                    <text:list-item>
                      <text:p text:style-name="MP7"><text:span text:style-name="MT5">세 번째 수준</text:span></text:p>
                      <text:list>
                        <text:list-item>
                          <text:p text:style-name="MP8"><text:span text:style-name="MT6">네 번째 수준</text:span></text:p>
                          <text:list>
                            <text:list-item>
                              <text:p text:style-name="MP9"><text:span text:style-name="MT6">다섯 번째 수준</text:span></text:p>
                            </text:list-item>
                          </text:list>
                        </text:list-item>
                      </text:list>
                    </text:list-item>
                  </text:list>
                </text:list-item>
              </text:list>
            </text:list-item>
          </text:list>
        </draw:text-box>
      </draw:frame>
      <draw:frame draw:name="Date Placeholder 4" presentation:style-name="Mpr31" draw:text-style-name="MP4" draw:layer="backgroundobjects" svg:width="6.3cm" svg:height="0.839cm" svg:x="1.925cm" svg:y="14.599cm" presentation:class="date-time">
        <draw:text-box>
          <text:p/>
        </draw:text-box>
      </draw:frame>
      <draw:frame draw:name="Footer Placeholder 5" presentation:style-name="Mpr32" draw:text-style-name="MP4" draw:layer="backgroundobjects" svg:width="9.451cm" svg:height="0.839cm" svg:x="9.276cm" svg:y="14.599cm" presentation:class="footer">
        <draw:text-box>
          <text:p/>
        </draw:text-box>
      </draw:frame>
      <draw:frame draw:name="Slide Number Placeholder 6" presentation:style-name="Mpr31" draw:text-style-name="MP4" draw:layer="backgroundobjects" svg:width="6.3cm" svg:height="0.839cm" svg:x="19.792cm" svg:y="14.599cm" presentation:class="page-number">
        <draw:text-box>
          <text:p text:style-name="MP10"><text:span text:style-name="MT7"><text:page-number>&lt;숫자&gt;</text:page-number></text:span></text:p>
        </draw:text-box>
      </draw:frame>
      <presentation:notes style:page-layout-name="PM0">
        <draw:page-thumbnail draw:name="슬라이드 이미지 개체 틀 1" presentation:style-name="Master1-Layout4-twoObj-콘텐츠-2개-title" draw:layer="backgroundobjects" svg:width="14.848cm" svg:height="11.136cm" svg:x="3.075cm" svg:y="2.257cm" presentation:class="page"/>
        <draw:frame draw:name="슬라이드 노트 개체 틀 2" presentation:style-name="Mpr33" draw:text-style-name="MP4" draw:layer="backgroundobjects" svg:width="16.799cm" svg:height="13.364cm" svg:x="2.1cm" svg:y="14.107cm" presentation:class="notes">
          <draw:text-box>
            <text:p/>
          </draw:text-box>
        </draw:frame>
        <draw:frame draw:name="머리글 개체 틀 3" presentation:style-name="Mpr34" draw:text-style-name="MP4" draw:layer="backgroundobjects" svg:width="9.113cm" svg:height="1.484cm" svg:x="0cm" svg:y="0cm" presentation:class="header">
          <draw:text-box>
            <text:p/>
          </draw:text-box>
        </draw:frame>
        <draw:frame draw:name="날짜 개체 틀 4" presentation:style-name="Mpr34" draw:text-style-name="MP4" draw:layer="backgroundobjects" svg:width="9.113cm" svg:height="1.484cm" svg:x="11.886cm" svg:y="0cm" presentation:class="date-time">
          <draw:text-box>
            <text:p/>
          </draw:text-box>
        </draw:frame>
        <draw:frame draw:name="바닥글 개체 틀 5" presentation:style-name="Mpr35" draw:text-style-name="MP4" draw:layer="backgroundobjects" svg:width="9.113cm" svg:height="1.484cm" svg:x="0cm" svg:y="28.215cm" presentation:class="footer">
          <draw:text-box>
            <text:p/>
          </draw:text-box>
        </draw:frame>
        <draw:frame draw:name="슬라이드 번호 개체 틀 6" presentation:style-name="Mpr35"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5-cust-비교"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ext Placeholder 2" presentation:style-name="Mpr36" draw:text-style-name="MP4" draw:layer="backgroundobjects" svg:width="11.842cm" svg:height="1.896cm" svg:x="1.941cm" svg:y="3.863cm" presentation:class="outline">
        <draw:text-box>
          <text:list text:style-name="ML2">
            <text:list-item>
              <text:p text:style-name="MP3"><text:span text:style-name="MT11">마스터 텍스트 스타일을 편집하려면 클릭</text:span></text:p>
            </text:list-item>
          </text:list>
        </draw:text-box>
      </draw:frame>
      <draw:frame draw:name="Content Placeholder 3" presentation:style-name="Mpr37" draw:text-style-name="MP4" draw:layer="backgroundobjects" svg:width="11.842cm" svg:height="8.453cm" svg:x="1.941cm" svg:y="5.759cm" presentation:class="title">
        <draw:text-box>
          <text:list text:style-name="ML4">
            <text:list-item>
              <text:p text:style-name="MP5"><text:span text:style-name="MT3">마스터 텍스트 스타일을 편집하려면 클릭</text:span></text:p>
              <text:list>
                <text:list-item>
                  <text:p text:style-name="MP6"><text:span text:style-name="MT4">두 번째 수준</text:span></text:p>
                  <text:list>
                    <text:list-item>
                      <text:p text:style-name="MP7"><text:span text:style-name="MT5">세 번째 수준</text:span></text:p>
                      <text:list>
                        <text:list-item>
                          <text:p text:style-name="MP8"><text:span text:style-name="MT6">네 번째 수준</text:span></text:p>
                          <text:list>
                            <text:list-item>
                              <text:p text:style-name="MP9"><text:span text:style-name="MT6">다섯 번째 수준</text:span></text:p>
                            </text:list-item>
                          </text:list>
                        </text:list-item>
                      </text:list>
                    </text:list-item>
                  </text:list>
                </text:list-item>
              </text:list>
            </text:list-item>
          </text:list>
        </draw:text-box>
      </draw:frame>
      <draw:frame draw:name="Text Placeholder 4" presentation:style-name="Mpr36" draw:text-style-name="MP4" draw:layer="backgroundobjects" svg:width="11.901cm" svg:height="1.896cm" svg:x="14.176cm" svg:y="3.863cm" presentation:class="outline">
        <draw:text-box>
          <text:list text:style-name="ML5">
            <text:list-item>
              <text:p text:style-name="MP3"><text:span text:style-name="MT11">마스터 텍스트 스타일을 편집하려면 클릭</text:span></text:p>
            </text:list-item>
          </text:list>
        </draw:text-box>
      </draw:frame>
      <draw:frame draw:name="Content Placeholder 5" presentation:style-name="Mpr37" draw:text-style-name="MP4" draw:layer="backgroundobjects" svg:width="11.901cm" svg:height="8.453cm" svg:x="14.176cm" svg:y="5.759cm" presentation:class="title">
        <draw:text-box>
          <text:list text:style-name="ML4">
            <text:list-item>
              <text:p text:style-name="MP5"><text:span text:style-name="MT3">마스터 텍스트 스타일을 편집하려면 클릭</text:span></text:p>
              <text:list>
                <text:list-item>
                  <text:p text:style-name="MP6"><text:span text:style-name="MT4">두 번째 수준</text:span></text:p>
                  <text:list>
                    <text:list-item>
                      <text:p text:style-name="MP7"><text:span text:style-name="MT5">세 번째 수준</text:span></text:p>
                      <text:list>
                        <text:list-item>
                          <text:p text:style-name="MP8"><text:span text:style-name="MT6">네 번째 수준</text:span></text:p>
                          <text:list>
                            <text:list-item>
                              <text:p text:style-name="MP9"><text:span text:style-name="MT6">다섯 번째 수준</text:span></text:p>
                            </text:list-item>
                          </text:list>
                        </text:list-item>
                      </text:list>
                    </text:list-item>
                  </text:list>
                </text:list-item>
              </text:list>
            </text:list-item>
          </text:list>
        </draw:text-box>
      </draw:frame>
      <draw:frame draw:name="Date Placeholder 6" presentation:style-name="Mpr38" draw:text-style-name="MP4" draw:layer="backgroundobjects" svg:width="6.3cm" svg:height="0.839cm" svg:x="1.925cm" svg:y="14.599cm" presentation:class="date-time">
        <draw:text-box>
          <text:p/>
        </draw:text-box>
      </draw:frame>
      <draw:frame draw:name="Footer Placeholder 7" presentation:style-name="Mpr39" draw:text-style-name="MP4" draw:layer="backgroundobjects" svg:width="9.451cm" svg:height="0.839cm" svg:x="9.276cm" svg:y="14.599cm" presentation:class="footer">
        <draw:text-box>
          <text:p/>
        </draw:text-box>
      </draw:frame>
      <draw:frame draw:name="Slide Number Placeholder 8" presentation:style-name="Mpr38" draw:text-style-name="MP4" draw:layer="backgroundobjects" svg:width="6.3cm" svg:height="0.839cm" svg:x="19.792cm" svg:y="14.599cm" presentation:class="page-number">
        <draw:text-box>
          <text:p text:style-name="MP10"><text:span text:style-name="MT7"><text:page-number>&lt;숫자&gt;</text:page-number></text:span></text:p>
        </draw:text-box>
      </draw:frame>
      <draw:frame draw:name="Title 9" presentation:style-name="Mpr40" draw:text-style-name="MP4" draw:layer="backgroundobjects" svg:width="24.151cm" svg:height="3.045cm" svg:x="1.941cm" svg:y="0.84cm" presentation:class="title">
        <draw:text-box>
          <text:p text:style-name="MP3"><text:span text:style-name="MT2">마스터 제목 스타일 편집</text:span></text:p>
        </draw:text-box>
      </draw:frame>
      <presentation:notes style:page-layout-name="PM0">
        <draw:page-thumbnail draw:name="슬라이드 이미지 개체 틀 1" presentation:style-name="Master1-Layout5-cust-비교-title" draw:layer="backgroundobjects" svg:width="14.848cm" svg:height="11.136cm" svg:x="3.075cm" svg:y="2.257cm" presentation:class="page"/>
        <draw:frame draw:name="슬라이드 노트 개체 틀 2" presentation:style-name="Mpr41" draw:text-style-name="MP4" draw:layer="backgroundobjects" svg:width="16.799cm" svg:height="13.364cm" svg:x="2.1cm" svg:y="14.107cm" presentation:class="notes">
          <draw:text-box>
            <text:p/>
          </draw:text-box>
        </draw:frame>
        <draw:frame draw:name="머리글 개체 틀 3" presentation:style-name="Mpr42" draw:text-style-name="MP4" draw:layer="backgroundobjects" svg:width="9.113cm" svg:height="1.484cm" svg:x="0cm" svg:y="0cm" presentation:class="header">
          <draw:text-box>
            <text:p/>
          </draw:text-box>
        </draw:frame>
        <draw:frame draw:name="날짜 개체 틀 4" presentation:style-name="Mpr42" draw:text-style-name="MP4" draw:layer="backgroundobjects" svg:width="9.113cm" svg:height="1.484cm" svg:x="11.886cm" svg:y="0cm" presentation:class="date-time">
          <draw:text-box>
            <text:p/>
          </draw:text-box>
        </draw:frame>
        <draw:frame draw:name="바닥글 개체 틀 5" presentation:style-name="Mpr43" draw:text-style-name="MP4" draw:layer="backgroundobjects" svg:width="9.113cm" svg:height="1.484cm" svg:x="0cm" svg:y="28.215cm" presentation:class="footer">
          <draw:text-box>
            <text:p/>
          </draw:text-box>
        </draw:frame>
        <draw:frame draw:name="슬라이드 번호 개체 틀 6" presentation:style-name="Mpr43"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6-cust-제목만"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2" presentation:style-name="Mpr44" draw:text-style-name="MP4" draw:layer="backgroundobjects" svg:width="6.3cm" svg:height="0.839cm" svg:x="1.925cm" svg:y="14.599cm" presentation:class="date-time">
        <draw:text-box>
          <text:p/>
        </draw:text-box>
      </draw:frame>
      <draw:frame draw:name="Footer Placeholder 3" presentation:style-name="Mpr45" draw:text-style-name="MP4" draw:layer="backgroundobjects" svg:width="9.451cm" svg:height="0.839cm" svg:x="9.276cm" svg:y="14.599cm" presentation:class="footer">
        <draw:text-box>
          <text:p/>
        </draw:text-box>
      </draw:frame>
      <draw:frame draw:name="Slide Number Placeholder 4" presentation:style-name="Mpr44" draw:text-style-name="MP4" draw:layer="backgroundobjects" svg:width="6.3cm" svg:height="0.839cm" svg:x="19.792cm" svg:y="14.599cm" presentation:class="page-number">
        <draw:text-box>
          <text:p text:style-name="MP10"><text:span text:style-name="MT7"><text:page-number>&lt;숫자&gt;</text:page-number></text:span></text:p>
        </draw:text-box>
      </draw:frame>
      <draw:frame draw:name="Title 5" presentation:style-name="Mpr46" draw:text-style-name="MP4" draw:layer="backgroundobjects" svg:width="24.151cm" svg:height="3.045cm" svg:x="1.941cm" svg:y="0.84cm" presentation:class="title">
        <draw:text-box>
          <text:p text:style-name="MP3"><text:span text:style-name="MT2">마스터 제목 스타일 편집</text:span></text:p>
        </draw:text-box>
      </draw:frame>
      <presentation:notes style:page-layout-name="PM0">
        <draw:page-thumbnail draw:name="슬라이드 이미지 개체 틀 1" presentation:style-name="Master1-Layout6-cust-제목만-title" draw:layer="backgroundobjects" svg:width="14.848cm" svg:height="11.136cm" svg:x="3.075cm" svg:y="2.257cm" presentation:class="page"/>
        <draw:frame draw:name="슬라이드 노트 개체 틀 2" presentation:style-name="Mpr47" draw:text-style-name="MP4" draw:layer="backgroundobjects" svg:width="16.799cm" svg:height="13.364cm" svg:x="2.1cm" svg:y="14.107cm" presentation:class="notes">
          <draw:text-box>
            <text:p/>
          </draw:text-box>
        </draw:frame>
        <draw:frame draw:name="머리글 개체 틀 3" presentation:style-name="Mpr48" draw:text-style-name="MP4" draw:layer="backgroundobjects" svg:width="9.113cm" svg:height="1.484cm" svg:x="0cm" svg:y="0cm" presentation:class="header">
          <draw:text-box>
            <text:p/>
          </draw:text-box>
        </draw:frame>
        <draw:frame draw:name="날짜 개체 틀 4" presentation:style-name="Mpr48" draw:text-style-name="MP4" draw:layer="backgroundobjects" svg:width="9.113cm" svg:height="1.484cm" svg:x="11.886cm" svg:y="0cm" presentation:class="date-time">
          <draw:text-box>
            <text:p/>
          </draw:text-box>
        </draw:frame>
        <draw:frame draw:name="바닥글 개체 틀 5" presentation:style-name="Mpr49" draw:text-style-name="MP4" draw:layer="backgroundobjects" svg:width="9.113cm" svg:height="1.484cm" svg:x="0cm" svg:y="28.215cm" presentation:class="footer">
          <draw:text-box>
            <text:p/>
          </draw:text-box>
        </draw:frame>
        <draw:frame draw:name="슬라이드 번호 개체 틀 6" presentation:style-name="Mpr49"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7-blank-빈-화면"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50" draw:text-style-name="MP4" draw:layer="backgroundobjects" svg:width="6.3cm" svg:height="0.839cm" svg:x="1.925cm" svg:y="14.599cm" presentation:class="date-time">
        <draw:text-box>
          <text:p/>
        </draw:text-box>
      </draw:frame>
      <draw:frame draw:name="Footer Placeholder 2" presentation:style-name="Mpr51" draw:text-style-name="MP4" draw:layer="backgroundobjects" svg:width="9.451cm" svg:height="0.839cm" svg:x="9.276cm" svg:y="14.599cm" presentation:class="footer">
        <draw:text-box>
          <text:p/>
        </draw:text-box>
      </draw:frame>
      <draw:frame draw:name="Slide Number Placeholder 3" presentation:style-name="Mpr50" draw:text-style-name="MP4" draw:layer="backgroundobjects" svg:width="6.3cm" svg:height="0.839cm" svg:x="19.792cm" svg:y="14.599cm" presentation:class="page-number">
        <draw:text-box>
          <text:p text:style-name="MP10"><text:span text:style-name="MT7"><text:page-number>&lt;숫자&gt;</text:page-number></text:span></text:p>
        </draw:text-box>
      </draw:frame>
      <presentation:notes style:page-layout-name="PM0">
        <draw:page-thumbnail draw:name="슬라이드 이미지 개체 틀 1" presentation:style-name="Master1-Layout7-blank-빈-화면-title" draw:layer="backgroundobjects" svg:width="14.848cm" svg:height="11.136cm" svg:x="3.075cm" svg:y="2.257cm" presentation:class="page"/>
        <draw:frame draw:name="슬라이드 노트 개체 틀 2" presentation:style-name="Mpr52" draw:text-style-name="MP4" draw:layer="backgroundobjects" svg:width="16.799cm" svg:height="13.364cm" svg:x="2.1cm" svg:y="14.107cm" presentation:class="notes">
          <draw:text-box>
            <text:p/>
          </draw:text-box>
        </draw:frame>
        <draw:frame draw:name="머리글 개체 틀 3" presentation:style-name="Mpr53" draw:text-style-name="MP4" draw:layer="backgroundobjects" svg:width="9.113cm" svg:height="1.484cm" svg:x="0cm" svg:y="0cm" presentation:class="header">
          <draw:text-box>
            <text:p/>
          </draw:text-box>
        </draw:frame>
        <draw:frame draw:name="날짜 개체 틀 4" presentation:style-name="Mpr53" draw:text-style-name="MP4" draw:layer="backgroundobjects" svg:width="9.113cm" svg:height="1.484cm" svg:x="11.886cm" svg:y="0cm" presentation:class="date-time">
          <draw:text-box>
            <text:p/>
          </draw:text-box>
        </draw:frame>
        <draw:frame draw:name="바닥글 개체 틀 5" presentation:style-name="Mpr54" draw:text-style-name="MP4" draw:layer="backgroundobjects" svg:width="9.113cm" svg:height="1.484cm" svg:x="0cm" svg:y="28.215cm" presentation:class="footer">
          <draw:text-box>
            <text:p/>
          </draw:text-box>
        </draw:frame>
        <draw:frame draw:name="슬라이드 번호 개체 틀 6" presentation:style-name="Mpr54"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8-objTx-캡션-있는-콘텐츠"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5" draw:text-style-name="MP4" draw:layer="backgroundobjects" svg:width="9.031cm" svg:height="3.675cm" svg:x="1.932cm" svg:y="1.05cm" presentation:class="title">
        <draw:text-box>
          <text:p text:style-name="MP3"><text:span text:style-name="MT12">마스터 제목 스타일 편집</text:span></text:p>
        </draw:text-box>
      </draw:frame>
      <draw:frame draw:name="Content Placeholder 2" presentation:style-name="Mpr56" draw:text-style-name="MP4" draw:layer="backgroundobjects" svg:width="14.176cm" svg:height="11.201cm" svg:x="11.901cm" svg:y="2.275cm" presentation:class="title">
        <draw:text-box>
          <text:list text:style-name="ML4">
            <text:list-item>
              <text:p text:style-name="MP5"><text:span text:style-name="MT13">마스터 텍스트 스타일을 편집하려면 클릭</text:span></text:p>
              <text:list>
                <text:list-item>
                  <text:p text:style-name="MP6"><text:span text:style-name="MT3">두 번째 수준</text:span></text:p>
                  <text:list>
                    <text:list-item>
                      <text:p text:style-name="MP7"><text:span text:style-name="MT4">세 번째 수준</text:span></text:p>
                      <text:list>
                        <text:list-item>
                          <text:p text:style-name="MP8"><text:span text:style-name="MT5">네 번째 수준</text:span></text:p>
                          <text:list>
                            <text:list-item>
                              <text:p text:style-name="MP9"><text:span text:style-name="MT5">다섯 번째 수준</text:span></text:p>
                            </text:list-item>
                          </text:list>
                        </text:list-item>
                      </text:list>
                    </text:list-item>
                  </text:list>
                </text:list-item>
              </text:list>
            </text:list-item>
          </text:list>
        </draw:text-box>
      </draw:frame>
      <draw:frame draw:name="Text Placeholder 3" presentation:style-name="Mpr57" draw:text-style-name="MP4" draw:layer="backgroundobjects" svg:width="9.031cm" svg:height="8.751cm" svg:x="1.932cm" svg:y="4.725cm" presentation:class="outline">
        <draw:text-box>
          <text:list text:style-name="ML2">
            <text:list-item>
              <text:p text:style-name="MP13"><text:span text:style-name="MT14">마스터 텍스트 스타일을 편집하려면 클릭</text:span></text:p>
            </text:list-item>
          </text:list>
        </draw:text-box>
      </draw:frame>
      <draw:frame draw:name="Date Placeholder 4" presentation:style-name="Mpr58" draw:text-style-name="MP4" draw:layer="backgroundobjects" svg:width="6.3cm" svg:height="0.839cm" svg:x="1.925cm" svg:y="14.599cm" presentation:class="date-time">
        <draw:text-box>
          <text:p/>
        </draw:text-box>
      </draw:frame>
      <draw:frame draw:name="Footer Placeholder 5" presentation:style-name="Mpr59" draw:text-style-name="MP4" draw:layer="backgroundobjects" svg:width="9.451cm" svg:height="0.839cm" svg:x="9.276cm" svg:y="14.599cm" presentation:class="footer">
        <draw:text-box>
          <text:p/>
        </draw:text-box>
      </draw:frame>
      <draw:frame draw:name="Slide Number Placeholder 6" presentation:style-name="Mpr58" draw:text-style-name="MP4" draw:layer="backgroundobjects" svg:width="6.3cm" svg:height="0.839cm" svg:x="19.792cm" svg:y="14.599cm" presentation:class="page-number">
        <draw:text-box>
          <text:p text:style-name="MP10"><text:span text:style-name="MT7"><text:page-number>&lt;숫자&gt;</text:page-number></text:span></text:p>
        </draw:text-box>
      </draw:frame>
      <presentation:notes style:page-layout-name="PM0">
        <draw:page-thumbnail draw:name="슬라이드 이미지 개체 틀 1" presentation:style-name="Master1-Layout8-objTx-캡션-있는-콘텐츠-title" draw:layer="backgroundobjects" svg:width="14.848cm" svg:height="11.136cm" svg:x="3.075cm" svg:y="2.257cm" presentation:class="page"/>
        <draw:frame draw:name="슬라이드 노트 개체 틀 2" presentation:style-name="Mpr60" draw:text-style-name="MP4" draw:layer="backgroundobjects" svg:width="16.799cm" svg:height="13.364cm" svg:x="2.1cm" svg:y="14.107cm" presentation:class="notes">
          <draw:text-box>
            <text:p/>
          </draw:text-box>
        </draw:frame>
        <draw:frame draw:name="머리글 개체 틀 3" presentation:style-name="Mpr61" draw:text-style-name="MP4" draw:layer="backgroundobjects" svg:width="9.113cm" svg:height="1.484cm" svg:x="0cm" svg:y="0cm" presentation:class="header">
          <draw:text-box>
            <text:p/>
          </draw:text-box>
        </draw:frame>
        <draw:frame draw:name="날짜 개체 틀 4" presentation:style-name="Mpr61" draw:text-style-name="MP4" draw:layer="backgroundobjects" svg:width="9.113cm" svg:height="1.484cm" svg:x="11.886cm" svg:y="0cm" presentation:class="date-time">
          <draw:text-box>
            <text:p/>
          </draw:text-box>
        </draw:frame>
        <draw:frame draw:name="바닥글 개체 틀 5" presentation:style-name="Mpr62" draw:text-style-name="MP4" draw:layer="backgroundobjects" svg:width="9.113cm" svg:height="1.484cm" svg:x="0cm" svg:y="28.215cm" presentation:class="footer">
          <draw:text-box>
            <text:p/>
          </draw:text-box>
        </draw:frame>
        <draw:frame draw:name="슬라이드 번호 개체 틀 6" presentation:style-name="Mpr62"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9-picTx-캡션-있는-그림"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3" draw:text-style-name="MP4" draw:layer="backgroundobjects" svg:width="9.031cm" svg:height="3.675cm" svg:x="1.932cm" svg:y="1.05cm" presentation:class="title">
        <draw:text-box>
          <text:p text:style-name="MP3"><text:span text:style-name="MT12">마스터 제목 스타일 편집</text:span></text:p>
        </draw:text-box>
      </draw:frame>
      <draw:frame draw:name="Picture Placeholder 2" presentation:style-name="Mpr64" draw:text-style-name="MP4" draw:layer="backgroundobjects" svg:width="14.176cm" svg:height="11.201cm" svg:x="11.901cm" svg:y="2.275cm" presentation:class="title">
        <draw:text-box>
          <text:p text:style-name="MP13"><text:span text:style-name="MT13">그림을 추가하려면 아이콘을 클릭하십시오</text:span></text:p>
        </draw:text-box>
      </draw:frame>
      <draw:frame draw:name="Text Placeholder 3" presentation:style-name="Mpr65" draw:text-style-name="MP4" draw:layer="backgroundobjects" svg:width="9.031cm" svg:height="8.751cm" svg:x="1.932cm" svg:y="4.725cm" presentation:class="outline">
        <draw:text-box>
          <text:list text:style-name="ML2">
            <text:list-item>
              <text:p text:style-name="MP13"><text:span text:style-name="MT14">마스터 텍스트 스타일을 편집하려면 클릭</text:span></text:p>
            </text:list-item>
          </text:list>
        </draw:text-box>
      </draw:frame>
      <draw:frame draw:name="Date Placeholder 4" presentation:style-name="Mpr66" draw:text-style-name="MP4" draw:layer="backgroundobjects" svg:width="6.3cm" svg:height="0.839cm" svg:x="1.925cm" svg:y="14.599cm" presentation:class="date-time">
        <draw:text-box>
          <text:p/>
        </draw:text-box>
      </draw:frame>
      <draw:frame draw:name="Footer Placeholder 5" presentation:style-name="Mpr67" draw:text-style-name="MP4" draw:layer="backgroundobjects" svg:width="9.451cm" svg:height="0.839cm" svg:x="9.276cm" svg:y="14.599cm" presentation:class="footer">
        <draw:text-box>
          <text:p/>
        </draw:text-box>
      </draw:frame>
      <draw:frame draw:name="Slide Number Placeholder 6" presentation:style-name="Mpr66" draw:text-style-name="MP4" draw:layer="backgroundobjects" svg:width="6.3cm" svg:height="0.839cm" svg:x="19.792cm" svg:y="14.599cm" presentation:class="page-number">
        <draw:text-box>
          <text:p text:style-name="MP10"><text:span text:style-name="MT7"><text:page-number>&lt;숫자&gt;</text:page-number></text:span></text:p>
        </draw:text-box>
      </draw:frame>
      <presentation:notes style:page-layout-name="PM0">
        <draw:page-thumbnail draw:name="슬라이드 이미지 개체 틀 1" presentation:style-name="Master1-Layout9-picTx-캡션-있는-그림-title" draw:layer="backgroundobjects" svg:width="14.848cm" svg:height="11.136cm" svg:x="3.075cm" svg:y="2.257cm" presentation:class="page"/>
        <draw:frame draw:name="슬라이드 노트 개체 틀 2" presentation:style-name="Mpr68" draw:text-style-name="MP4" draw:layer="backgroundobjects" svg:width="16.799cm" svg:height="13.364cm" svg:x="2.1cm" svg:y="14.107cm" presentation:class="notes">
          <draw:text-box>
            <text:p/>
          </draw:text-box>
        </draw:frame>
        <draw:frame draw:name="머리글 개체 틀 3" presentation:style-name="Mpr69" draw:text-style-name="MP4" draw:layer="backgroundobjects" svg:width="9.113cm" svg:height="1.484cm" svg:x="0cm" svg:y="0cm" presentation:class="header">
          <draw:text-box>
            <text:p/>
          </draw:text-box>
        </draw:frame>
        <draw:frame draw:name="날짜 개체 틀 4" presentation:style-name="Mpr69" draw:text-style-name="MP4" draw:layer="backgroundobjects" svg:width="9.113cm" svg:height="1.484cm" svg:x="11.886cm" svg:y="0cm" presentation:class="date-time">
          <draw:text-box>
            <text:p/>
          </draw:text-box>
        </draw:frame>
        <draw:frame draw:name="바닥글 개체 틀 5" presentation:style-name="Mpr70" draw:text-style-name="MP4" draw:layer="backgroundobjects" svg:width="9.113cm" svg:height="1.484cm" svg:x="0cm" svg:y="28.215cm" presentation:class="footer">
          <draw:text-box>
            <text:p/>
          </draw:text-box>
        </draw:frame>
        <draw:frame draw:name="슬라이드 번호 개체 틀 6" presentation:style-name="Mpr70"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10-vertTx-제목-및-세로-텍스트"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1" draw:text-style-name="MP4" draw:layer="backgroundobjects" svg:width="24.151cm" svg:height="3.045cm" svg:x="1.941cm" svg:y="0.84cm" presentation:class="title">
        <draw:text-box>
          <text:p text:style-name="MP3"><text:span text:style-name="MT2">마스터 제목 스타일 편집</text:span></text:p>
        </draw:text-box>
      </draw:frame>
      <draw:frame draw:name="Vertical Text Placeholder 2" presentation:style-name="Mpr72" draw:text-style-name="MP4" draw:layer="backgroundobjects" svg:width="24.151cm" svg:height="9.994cm" svg:x="1.941cm" svg:y="4.2cm" presentation:class="outline">
        <draw:text-box>
          <text:list text:style-name="ML2">
            <text:list-item>
              <text:p text:style-name="MP5"><text:span text:style-name="MT3">마스터 텍스트 스타일을 편집하려면 클릭</text:span></text:p>
              <text:list>
                <text:list-item>
                  <text:p text:style-name="MP6"><text:span text:style-name="MT4">두 번째 수준</text:span></text:p>
                  <text:list>
                    <text:list-item>
                      <text:p text:style-name="MP7"><text:span text:style-name="MT5">세 번째 수준</text:span></text:p>
                      <text:list>
                        <text:list-item>
                          <text:p text:style-name="MP8"><text:span text:style-name="MT6">네 번째 수준</text:span></text:p>
                          <text:list>
                            <text:list-item>
                              <text:p text:style-name="MP9"><text:span text:style-name="MT6">다섯 번째 수준</text:span></text:p>
                            </text:list-item>
                          </text:list>
                        </text:list-item>
                      </text:list>
                    </text:list-item>
                  </text:list>
                </text:list-item>
              </text:list>
            </text:list-item>
          </text:list>
        </draw:text-box>
      </draw:frame>
      <draw:frame draw:name="Date Placeholder 3" presentation:style-name="Mpr73" draw:text-style-name="MP4" draw:layer="backgroundobjects" svg:width="6.3cm" svg:height="0.839cm" svg:x="1.925cm" svg:y="14.599cm" presentation:class="date-time">
        <draw:text-box>
          <text:p/>
        </draw:text-box>
      </draw:frame>
      <draw:frame draw:name="Footer Placeholder 4" presentation:style-name="Mpr74" draw:text-style-name="MP4" draw:layer="backgroundobjects" svg:width="9.451cm" svg:height="0.839cm" svg:x="9.276cm" svg:y="14.599cm" presentation:class="footer">
        <draw:text-box>
          <text:p/>
        </draw:text-box>
      </draw:frame>
      <draw:frame draw:name="Slide Number Placeholder 5" presentation:style-name="Mpr73" draw:text-style-name="MP4" draw:layer="backgroundobjects" svg:width="6.3cm" svg:height="0.839cm" svg:x="19.792cm" svg:y="14.599cm" presentation:class="page-number">
        <draw:text-box>
          <text:p text:style-name="MP10"><text:span text:style-name="MT7"><text:page-number>&lt;숫자&gt;</text:page-number></text:span></text:p>
        </draw:text-box>
      </draw:frame>
      <presentation:notes style:page-layout-name="PM0">
        <draw:page-thumbnail draw:name="슬라이드 이미지 개체 틀 1" presentation:style-name="Master1-Layout10-vertTx-제목-및-세로-텍스트-title" draw:layer="backgroundobjects" svg:width="14.848cm" svg:height="11.136cm" svg:x="3.075cm" svg:y="2.257cm" presentation:class="page"/>
        <draw:frame draw:name="슬라이드 노트 개체 틀 2" presentation:style-name="Mpr75" draw:text-style-name="MP4" draw:layer="backgroundobjects" svg:width="16.799cm" svg:height="13.364cm" svg:x="2.1cm" svg:y="14.107cm" presentation:class="notes">
          <draw:text-box>
            <text:p/>
          </draw:text-box>
        </draw:frame>
        <draw:frame draw:name="머리글 개체 틀 3" presentation:style-name="Mpr76" draw:text-style-name="MP4" draw:layer="backgroundobjects" svg:width="9.113cm" svg:height="1.484cm" svg:x="0cm" svg:y="0cm" presentation:class="header">
          <draw:text-box>
            <text:p/>
          </draw:text-box>
        </draw:frame>
        <draw:frame draw:name="날짜 개체 틀 4" presentation:style-name="Mpr76" draw:text-style-name="MP4" draw:layer="backgroundobjects" svg:width="9.113cm" svg:height="1.484cm" svg:x="11.886cm" svg:y="0cm" presentation:class="date-time">
          <draw:text-box>
            <text:p/>
          </draw:text-box>
        </draw:frame>
        <draw:frame draw:name="바닥글 개체 틀 5" presentation:style-name="Mpr77" draw:text-style-name="MP4" draw:layer="backgroundobjects" svg:width="9.113cm" svg:height="1.484cm" svg:x="0cm" svg:y="28.215cm" presentation:class="footer">
          <draw:text-box>
            <text:p/>
          </draw:text-box>
        </draw:frame>
        <draw:frame draw:name="슬라이드 번호 개체 틀 6" presentation:style-name="Mpr77"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1-Layout11-vertTitleAndTx-세로-제목-및-텍스트"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78" draw:text-style-name="MP4" draw:layer="backgroundobjects" svg:width="6.038cm" svg:height="13.349cm" svg:x="20.039cm" svg:y="0.828cm" presentation:class="title">
        <draw:text-box>
          <text:p text:style-name="MP3"><text:span text:style-name="MT2">마스터 제목 스타일 편집</text:span></text:p>
        </draw:text-box>
      </draw:frame>
      <draw:frame draw:name="Vertical Text Placeholder 2" presentation:style-name="Mpr79" draw:text-style-name="MP4" draw:layer="backgroundobjects" svg:width="17.764cm" svg:height="13.349cm" svg:x="1.925cm" svg:y="0.828cm" presentation:class="outline">
        <draw:text-box>
          <text:list text:style-name="ML2">
            <text:list-item>
              <text:p text:style-name="MP5"><text:span text:style-name="MT3">마스터 텍스트 스타일을 편집하려면 클릭</text:span></text:p>
              <text:list>
                <text:list-item>
                  <text:p text:style-name="MP6"><text:span text:style-name="MT4">두 번째 수준</text:span></text:p>
                  <text:list>
                    <text:list-item>
                      <text:p text:style-name="MP7"><text:span text:style-name="MT5">세 번째 수준</text:span></text:p>
                      <text:list>
                        <text:list-item>
                          <text:p text:style-name="MP8"><text:span text:style-name="MT6">네 번째 수준</text:span></text:p>
                          <text:list>
                            <text:list-item>
                              <text:p text:style-name="MP9"><text:span text:style-name="MT6">다섯 번째 수준</text:span></text:p>
                            </text:list-item>
                          </text:list>
                        </text:list-item>
                      </text:list>
                    </text:list-item>
                  </text:list>
                </text:list-item>
              </text:list>
            </text:list-item>
          </text:list>
        </draw:text-box>
      </draw:frame>
      <draw:frame draw:name="Date Placeholder 3" presentation:style-name="Mpr80" draw:text-style-name="MP4" draw:layer="backgroundobjects" svg:width="6.3cm" svg:height="0.839cm" svg:x="1.925cm" svg:y="14.599cm" presentation:class="date-time">
        <draw:text-box>
          <text:p/>
        </draw:text-box>
      </draw:frame>
      <draw:frame draw:name="Footer Placeholder 4" presentation:style-name="Mpr81" draw:text-style-name="MP4" draw:layer="backgroundobjects" svg:width="9.451cm" svg:height="0.839cm" svg:x="9.276cm" svg:y="14.599cm" presentation:class="footer">
        <draw:text-box>
          <text:p/>
        </draw:text-box>
      </draw:frame>
      <draw:frame draw:name="Slide Number Placeholder 5" presentation:style-name="Mpr80" draw:text-style-name="MP4" draw:layer="backgroundobjects" svg:width="6.3cm" svg:height="0.839cm" svg:x="19.792cm" svg:y="14.599cm" presentation:class="page-number">
        <draw:text-box>
          <text:p text:style-name="MP10"><text:span text:style-name="MT7"><text:page-number>&lt;숫자&gt;</text:page-number></text:span></text:p>
        </draw:text-box>
      </draw:frame>
      <presentation:notes style:page-layout-name="PM0">
        <draw:page-thumbnail draw:name="슬라이드 이미지 개체 틀 1" presentation:style-name="Master1-Layout11-vertTitleAndTx-세로-제목-및-텍스트-title" draw:layer="backgroundobjects" svg:width="14.848cm" svg:height="11.136cm" svg:x="3.075cm" svg:y="2.257cm" presentation:class="page"/>
        <draw:frame draw:name="슬라이드 노트 개체 틀 2" presentation:style-name="Mpr82" draw:text-style-name="MP4" draw:layer="backgroundobjects" svg:width="16.799cm" svg:height="13.364cm" svg:x="2.1cm" svg:y="14.107cm" presentation:class="notes">
          <draw:text-box>
            <text:p/>
          </draw:text-box>
        </draw:frame>
        <draw:frame draw:name="머리글 개체 틀 3" presentation:style-name="Mpr83" draw:text-style-name="MP4" draw:layer="backgroundobjects" svg:width="9.113cm" svg:height="1.484cm" svg:x="0cm" svg:y="0cm" presentation:class="header">
          <draw:text-box>
            <text:p/>
          </draw:text-box>
        </draw:frame>
        <draw:frame draw:name="날짜 개체 틀 4" presentation:style-name="Mpr83" draw:text-style-name="MP4" draw:layer="backgroundobjects" svg:width="9.113cm" svg:height="1.484cm" svg:x="11.886cm" svg:y="0cm" presentation:class="date-time">
          <draw:text-box>
            <text:p/>
          </draw:text-box>
        </draw:frame>
        <draw:frame draw:name="바닥글 개체 틀 5" presentation:style-name="Mpr84" draw:text-style-name="MP4" draw:layer="backgroundobjects" svg:width="9.113cm" svg:height="1.484cm" svg:x="0cm" svg:y="28.215cm" presentation:class="footer">
          <draw:text-box>
            <text:p/>
          </draw:text-box>
        </draw:frame>
        <draw:frame draw:name="슬라이드 번호 개체 틀 6" presentation:style-name="Mpr84"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2-제목을-입력하세요-_28_2_29_" style:display-name="Master2-제목을-입력하세요-(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presentation:notes style:page-layout-name="PM0">
        <draw:page-thumbnail draw:name="슬라이드 이미지 개체 틀 1" presentation:style-name="Master2-제목을-입력하세요-_28_2_29_-title" draw:layer="backgroundobjects" svg:width="14.848cm" svg:height="11.136cm" svg:x="3.075cm" svg:y="2.257cm" presentation:class="page"/>
        <draw:frame draw:name="슬라이드 노트 개체 틀 2" presentation:style-name="Mpr85" draw:text-style-name="MP4" draw:layer="backgroundobjects" svg:width="16.799cm" svg:height="13.364cm" svg:x="2.1cm" svg:y="14.107cm" presentation:class="notes">
          <draw:text-box>
            <text:p/>
          </draw:text-box>
        </draw:frame>
        <draw:frame draw:name="머리글 개체 틀 3" presentation:style-name="Mpr86" draw:text-style-name="MP4" draw:layer="backgroundobjects" svg:width="9.113cm" svg:height="1.484cm" svg:x="0cm" svg:y="0cm" presentation:class="header">
          <draw:text-box>
            <text:p/>
          </draw:text-box>
        </draw:frame>
        <draw:frame draw:name="날짜 개체 틀 4" presentation:style-name="Mpr86" draw:text-style-name="MP4" draw:layer="backgroundobjects" svg:width="9.113cm" svg:height="1.484cm" svg:x="11.886cm" svg:y="0cm" presentation:class="date-time">
          <draw:text-box>
            <text:p/>
          </draw:text-box>
        </draw:frame>
        <draw:frame draw:name="바닥글 개체 틀 5" presentation:style-name="Mpr87" draw:text-style-name="MP4" draw:layer="backgroundobjects" svg:width="9.113cm" svg:height="1.484cm" svg:x="0cm" svg:y="28.215cm" presentation:class="footer">
          <draw:text-box>
            <text:p/>
          </draw:text-box>
        </draw:frame>
        <draw:frame draw:name="슬라이드 번호 개체 틀 6" presentation:style-name="Mpr87"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2-Layout1-cust-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presentation:notes style:page-layout-name="PM0">
        <draw:page-thumbnail draw:name="슬라이드 이미지 개체 틀 1" presentation:style-name="Master2-Layout1-cust-DEFAULT-title" draw:layer="backgroundobjects" svg:width="14.848cm" svg:height="11.136cm" svg:x="3.075cm" svg:y="2.257cm" presentation:class="page"/>
        <draw:frame draw:name="슬라이드 노트 개체 틀 2" presentation:style-name="Mpr88" draw:text-style-name="MP4" draw:layer="backgroundobjects" svg:width="16.799cm" svg:height="13.364cm" svg:x="2.1cm" svg:y="14.107cm" presentation:class="notes">
          <draw:text-box>
            <text:p/>
          </draw:text-box>
        </draw:frame>
        <draw:frame draw:name="머리글 개체 틀 3" presentation:style-name="Mpr89" draw:text-style-name="MP4" draw:layer="backgroundobjects" svg:width="9.113cm" svg:height="1.484cm" svg:x="0cm" svg:y="0cm" presentation:class="header">
          <draw:text-box>
            <text:p/>
          </draw:text-box>
        </draw:frame>
        <draw:frame draw:name="날짜 개체 틀 4" presentation:style-name="Mpr89" draw:text-style-name="MP4" draw:layer="backgroundobjects" svg:width="9.113cm" svg:height="1.484cm" svg:x="11.886cm" svg:y="0cm" presentation:class="date-time">
          <draw:text-box>
            <text:p/>
          </draw:text-box>
        </draw:frame>
        <draw:frame draw:name="바닥글 개체 틀 5" presentation:style-name="Mpr90" draw:text-style-name="MP4" draw:layer="backgroundobjects" svg:width="9.113cm" svg:height="1.484cm" svg:x="0cm" svg:y="28.215cm" presentation:class="footer">
          <draw:text-box>
            <text:p/>
          </draw:text-box>
        </draw:frame>
        <draw:frame draw:name="슬라이드 번호 개체 틀 6" presentation:style-name="Mpr90"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style:master-page style:name="Master2-Layout2-blank-빈-화면"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날짜 개체 틀 1" presentation:style-name="Mpr91" draw:text-style-name="MP4" draw:layer="backgroundobjects" svg:width="0.001cm" svg:height="0.001cm" svg:x="0cm" svg:y="0cm" presentation:class="date-time">
        <draw:text-box>
          <text:p/>
        </draw:text-box>
      </draw:frame>
      <draw:frame draw:name="바닥글 개체 틀 2" presentation:style-name="Mpr91" draw:text-style-name="MP4" draw:layer="backgroundobjects" svg:width="0.001cm" svg:height="0.001cm" svg:x="0cm" svg:y="0cm" presentation:class="footer">
        <draw:text-box>
          <text:p/>
        </draw:text-box>
      </draw:frame>
      <draw:frame draw:name="슬라이드 번호 개체 틀 3" presentation:style-name="Mpr91" draw:text-style-name="MP4" draw:layer="backgroundobjects" svg:width="0.001cm" svg:height="0.001cm" svg:x="0cm" svg:y="0cm" presentation:class="page-number">
        <draw:text-box>
          <text:p text:style-name="MP14"><text:span text:style-name="MT15"><text:page-number>&lt;숫자&gt;</text:page-number></text:span></text:p>
        </draw:text-box>
      </draw:frame>
      <draw:frame presentation:style-name="Master2-Layout2-blank-빈-화면-title" draw:layer="backgroundobjects" svg:width="25.2cm" svg:height="2.629cm" svg:x="1.4cm" svg:y="0.628cm" presentation:class="title" presentation:placeholder="true">
        <draw:text-box/>
      </draw:frame>
      <draw:frame presentation:style-name="Master2-Layout2-blank-빈-화면-outline1" draw:layer="backgroundobjects" svg:width="25.2cm" svg:height="9.135cm" svg:x="5cm" svg:y="5cm" presentation:class="outline" presentation:placeholder="true">
        <draw:text-box/>
      </draw:frame>
      <presentation:notes style:page-layout-name="PM0">
        <draw:page-thumbnail draw:name="슬라이드 이미지 개체 틀 1" presentation:style-name="Master2-Layout2-blank-빈-화면-title" draw:layer="backgroundobjects" svg:width="14.848cm" svg:height="11.136cm" svg:x="3.075cm" svg:y="2.257cm" presentation:class="page"/>
        <draw:frame draw:name="슬라이드 노트 개체 틀 2" presentation:style-name="Mpr92" draw:text-style-name="MP4" draw:layer="backgroundobjects" svg:width="16.799cm" svg:height="13.364cm" svg:x="2.1cm" svg:y="14.107cm" presentation:class="notes">
          <draw:text-box>
            <text:p/>
          </draw:text-box>
        </draw:frame>
        <draw:frame draw:name="머리글 개체 틀 3" presentation:style-name="Mpr93" draw:text-style-name="MP4" draw:layer="backgroundobjects" svg:width="9.113cm" svg:height="1.484cm" svg:x="0cm" svg:y="0cm" presentation:class="header">
          <draw:text-box>
            <text:p/>
          </draw:text-box>
        </draw:frame>
        <draw:frame draw:name="날짜 개체 틀 4" presentation:style-name="Mpr93" draw:text-style-name="MP4" draw:layer="backgroundobjects" svg:width="9.113cm" svg:height="1.484cm" svg:x="11.886cm" svg:y="0cm" presentation:class="date-time">
          <draw:text-box>
            <text:p/>
          </draw:text-box>
        </draw:frame>
        <draw:frame draw:name="바닥글 개체 틀 5" presentation:style-name="Mpr94" draw:text-style-name="MP4" draw:layer="backgroundobjects" svg:width="9.113cm" svg:height="1.484cm" svg:x="0cm" svg:y="28.215cm" presentation:class="footer">
          <draw:text-box>
            <text:p/>
          </draw:text-box>
        </draw:frame>
        <draw:frame draw:name="슬라이드 번호 개체 틀 6" presentation:style-name="Mpr94" draw:text-style-name="MP4" draw:layer="backgroundobjects" svg:width="9.113cm" svg:height="1.484cm" svg:x="11.886cm" svg:y="28.215cm" presentation:class="page-number">
          <draw:text-box>
            <text:p text:style-name="MP2"><text:span text:style-name="MT8"><text:page-number>&lt;숫자&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PPT_Plus/1.0.0.0$Windows_X86_64 LibreOffice_project/</meta:generator>
    <dc:title>Blue Curve</dc:title>
    <meta:initial-creator>한소희</meta:initial-creator>
    <meta:creation-date>2026-01-10T12:02:53Z</meta:creation-date>
    <dc:date>2026-01-15T17:56:33.553000000</dc:date>
    <meta:editing-cycles>41</meta:editing-cycles>
    <meta:editing-duration>P1DT9H49M3S</meta:editing-duration>
    <meta:document-statistic meta:object-count="848"/>
  </office:meta>
</office:document-meta>
</file>