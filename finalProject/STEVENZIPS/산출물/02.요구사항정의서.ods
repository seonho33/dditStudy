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'Malgun Gothic'" svg:font-family="''Malgun Gothic'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0.162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5.008cm"/>
    </style:style>
    <style:style style:name="co9" style:family="table-column">
      <style:table-column-properties fo:break-before="auto" style:column-width="8.259cm"/>
    </style:style>
    <style:style style:name="co10" style:family="table-column">
      <style:table-column-properties fo:break-before="auto" style:column-width="22.842cm"/>
    </style:style>
    <style:style style:name="co11" style:family="table-column">
      <style:table-column-properties fo:break-before="auto" style:column-width="2.812cm"/>
    </style:style>
    <style:style style:name="co12" style:family="table-column">
      <style:table-column-properties fo:break-before="auto" style:column-width="4.51cm"/>
    </style:style>
    <style:style style:name="co13" style:family="table-column">
      <style:table-column-properties fo:break-before="auto" style:column-width="4.306cm"/>
    </style:style>
    <style:style style:name="co14" style:family="table-column">
      <style:table-column-properties fo:break-before="auto" style:column-width="23.342cm"/>
    </style:style>
    <style:style style:name="co15" style:family="table-column">
      <style:table-column-properties fo:break-before="auto" style:column-width="5.066cm"/>
    </style:style>
    <style:style style:name="co16" style:family="table-column">
      <style:table-column-properties fo:break-before="auto" style:column-width="11.451cm"/>
    </style:style>
    <style:style style:name="co17" style:family="table-column">
      <style:table-column-properties fo:break-before="auto" style:column-width="25.889cm"/>
    </style:style>
    <style:style style:name="co18" style:family="table-column">
      <style:table-column-properties fo:break-before="auto" style:column-width="24.425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0.665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289cm" fo:break-before="auto" style:use-optimal-row-height="true"/>
    </style:style>
    <style:style style:name="ta1" style:family="table" style:master-page-name="PageStyle_5f_개정이력">
      <style:table-properties table:display="true" style:writing-mode="lr-tb"/>
    </style:style>
    <style:style style:name="ta2" style:family="table" style:master-page-name="PageStyle_5f_표지">
      <style:table-properties table:display="true" style:writing-mode="lr-tb"/>
    </style:style>
    <style:style style:name="ta3" style:family="table" style:master-page-name="PageStyle_5f_우리집맵핑_5f_공통">
      <style:table-properties table:display="true" style:writing-mode="lr-tb"/>
    </style:style>
    <style:style style:name="ta4" style:family="table" style:master-page-name="PageStyle_5f_우리집맵핑_5f_중앙관리자">
      <style:table-properties table:display="true" style:writing-mode="lr-tb"/>
    </style:style>
    <style:style style:name="ta5" style:family="table" style:master-page-name="PageStyle_5f_우리집맵핑_5f_관리사무소">
      <style:table-properties table:display="true" style:writing-mode="lr-tb"/>
    </style:style>
    <style:style style:name="ta6" style:family="table" style:master-page-name="PageStyle_5f_우리집맵핑_5f_입주민">
      <style:table-properties table:display="true" style:writing-mode="lr-tb"/>
    </style:style>
    <style:style style:name="ta7" style:family="table" style:master-page-name="PageStyle_5f_우리집맵핑_5f_사용자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14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9" style:family="table-cell" style:parent-style-name="Excel_20_Built-in_20_Normal" style:data-style-name="N14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0" style:family="table-cell" style:parent-style-name="Excel_20_Built-in_20_Normal" style:data-style-name="N14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'Malgun Gothic'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dce6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1" style:family="table-cell" style:parent-style-name="Excel_20_Built-in_20_Normal">
      <style:table-cell-properties fo:background-color="#dce6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a6099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0pt" fo:font-style="normal" fo:text-shadow="none" style:text-underline-style="none" fo:font-weight="normal" style:font-name-asian="Dotum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 style:data-style-name="N149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otum" fo:font-size="10pt" fo:font-style="normal" fo:text-shadow="none" style:text-underline-style="none" fo:font-weight="normal" style:font-name-asian="Dotum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0pt" fo:font-style="normal" fo:text-shadow="none" style:text-underline-style="none" fo:font-weight="normal" style:font-name-asian="Dotum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a6099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4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Dotum" fo:font-size="15pt" fo:font-style="normal" fo:text-shadow="none" style:text-underline-style="none" fo:font-weight="normal" style:font-name-asian="Dotum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Excel_20_Built-in_20_Normal" style:data-style-name="N149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6" style:family="table-cell" style:parent-style-name="Excel_20_Built-in_20_Normal"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59" style:family="table-cell" style:parent-style-name="Excel_20_Built-in_20_Normal">
      <style:text-properties fo:color="#000000" style:text-outline="false" style:text-line-through-style="none" style:font-name="Dotum" fo:font-size="11pt" fo:font-style="normal" fo:text-shadow="none" style:text-underline-style="none" fo:font-weight="bold" style:font-name-asian="Dotum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'Malgun Gothic'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'Malgun Gothic'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개정이력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9" table:default-cell-style-name="Excel_20_Built-in_20_Normal"/>
        <table:table-column table:style-name="co5" table:number-columns-repeated="999" table:default-cell-style-name="Excel_20_Built-in_20_Normal"/>
        <table:table-row table:style-name="ro1">
          <table:table-cell table:style-name="ce1" office:value-type="string" table:number-columns-spanned="5" table:number-rows-spanned="1">
            <text:p>문서개정이력표</text:p>
          </table:table-cell>
          <table:covered-table-cell table:number-columns-repeated="3" table:style-name="ce6"/>
          <table:covered-table-cell table:style-name="ce7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2" office:value-type="string" table:number-columns-spanned="2" table:number-rows-spanned="1">
            <text:p>문서명</text:p>
          </table:table-cell>
          <table:covered-table-cell table:style-name="ce7"/>
          <table:table-cell table:style-name="ce13" office:value-type="string" table:number-columns-spanned="3" table:number-rows-spanned="1">
            <text:p>요구사항정의서</text:p>
          </table:table-cell>
          <table:covered-table-cell table:style-name="ce6"/>
          <table:covered-table-cell table:style-name="ce7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3" office:value-type="string">
            <text:p>버전</text:p>
          </table:table-cell>
          <table:table-cell table:style-name="ce3" office:value-type="string">
            <text:p>날짜</text:p>
          </table:table-cell>
          <table:table-cell table:style-name="ce14" office:value-type="string">
            <text:p>내 용</text:p>
          </table:table-cell>
          <table:table-cell table:style-name="ce3" office:value-type="string">
            <text:p>작성자</text:p>
          </table:table-cell>
          <table:table-cell table:style-name="ce3" office:value-type="string">
            <text:p>승인자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4" office:value-type="string">
            <text:p>V1.0</text:p>
          </table:table-cell>
          <table:table-cell table:style-name="ce8" office:value-type="date" office:date-value="2026-04-10">
            <text:p>2026년 4월 10일</text:p>
          </table:table-cell>
          <table:table-cell table:style-name="ce11" office:value-type="string">
            <text:p>최초작성</text:p>
          </table:table-cell>
          <table:table-cell table:style-name="ce4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1" office:value-type="string">
            <text:p>V1.1</text:p>
          </table:table-cell>
          <table:table-cell table:style-name="ce9" office:value-type="date" office:date-value="2026-04-11">
            <text:p>2026년 4월 11일</text:p>
          </table:table-cell>
          <table:table-cell table:style-name="ce15" office:value-type="string">
            <text:p>정의서 수정</text:p>
          </table:table-cell>
          <table:table-cell table:style-name="ce1"/>
          <table:table-cell table:style-name="ce20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1" office:value-type="string">
            <text:p>V1.2</text:p>
          </table:table-cell>
          <table:table-cell table:style-name="ce10" office:value-type="date" office:date-value="2026-04-13">
            <text:p>2026년 4월 13일</text:p>
          </table:table-cell>
          <table:table-cell table:style-name="ce16" office:value-type="string">
            <text:p>정의서 권한에 따라 분류 및 통합</text:p>
          </table:table-cell>
          <table:table-cell table:style-name="ce19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1" office:value-type="string">
            <text:p>V1.3</text:p>
          </table:table-cell>
          <table:table-cell table:style-name="ce10" office:value-type="date" office:date-value="2026-04-14">
            <text:p>2026년 4월 14일</text:p>
          </table:table-cell>
          <table:table-cell table:style-name="ce11" office:value-type="string">
            <text:p>불분명한 요구사항 상세 표기</text:p>
          </table:table-cell>
          <table:table-cell table:style-name="ce19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1"/>
          <table:table-cell table:style-name="ce19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17"/>
          <table:table-cell table:style-name="ce11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3" table:number-rows-repeated="20">
          <table:table-cell table:style-name="ce1"/>
          <table:table-cell table:style-name="ce12"/>
          <table:table-cell table:style-name="ce18"/>
          <table:table-cell table:style-name="ce12"/>
          <table:table-cell table:style-name="ce1"/>
          <table:table-cell table:style-name="ce5" table:number-columns-repeated="21"/>
          <table:table-cell table:number-columns-repeated="998"/>
        </table:table-row>
        <table:table-row table:style-name="ro4" table:number-rows-repeated="191">
          <table:table-cell table:style-name="ce5" table:number-columns-repeated="26"/>
          <table:table-cell table:number-columns-repeated="998"/>
        </table:table-row>
        <table:table-row table:style-name="ro5" table:number-rows-repeated="780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표지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8" table:default-cell-style-name="Excel_20_Built-in_20_Normal"/>
        <table:table-column table:style-name="co5" table:number-columns-repeated="1014" table:default-cell-style-name="Excel_20_Built-in_20_Normal"/>
        <table:table-row table:style-name="ro7">
          <table:table-cell table:style-name="ce21" table:number-columns-spanned="5" table:number-rows-spanned="1"/>
          <table:covered-table-cell table:number-columns-repeated="4"/>
          <table:table-cell table:style-name="ce5" table:number-columns-repeated="5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2" office:value-type="string" table:number-columns-spanned="3" table:number-rows-spanned="3">
            <text:p><text:span text:style-name="T1">요구사항정의서</text:span></text:p>
            <text:p><text:span text:style-name="T1">- </text:span><text:span text:style-name="T2">우리집맵핑 </text:span><text:span text:style-name="T1">-</text:span></text:p>
          </table:table-cell>
          <table:covered-table-cell table:style-name="ce25"/>
          <table:covered-table-cell table:style-name="ce27"/>
          <table:table-cell table:number-columns-repeated="1020"/>
        </table:table-row>
        <table:table-row table:style-name="ro7">
          <table:table-cell/>
          <table:covered-table-cell table:style-name="ce23"/>
          <table:covered-table-cell/>
          <table:covered-table-cell table:style-name="ce28"/>
          <table:table-cell table:number-columns-repeated="1020"/>
        </table:table-row>
        <table:table-row table:style-name="ro9">
          <table:table-cell/>
          <table:covered-table-cell table:style-name="ce24"/>
          <table:covered-table-cell table:style-name="ce26"/>
          <table:covered-table-cell table:style-name="ce29"/>
          <table:table-cell table:number-columns-repeated="1020"/>
        </table:table-row>
        <table:table-row table:style-name="ro7" table:number-rows-repeated="213">
          <table:table-cell table:number-columns-repeated="1024"/>
        </table:table-row>
        <table:table-row table:style-name="ro5" table:number-rows-repeated="780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우리집맵핑_공통" table:style-name="ta3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number-columns-repeated="1018" table:default-cell-style-name="Excel_20_Built-in_20_Normal"/>
        <table:table-row table:style-name="ro6">
          <table:table-cell table:style-name="ce30" office:value-type="string" table:number-columns-spanned="5" table:number-rows-spanned="1">
            <text:p>요구사항 정의서</text:p>
          </table:table-cell>
          <table:covered-table-cell table:number-columns-repeated="3" table:style-name="ce6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table-cell table:style-name="ce31" office:value-type="string">
            <text:p>시스템 명</text:p>
          </table:table-cell>
          <table:table-cell table:style-name="ce35" office:value-type="string" table:number-columns-spanned="2" table:number-rows-spanned="1">
            <text:p>공공주택 관리 시스템</text:p>
          </table:table-cell>
          <table:covered-table-cell table:style-name="ce7"/>
          <table:table-cell table:style-name="ce31" office:value-type="string">
            <text:p>작성일</text:p>
          </table:table-cell>
          <table:table-cell table:style-name="ce41" office:value-type="date" office:date-value="2026-04-11">
            <text:p>2026-04-11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요구사항 ID</text:p>
          </table:table-cell>
          <table:table-cell table:style-name="ce30" office:value-type="string">
            <text:p>요구사항 명</text:p>
          </table:table-cell>
          <table:table-cell table:style-name="ce30" office:value-type="string">
            <text:p>요구사항 상세내역 </text:p>
          </table:table-cell>
          <table:table-cell table:style-name="ce30" office:value-type="string" table:number-columns-spanned="2" table:number-rows-spanned="1">
            <text:p>비고</text:p>
          </table:table-cell>
          <table:covered-table-cell table:style-name="ce7"/>
          <table:table-cell table:number-columns-repeated="1019"/>
        </table:table-row>
        <table:table-row table:style-name="ro10">
          <table:table-cell table:style-name="ce32" office:value-type="string" table:number-columns-spanned="1" table:number-rows-spanned="6">
            <text:p>WM-001</text:p>
          </table:table-cell>
          <table:table-cell table:style-name="ce36" office:value-type="string" table:number-columns-spanned="1" table:number-rows-spanned="6">
            <text:p>로그인 및 회원가입</text:p>
          </table:table-cell>
          <table:table-cell table:style-name="ce37" office:value-type="string">
            <text:p>아이디 및 비밀번호 입력 후 로그인 처리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8" office:value-type="string">
            <text:p>사용자 권한에 따라 해당 페이지로 이동(중앙 관리자/단지 관리자/입주민/일반 사용자)</text:p>
          </table:table-cell>
          <table:table-cell table:style-name="ce40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회원가입 후 기본 등급(사용자) 자동 부여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8" office:value-type="string">
            <text:p>관리자 승인 후 입주민 등급으로 권한 수정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회원가입 시 입력 정보(이름, 이메일, 전화번호) 기반 아이디 중복 확인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아이디 또는 비밀번호 분실 시, SMS 본인 인증을 통해 아이디 조회나 비밀번호 재설정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4">
            <text:p>WM-002</text:p>
          </table:table-cell>
          <table:table-cell table:style-name="ce36" office:value-type="string" table:number-columns-spanned="1" table:number-rows-spanned="4">
            <text:p>단지 정보 조회</text:p>
          </table:table-cell>
          <table:table-cell table:style-name="ce37" office:value-type="string">
            <text:p>단지별 정보 조회 및 상세 조회(가격, 시설, 교통 접근성)</text:p>
          </table:table-cell>
          <table:table-cell table:style-name="ce36" table:number-columns-spanned="2" table:number-rows-spanned="1"/>
          <table:covered-table-cell table:style-name="ce7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8" office:value-type="string">
            <text:p>시설 관리 이력 조회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여러 단지 간 정보 비교 조회 기능(가격, 시설, 교통 접근성)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카카오 지도 API를 이용한 시설 위치 조회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5">
            <text:p>WM-003</text:p>
          </table:table-cell>
          <table:table-cell table:style-name="ce36" office:value-type="string" table:number-columns-spanned="1" table:number-rows-spanned="5">
            <text:p>공고조회</text:p>
          </table:table-cell>
          <table:table-cell table:style-name="ce37" office:value-type="string">
            <text:p>공공주택 관련 공지사항 조회(관리비 관련, 단지 시설, 입주, 공사/작업, 규정 안내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단지별 공지사항 목록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공지사항 상세 내용 확인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8" office:value-type="string">
            <text:p>계약 관련 공고 및 입찰 공고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4"/>
          <table:table-cell table:style-name="ce38" office:value-type="string">
            <text:p>공고 진행 상태 및 결과 확인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2">
          <table:table-cell table:number-columns-repeated="2"/>
          <table:table-cell table:style-name="ce39"/>
          <table:table-cell table:number-columns-repeated="102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우리집맵핑_중앙관리자" table:style-name="ta4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5" table:number-columns-repeated="1018" table:default-cell-style-name="Excel_20_Built-in_20_Normal"/>
        <table:table-row table:style-name="ro6">
          <table:table-cell table:style-name="ce30" office:value-type="string" table:number-columns-spanned="5" table:number-rows-spanned="1">
            <text:p>요구사항 정의서</text:p>
          </table:table-cell>
          <table:covered-table-cell table:number-columns-repeated="3" table:style-name="ce6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table-cell table:style-name="ce31" office:value-type="string">
            <text:p>시스템 명</text:p>
          </table:table-cell>
          <table:table-cell table:style-name="ce46" office:value-type="string" table:number-columns-spanned="2" table:number-rows-spanned="1">
            <text:p>주택관리시스템_중앙관리자</text:p>
          </table:table-cell>
          <table:covered-table-cell table:style-name="ce7"/>
          <table:table-cell table:style-name="ce31" office:value-type="string">
            <text:p>작성일</text:p>
          </table:table-cell>
          <table:table-cell table:style-name="ce51" office:value-type="date" office:date-value="2026-04-13">
            <text:p>2026-04-13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요구사항 ID</text:p>
          </table:table-cell>
          <table:table-cell table:style-name="ce30" office:value-type="string">
            <text:p>요구사항 명</text:p>
          </table:table-cell>
          <table:table-cell table:style-name="ce30" office:value-type="string">
            <text:p>요구사항 상세내역 </text:p>
          </table:table-cell>
          <table:table-cell table:style-name="ce30" office:value-type="string" table:number-columns-spanned="2" table:number-rows-spanned="1">
            <text:p>비고</text:p>
          </table:table-cell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5">
            <text:p>WM-101</text:p>
          </table:table-cell>
          <table:table-cell table:style-name="ce47" office:value-type="string" table:number-columns-spanned="1" table:number-rows-spanned="5">
            <text:p>계약 관리</text:p>
          </table:table-cell>
          <table:table-cell table:style-name="ce48" office:value-type="string">
            <text:p>전체 계약 정보를 조회(분류 선택 : 전세계약서, 월세계약서, 회원명(ID)별 계약서 검색)</text:p>
          </table:table-cell>
          <table:table-cell table:style-name="ce47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48" office:value-type="string">
            <text:p>전체 계약 정보를 관리(승인,반려)</text:p>
          </table:table-cell>
          <table:table-cell table:style-name="ce47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48" office:value-type="string">
            <text:p>오프라인에서 계약 데이터를 입력할 페이지 제공 및 전산처리</text:p>
          </table:table-cell>
          <table:table-cell table:style-name="ce47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48" office:value-type="string">
            <text:p>계약 페이지에서 사용할 아파트 별 온라인 계약 서식 관리(서식 등록)</text:p>
          </table:table-cell>
          <table:table-cell table:style-name="ce47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48" office:value-type="string">
            <text:p>관련 서류 조회, 관리</text:p>
          </table:table-cell>
          <table:table-cell table:style-name="ce47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table-cell table:style-name="ce45" office:value-type="string" table:number-columns-spanned="1" table:number-rows-spanned="5">
            <text:p>WM-102</text:p>
          </table:table-cell>
          <table:table-cell table:style-name="ce47" office:value-type="string" table:number-columns-spanned="1" table:number-rows-spanned="5">
            <text:p>민원 관리 및 문의</text:p>
          </table:table-cell>
          <table:table-cell table:style-name="ce48" office:value-type="string">
            <text:p>관리 주거지 전체의 민원 현황 조회</text:p>
          </table:table-cell>
          <table:table-cell table:style-name="ce47" table:number-columns-spanned="2" table:number-rows-spanned="1"/>
          <table:covered-table-cell table:style-name="ce7"/>
          <table:table-cell table:style-name="ce44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48" office:value-type="string">
            <text:p>유형별 민원 발생 현황 조회 (시설, 관리비, 생활민원, 계약민원, 기타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48" office:value-type="string">
            <text:p>민원 발생에서 처리까지의 상태 조회</text:p>
          </table:table-cell>
          <table:table-cell table:style-name="ce50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48" office:value-type="string">
            <text:p>처리 지연 민원 파악 및 관리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AI챗봇과 실시간 채팅을 통한 문의기능 제공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3">
          <table:table-cell table:style-name="ce45" office:value-type="string">
            <text:p>WM-103</text:p>
          </table:table-cell>
          <table:table-cell table:style-name="ce47" office:value-type="string">
            <text:p>통계</text:p>
          </table:table-cell>
          <table:table-cell table:style-name="ce48" office:value-type="string">
            <text:p>카테고리 별 통계 확인 페이지 제공</text:p>
            <text:p>(기간별 계약추이, 지역별 계약 추이, 지역별 관리비 미납률, 지역별 공실률, 지역별 민원 발생률,</text:p>
            <text:p>지역별 유지보수 비용, 지역별 입주민 수 통계, 지역별 입주 비용통계, 관리비 통계,</text:p>
            <text:p>단지별 연령별 통계, 단지별 세대 구성원 수 통계)</text:p>
          </table:table-cell>
          <table:table-cell table:style-name="ce48" table:number-columns-spanned="2" table:number-rows-spanned="1"/>
          <table:covered-table-cell table:style-name="ce7"/>
          <table:table-cell table:number-columns-repeated="1019"/>
        </table:table-row>
        <table:table-row table:style-name="ro14">
          <table:table-cell table:style-name="ce45" office:value-type="string" table:number-columns-spanned="1" table:number-rows-spanned="6">
            <text:p>WM-104</text:p>
          </table:table-cell>
          <table:table-cell table:style-name="ce47" office:value-type="string" table:number-columns-spanned="1" table:number-rows-spanned="6">
            <text:p>시설 관리 조회</text:p>
          </table:table-cell>
          <table:table-cell table:style-name="ce48" office:value-type="string">
            <text:p>시설 점검 이력을 조회. </text:p>
            <text:p>(시설목록,점검일자,점검결과,미이행여부,고장횟수,고장상태,업무상태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시설명과 조회기간을 조건으로 시설 점검 이력을 조회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점검상태는 정상,점검중,미이행 필터기능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동일 시설의 고장 횟수 집계. (횟수 카운트-통계조회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일정 횟수 이상 고장 시, "반복 고장"으로 표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업무확인 및 미확인 표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4">
          <table:table-cell table:style-name="ce45" office:value-type="string" table:number-columns-spanned="1" table:number-rows-spanned="5">
            <text:p>WM-105</text:p>
          </table:table-cell>
          <table:table-cell table:style-name="ce47" office:value-type="string" table:number-columns-spanned="1" table:number-rows-spanned="5">
            <text:p>공고 (계약 관련)</text:p>
          </table:table-cell>
          <table:table-cell table:style-name="ce48" office:value-type="string">
            <text:p>단지별 매물 정보 등록,수정,조회,삭제. </text:p>
            <text:p>(공고제목,단지,모집시작/종료일,공급세대수,제출서류목록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아파트 입주자 모집 공고 등록,수정,조회,삭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현재 진행 중인 공고를 진행기간과 단지를 조건으로 필터기능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공고 진행기간에 따라 현재 상태 표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절차 및 제출 서류 안내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3">
            <text:p>WM-106</text:p>
          </table:table-cell>
          <table:table-cell table:style-name="ce47" office:value-type="string" table:number-columns-spanned="1" table:number-rows-spanned="3">
            <text:p>게시판 관리</text:p>
          </table:table-cell>
          <table:table-cell table:style-name="ce48" office:value-type="string">
            <text:p>공지사항 게시판 등록, 조회, 수정, 삭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공고/모집 게시판 등록, 조회, 수정, 삭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문의 게시판 등록, 조회, 수정, 삭제.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table-cell table:style-name="ce45" office:value-type="string" table:number-columns-spanned="1" table:number-rows-spanned="3">
            <text:p>WM-107</text:p>
          </table:table-cell>
          <table:table-cell table:style-name="ce47" office:value-type="string" table:number-columns-spanned="1" table:number-rows-spanned="3">
            <text:p>하위(단지) 관리자 계정 관리</text:p>
          </table:table-cell>
          <table:table-cell table:style-name="ce49" office:value-type="string">
            <text:p>단지 별 관리자 계정 생성 및 매핑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9" office:value-type="string">
            <text:p>관리자 계정 권한 레벨 설정(회계, 행정, 시설, 관리소장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9" office:value-type="string">
            <text:p>관리자 계정 활성화 / 비활성화 처리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8">
            <text:p>WM-108</text:p>
          </table:table-cell>
          <table:table-cell table:style-name="ce47" office:value-type="string" table:number-columns-spanned="1" table:number-rows-spanned="8">
            <text:p>건물 등록 및 관리 및 열람</text:p>
          </table:table-cell>
          <table:table-cell table:style-name="ce49" office:value-type="string">
            <text:p>단지 전체 배치도 등록(단지 코드와 매핑해서 파일 업로드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9" office:value-type="string">
            <text:p>단지 &gt; 동 &gt; 층 구조로 분류하여 도면 등록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9" office:value-type="string">
            <text:p>도면 정보 입력 및 저장, 수정, 삭제(도면 유형, 적용 범위, 등록일, 등록자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48" office:value-type="string">
            <text:p>단지 기반으로 도면 탐색 및 조회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단지명, 동, 호, 평형 타입, 관리비 조건 검색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세대별 내부 정보 표시(방, 욕실 개수, 현관구조, 관리비, 면적 정보, 월세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공공 시설 위치 정보 제공(도면 연계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비상구 및 피난 경로 표시(도면 연계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table-cell table:style-name="ce45" office:value-type="string" table:number-columns-spanned="1" table:number-rows-spanned="10">
            <text:p>WM-109</text:p>
          </table:table-cell>
          <table:table-cell table:style-name="ce47" office:value-type="string" table:number-columns-spanned="1" table:number-rows-spanned="10">
            <text:p>전체 입주민 관리</text:p>
          </table:table-cell>
          <table:table-cell table:style-name="ce48" office:value-type="string">
            <text:p>전체 입주민 목록 조회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5">
          <table:covered-table-cell table:number-columns-repeated="2" table:style-name="ce33"/>
          <table:table-cell table:style-name="ce48" office:value-type="string">
            <text:p>다중 조건 검색</text:p>
            <text:p>(세대주,세대원,이름,성별, 단지명, 동/호수, 입주일, 퇴거일, 계약 유형, 관리비 전월세 미납여부, 보유차량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5">
          <table:covered-table-cell table:number-columns-repeated="2" table:style-name="ce33"/>
          <table:table-cell table:style-name="ce48" office:value-type="string">
            <text:p>입주민 상세 정보 조회</text:p>
            <text:p>(세대주,세대원,이름,성별, 단지명, 동/호수, 입주일, 퇴거일, 계약 유형, 관리비 전월세 미납여부, 보유차량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단지 별 입주 현황 조회(전체 세대, 입주 세대, 공실 세대 수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동 별 입주 현황 조회(층, 호수 별 입주 현황 조회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호수 별 입주 현황 조회(입주민 정보 및 계약 현황 조회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공실 세대 식별(미등록, 퇴거 처리 된 세대를 공실로 분류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미등록 세대 식별(세대 정보는 존재하나 입주민 정보가 등록되지 않은 세대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48" office:value-type="string">
            <text:p>비정상 세대 식별(공실, 만료, 미등록 등 필터링하여 조회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48" office:value-type="string">
            <text:p>비정상 세대 처리 이력 관리(공실 전환, 계약 갱신, 입주민 등록 처리 내역)</text:p>
          </table:table-cell>
          <table:table-cell table:style-name="ce47" table:number-columns-spanned="2" table:number-rows-spanned="1"/>
          <table:covered-table-cell table:style-name="ce7"/>
          <table:table-cell table:number-columns-repeated="1019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우리집맵핑_관리사무소" table:style-name="ta5" table:print="false"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5" table:number-columns-repeated="1018" table:default-cell-style-name="Excel_20_Built-in_20_Normal"/>
        <table:table-row table:style-name="ro6">
          <table:table-cell table:style-name="ce30" office:value-type="string" table:number-columns-spanned="5" table:number-rows-spanned="1">
            <text:p>요구사항 정의서</text:p>
          </table:table-cell>
          <table:covered-table-cell table:number-columns-repeated="3" table:style-name="ce6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table-cell table:style-name="ce31" office:value-type="string">
            <text:p>시스템 명</text:p>
          </table:table-cell>
          <table:table-cell table:style-name="ce35" office:value-type="string" table:number-columns-spanned="2" table:number-rows-spanned="1">
            <text:p>주택관리시스템_주택관리업체</text:p>
          </table:table-cell>
          <table:covered-table-cell table:style-name="ce7"/>
          <table:table-cell table:style-name="ce31" office:value-type="string">
            <text:p>작성일</text:p>
          </table:table-cell>
          <table:table-cell table:style-name="ce41" office:value-type="date" office:date-value="2026-04-13">
            <text:p>2026-04-13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요구사항 ID</text:p>
          </table:table-cell>
          <table:table-cell table:style-name="ce30" office:value-type="string">
            <text:p>요구사항 명</text:p>
          </table:table-cell>
          <table:table-cell table:style-name="ce30" office:value-type="string">
            <text:p>요구사항 상세내역 </text:p>
          </table:table-cell>
          <table:table-cell table:style-name="ce30" office:value-type="string" table:number-columns-spanned="2" table:number-rows-spanned="1">
            <text:p>비고</text:p>
          </table:table-cell>
          <table:covered-table-cell table:style-name="ce7"/>
          <table:table-cell table:number-columns-repeated="1019"/>
        </table:table-row>
        <table:table-row table:style-name="ro11">
          <table:table-cell table:style-name="ce32" office:value-type="string" table:number-columns-spanned="1" table:number-rows-spanned="3">
            <text:p>WM-201</text:p>
          </table:table-cell>
          <table:table-cell table:style-name="ce36" office:value-type="string" table:number-columns-spanned="1" table:number-rows-spanned="3">
            <text:p>관리사무소 직원 관리 </text:p>
          </table:table-cell>
          <table:table-cell table:style-name="ce53" office:value-type="string">
            <text:p>직원 계정 생성 및 역할 할당(행정, 시설, 회계 관리)</text:p>
          </table:table-cell>
          <table:table-cell table:style-name="ce40" table:number-columns-repeated="2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53" office:value-type="string">
            <text:p>직원 휴가 일정 등록 및 수정 삭제</text:p>
          </table:table-cell>
          <table:table-cell table:style-name="ce40" table:number-columns-repeated="2"/>
          <table:table-cell table:style-name="ce42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3" office:value-type="string">
            <text:p>출퇴근 및 근무시간 기반 근태 관리</text:p>
          </table:table-cell>
          <table:table-cell table:style-name="ce40" table:number-columns-repeated="2"/>
          <table:table-cell table:style-name="ce42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6">
            <text:p>WM-202</text:p>
          </table:table-cell>
          <table:table-cell table:style-name="ce36" office:value-type="string" table:number-columns-spanned="1" table:number-rows-spanned="6">
            <text:p>시설 관리</text:p>
          </table:table-cell>
          <table:table-cell table:style-name="ce53" office:value-type="string">
            <text:p>시설 자산 등록(시설ID, 위치, 설치일, 상태)</text:p>
          </table:table-cell>
          <table:table-cell table:style-name="ce40" table:number-columns-repeated="2"/>
          <table:table-cell table:style-name="ce42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시설 별 점검 및 보수 이력 조회</text:p>
          </table:table-cell>
          <table:table-cell table:style-name="ce40" table:number-columns-repeated="2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공용 시설 관리 상태 등록, 수정 및 조회</text:p>
          </table:table-cell>
          <table:table-cell table:style-name="ce40" table:number-columns-repeated="2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공용 시설물 전기, 수도 사용량의 검침 기록 등록, 수정 및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주거지 및 공용 시설 정보 등록, 수정 및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37" office:value-type="string">
            <text:p>시설 유지보수 및 공사이력 조회 및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4">
            <text:p>WM-203</text:p>
          </table:table-cell>
          <table:table-cell table:style-name="ce36" office:value-type="string" table:number-columns-spanned="1" table:number-rows-spanned="4">
            <text:p>공사 및 점검 작업 관리</text:p>
          </table:table-cell>
          <table:table-cell table:style-name="ce54" office:value-type="string">
            <text:p>유지보수 공사 작업 등록,수정 및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4" office:value-type="string">
            <text:p>개선 공사 작업 등록,수정 및 조회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4" office:value-type="string">
            <text:p>점검 및 정기 작업 등록,수정 및 조회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54" office:value-type="string">
            <text:p>작업 공사 일정 등록 및 상태(예정/진행/완료) 변경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4">
            <text:p>WM-204</text:p>
          </table:table-cell>
          <table:table-cell table:style-name="ce36" office:value-type="string" table:number-columns-spanned="1" table:number-rows-spanned="4">
            <text:p>협력업체 관리 </text:p>
          </table:table-cell>
          <table:table-cell table:style-name="ce53" office:value-type="string">
            <text:p>협력업체 등록, 수정, 삭제 및 조회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업체와의 계약 정보 등록,수정,조회,삭제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시설 유지보수 참여 협력업체 이력 조회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3" office:value-type="string">
            <text:p>계약 만료 예정 협력업체 알림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table-cell table:style-name="ce32" office:value-type="string" table:number-columns-spanned="1" table:number-rows-spanned="5">
            <text:p>WM-205</text:p>
          </table:table-cell>
          <table:table-cell table:style-name="ce36" office:value-type="string" table:number-columns-spanned="1" table:number-rows-spanned="5">
            <text:p>관리비 관리</text:p>
          </table:table-cell>
          <table:table-cell table:style-name="ce53" office:value-type="string">
            <text:p>공용 관리비 항목 등록 및 관리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항목별 관리비 집계 조회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세대별 관리비 부과 내역 조회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관리비 연체 내역 관리,연체료 부과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3" office:value-type="string">
            <text:p>관리비 납부 고지서 등록</text:p>
          </table:table-cell>
          <table:table-cell table:style-name="ce40" table:number-columns-repeated="2"/>
          <table:table-cell table:style-name="ce44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3">
            <text:p>WM-206</text:p>
          </table:table-cell>
          <table:table-cell table:style-name="ce36" office:value-type="string" table:number-columns-spanned="1" table:number-rows-spanned="3">
            <text:p>지출 및 예산 관리</text:p>
          </table:table-cell>
          <table:table-cell table:style-name="ce53" office:value-type="string">
            <text:p>지출 내역 등록,수정,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예산등록 및 항목별 예산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3" office:value-type="string">
            <text:p>예산 대비 <text:s/>지출 통계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table-cell table:style-name="ce32" office:value-type="string" table:number-columns-spanned="1" table:number-rows-spanned="9">
            <text:p>WM-207</text:p>
          </table:table-cell>
          <table:table-cell table:style-name="ce36" office:value-type="string" table:number-columns-spanned="1" table:number-rows-spanned="9">
            <text:p>민원 관리</text:p>
          </table:table-cell>
          <table:table-cell table:style-name="ce53" office:value-type="string">
            <text:p>민원 접수 내역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민원 유형별 분류 및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담당자 또는 부서 배정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민원 처리 상태(접수 / 진행 / 완료) 변경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민원 처리 결과 등록 및 입주민에게 안내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민원 처리 이력 조회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5" office:value-type="string">
            <text:p>실시간 채팅을 통한 문의 처리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AI를 통한 민원 텍스트 분석, 일반민원 및 고위험군 민원 자동 분류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민원 내용 모니터링 및 빈도수 높은 고위험군 민원 사전에 감지, 알림</text:p>
          </table:table-cell>
          <table:table-cell table:style-name="ce36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9">
            <text:p>WM-208</text:p>
          </table:table-cell>
          <table:table-cell table:style-name="ce36" office:value-type="string" table:number-columns-spanned="1" table:number-rows-spanned="9">
            <text:p>게시판 관리</text:p>
          </table:table-cell>
          <table:table-cell table:style-name="ce37" office:value-type="string">
            <text:p>공지사항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생활안내 게시글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단지 운영 정보 게시 및 관리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게시글 댓글 작성, 수정, 조회, 삭제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의무공개 계약서 게시 및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4" office:value-type="string">
            <text:p>공지사항 게시판을 통해 입주민들에게 단지내 공지사항 전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4" office:value-type="string">
            <text:p>긴급 공지 SMS 알림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4" office:value-type="string">
            <text:p>민원게시판을 통해 접수된 민원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4" office:value-type="string">
            <text:p>자유게시판의 도배성 게시글 및 광고 글 삭제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7">
            <text:p>WM-209</text:p>
          </table:table-cell>
          <table:table-cell table:style-name="ce36" office:value-type="string" table:number-columns-spanned="1" table:number-rows-spanned="7">
            <text:p>단지 일정 관리</text:p>
          </table:table-cell>
          <table:table-cell table:style-name="ce53" office:value-type="string">
            <text:p>시설 공사 일정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점검 일정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행사 일정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투표 일정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설문조사 일정 등록, 수정, 조회, 삭제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캘린더 기반 일정 조회(월/주/일)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안내문 텍스트 작성시 TTS 기능을 통해 안내 방송 자동 송출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table-cell table:style-name="ce32" office:value-type="string" table:number-columns-spanned="1" table:number-rows-spanned="6">
            <text:p>WM-210</text:p>
          </table:table-cell>
          <table:table-cell table:style-name="ce36" office:value-type="string" table:number-columns-spanned="1" table:number-rows-spanned="6">
            <text:p>공용 시설 대여 관리</text:p>
          </table:table-cell>
          <table:table-cell table:style-name="ce37" office:value-type="string">
            <text:p>단지 내 공용시설 예약 신청 및 취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예약 신청에 대한 승인 및 반려 처리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5" office:value-type="string">
            <text:p>시설 이용 대상 제한 설정(입주민, 관리자)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예약 현황 및 이용 내역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37" office:value-type="string">
            <text:p>시설 이용 규칙 등록 및 공지 기능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대여 시설 목록 등록, 수정, 삭제 및 조회 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5">
            <text:p>WM-211</text:p>
          </table:table-cell>
          <table:table-cell table:style-name="ce36" office:value-type="string" table:number-columns-spanned="1" table:number-rows-spanned="5">
            <text:p>차량 관리</text:p>
          </table:table-cell>
          <table:table-cell table:style-name="ce37" office:value-type="string">
            <text:p>입주민 차량 등록 신청 승인(차량번호, 차종, 등록일, 등록상태)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단지 내 등록차량 조회(차량번호, 차종, 등록일, 등록상태)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세대 방문차량 임시등록 신청 승인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세대 방문차량 등록 기록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5" office:value-type="string">
            <text:p>단지 내 불법주차 차량번호 등록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table-cell table:style-name="ce32" office:value-type="string" table:number-columns-spanned="1" table:number-rows-spanned="5">
            <text:p>WM-212</text:p>
          </table:table-cell>
          <table:table-cell table:style-name="ce36" office:value-type="string" table:number-columns-spanned="1" table:number-rows-spanned="5">
            <text:p>입주민 관리</text:p>
          </table:table-cell>
          <table:table-cell table:style-name="ce53" office:value-type="string">
            <text:p>입주 신고 한 입주민의 회원권한을 사용자에서 입주민으로 변경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입주민 회원가입 승인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53" office:value-type="string">
            <text:p>입주민의 기본정보(이름, 연락처, 세대, 권한), 입주 상태, 계약 상태 관리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3"/>
          <table:table-cell table:style-name="ce53" office:value-type="string">
            <text:p>퇴거 신고 한 입주민의 회원권한을 전출자로 변경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53" office:value-type="string">
            <text:p>현재 입주하고 있는 입주민 정보 조회</text:p>
          </table:table-cell>
          <table:table-cell table:style-name="ce40" table:number-columns-repeated="2"/>
          <table:table-cell table:style-name="ce43"/>
          <table:table-cell table:number-columns-repeated="1018"/>
        </table:table-row>
        <table:table-row table:style-name="ro11">
          <table:table-cell table:style-name="ce32" office:value-type="string" table:number-columns-spanned="1" table:number-rows-spanned="2">
            <text:p>WM-213</text:p>
          </table:table-cell>
          <table:table-cell table:style-name="ce36" office:value-type="string" table:number-columns-spanned="1" table:number-rows-spanned="2">
            <text:p>투표 및 설문조사</text:p>
          </table:table-cell>
          <table:table-cell table:style-name="ce37" office:value-type="string">
            <text:p>의사 결정을 위한 온라인 투표 진행 및 결과 안내(survey.js api 를 사용)</text:p>
          </table:table-cell>
          <table:table-cell table:style-name="ce57" table:number-columns-repeated="2"/>
          <table:table-cell table:number-columns-repeated="1019"/>
        </table:table-row>
        <table:table-row table:style-name="ro10">
          <table:covered-table-cell table:number-columns-repeated="2" table:style-name="ce34"/>
          <table:table-cell table:style-name="ce38" office:value-type="string">
            <text:p>의견 수렴을 위한 온라인 설문조사 진행 및 결과 안내</text:p>
          </table:table-cell>
          <table:table-cell table:style-name="ce57" table:number-columns-repeated="2"/>
          <table:table-cell table:number-columns-repeated="1019"/>
        </table:table-row>
        <table:table-row table:style-name="ro10" table:number-rows-repeated="200">
          <table:table-cell/>
          <table:table-cell table:style-name="ce52"/>
          <table:table-cell table:style-name="ce56"/>
          <table:table-cell table:number-columns-repeated="1021"/>
        </table:table-row>
        <table:table-row table:style-name="ro6" table:number-rows-repeated="10483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우리집맵핑_입주민" table:style-name="ta6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5" table:number-columns-repeated="1018" table:default-cell-style-name="Excel_20_Built-in_20_Normal"/>
        <table:table-row table:style-name="ro6">
          <table:table-cell table:style-name="ce30" office:value-type="string" table:number-columns-spanned="5" table:number-rows-spanned="1">
            <text:p>요구사항 정의서</text:p>
          </table:table-cell>
          <table:covered-table-cell table:number-columns-repeated="3" table:style-name="ce6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table-cell table:style-name="ce30" office:value-type="string">
            <text:p>시스템 명</text:p>
          </table:table-cell>
          <table:table-cell table:style-name="ce35" office:value-type="string" table:number-columns-spanned="2" table:number-rows-spanned="1">
            <text:p>주택관리시스템</text:p>
          </table:table-cell>
          <table:covered-table-cell table:style-name="ce7"/>
          <table:table-cell table:style-name="ce31" office:value-type="string">
            <text:p>작성일</text:p>
          </table:table-cell>
          <table:table-cell table:style-name="ce41" office:value-type="date" office:date-value="2026-04-10">
            <text:p>2026-04-10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요구사항 ID</text:p>
          </table:table-cell>
          <table:table-cell table:style-name="ce30" office:value-type="string">
            <text:p>요구사항 명</text:p>
          </table:table-cell>
          <table:table-cell table:style-name="ce30" office:value-type="string">
            <text:p>요구사항 상세내역 </text:p>
          </table:table-cell>
          <table:table-cell table:style-name="ce30" office:value-type="string" table:number-columns-spanned="2" table:number-rows-spanned="1">
            <text:p>비고</text:p>
          </table:table-cell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4">
            <text:p>WM-301</text:p>
          </table:table-cell>
          <table:table-cell table:style-name="ce36" office:value-type="string" table:number-columns-spanned="1" table:number-rows-spanned="4">
            <text:p>입주 및 퇴거 신고</text:p>
          </table:table-cell>
          <table:table-cell table:style-name="ce53" office:value-type="string">
            <text:p>입주 예정일, 세대 구성원 수, 차량 정보(종류,번호)를 입력하여 입주 신고서를 온라인으로 제출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입주 신고서 제출 시, 고유 접수 번호를 자동 발급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관리사무소 승인, 반려 결과를 푸시 알림과 SMS 발송 받음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퇴거 신고가 관리사무소의 승인을 받아 완료된 경우, 관리비 정산 요청 기능이 활성화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table-cell table:style-name="ce45" office:value-type="string" table:number-columns-spanned="1" table:number-rows-spanned="6">
            <text:p>WM-302</text:p>
          </table:table-cell>
          <table:table-cell table:style-name="ce36" office:value-type="string" table:number-columns-spanned="1" table:number-rows-spanned="6">
            <text:p>관리비 납부 관리</text:p>
          </table:table-cell>
          <table:table-cell table:style-name="ce37" office:value-type="string">
            <text:p>항목별 월별 청구 내역(전기세,수도세,난방비,공용 관리비) 조회</text:p>
          </table:table-cell>
          <table:table-cell table:style-name="ce40" table:number-columns-spanned="2" table:number-rows-spanned="1"/>
          <table:covered-table-cell table:style-name="ce7"/>
          <table:table-cell table:style-name="ce44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청구금액(당월 청구 금액,전월 대비 증감 금액, 전월 대비 증감률) 표시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납부 페이지(미납 금액, 연체 일수, 연체료, 총 납부 금액) 표시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간편결제 지원(신용, 체크카드, 계좌이체, 카카오페이, 토스페이)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납부 완료 시, 영수증 PDF 다운로드, 푸시 알림, SMS 발송 받음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계좌 자동이체 신청(출금 계좌 등록,출금일 설정), 해지기능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table-cell table:style-name="ce45" office:value-type="string" table:number-columns-spanned="1" table:number-rows-spanned="6">
            <text:p>WM-303</text:p>
          </table:table-cell>
          <table:table-cell table:style-name="ce36" office:value-type="string" table:number-columns-spanned="1" table:number-rows-spanned="6">
            <text:p>민원 접수 신청</text:p>
          </table:table-cell>
          <table:table-cell table:style-name="ce37" office:value-type="string">
            <text:p>민원 유형(시설, 소음, 주차, 청소, 안전, 기타) 선택 및 접수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민원 등록(제목,내용,발생위치,첨부파일), 수정, 삭제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처리 단계를 접수 → 담당자 배정 → 처리 중 → 처리 완료 4단계로 구분하여 조회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민원 처리 완료 시, 결과(처리 내용,처리 일시,담당자 이름,담당자 댓글) 상세 화면 조회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8" office:value-type="string">
            <text:p>관리사무소 직원과 실시간 1:1 채팅 문의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4"/>
          <table:table-cell table:style-name="ce37" office:value-type="string">
            <text:p>AI 챗봇을 통한 민원접수(민원유형 선택,민원 접수 페이지로 이동 URL 제공)</text:p>
          </table:table-cell>
          <table:table-cell table:style-name="ce40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table-cell table:style-name="ce45" office:value-type="string" table:number-columns-spanned="1" table:number-rows-spanned="4">
            <text:p>WM-304</text:p>
          </table:table-cell>
          <table:table-cell table:style-name="ce36" office:value-type="string" table:number-columns-spanned="1" table:number-rows-spanned="4">
            <text:p>계약 조회 및 연장관리</text:p>
          </table:table-cell>
          <table:table-cell table:style-name="ce53" office:value-type="string">
            <text:p>계약 내역 조회(계약시작일,계약종료일,보증금금액,월임대료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계약 내용 상세화면 열람 및 계약서 PDF 다운로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계약 만료 30일 전에 사전 알림 받음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53" office:value-type="string">
            <text:p>계약 연장 신청 (개월 단위, 관리사무소 승인 필요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4">
            <text:p>WM-305</text:p>
          </table:table-cell>
          <table:table-cell table:style-name="ce36" office:value-type="string" table:number-columns-spanned="1" table:number-rows-spanned="4">
            <text:p>마이페이지</text:p>
          </table:table-cell>
          <table:table-cell table:style-name="ce53" office:value-type="string">
            <text:p>개인정보(이름,비밀번호,휴대폰번호,동호수,세대주여부,이메일) 조회 및 수정,삭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세대원 관리(세대주만 등록,수정,삭제 가능. 세대원들은 조회만 가능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항목 별 알림 확인(민원상태,투표,설문,공지사항,계약상태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53" office:value-type="string">
            <text:p>공용시설 이용내역 통합조회(시설명,이용날짜,이용시간,이용완료-이용중 표시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4">
            <text:p>WM-306</text:p>
          </table:table-cell>
          <table:table-cell table:style-name="ce58" office:value-type="string" table:number-columns-spanned="1" table:number-rows-spanned="4">
            <text:p>공용 시설 예약 관리</text:p>
          </table:table-cell>
          <table:table-cell table:style-name="ce53" office:value-type="string">
            <text:p>예약 가능한 공용시설 조회(헬스장,독서실,어린이놀이방,회의실,배드민턴실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실시간 공용시설 예약 현황 조회(시설명,예약날짜,시작시간,종료시간,예약상태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공용시설 예약 신청 및 변경 및 취소(예약가능-신청,예약완료-취소,예약불가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4"/>
          <table:covered-table-cell table:style-name="ce33"/>
          <table:table-cell table:style-name="ce53" office:value-type="string">
            <text:p>예약 시, 예약 확인 조회 및 푸시알림, SMS 전송 받음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3">
            <text:p>WM-307</text:p>
          </table:table-cell>
          <table:table-cell table:style-name="ce58" office:value-type="string" table:number-columns-spanned="1" table:number-rows-spanned="3">
            <text:p>차량 등록 관리</text:p>
          </table:table-cell>
          <table:table-cell table:style-name="ce53" office:value-type="string">
            <text:p>세대 별 보유 차량 등록(차량종류,차량번호,동호수,운전자명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53" office:value-type="string">
            <text:p>본인 등록 차량 정보 수정 및 삭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style-name="ce34"/>
          <table:covered-table-cell table:style-name="ce33"/>
          <table:table-cell table:style-name="ce53" office:value-type="string">
            <text:p>본인세대 등록된 차량 목록 조회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2">
            <text:p>WM-308</text:p>
          </table:table-cell>
          <table:table-cell table:style-name="ce58" office:value-type="string" table:number-columns-spanned="1" table:number-rows-spanned="2">
            <text:p>방문자 차량 등록 관리</text:p>
          </table:table-cell>
          <table:table-cell table:style-name="ce53" office:value-type="string">
            <text:p>방문자 차량 등록(방문자이름,차량종류,차량번호,방문날짜,방문목적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4"/>
          <table:covered-table-cell table:style-name="ce33"/>
          <table:table-cell table:style-name="ce53" office:value-type="string">
            <text:p>등록된 방문자 차량 조회, 수정, 삭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3">
            <text:p>WM-309</text:p>
          </table:table-cell>
          <table:table-cell table:style-name="ce58" office:value-type="string" table:number-columns-spanned="1" table:number-rows-spanned="3">
            <text:p>전자투표 및 설문참여</text:p>
          </table:table-cell>
          <table:table-cell table:style-name="ce53" office:value-type="string">
            <text:p>게시된 투표 및 설문조사(제목,기간,상태:진행중/종료) 목록 조회(survey.js API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53" office:value-type="string">
            <text:p>투표 및 설문조사 참여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4"/>
          <table:covered-table-cell table:style-name="ce33"/>
          <table:table-cell table:style-name="ce53" office:value-type="string">
            <text:p>투표 내용 및 결과(총 참여자 수,항목 별 선택 비율) 상세 조회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5">
            <text:p>WM-310</text:p>
          </table:table-cell>
          <table:table-cell table:style-name="ce58" office:value-type="string" table:number-columns-spanned="1" table:number-rows-spanned="5">
            <text:p>입주민 게시판</text:p>
          </table:table-cell>
          <table:table-cell table:style-name="ce53" office:value-type="string">
            <text:p>자유게시판에 글 작성, 수정, 조회, 삭제, 신고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민원 게시판에 글 작성, 조회, 삭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댓글 작성, 수정, 조회, 삭제, 신고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53" office:value-type="string">
            <text:p>카테고리 별 공지사항 조회(일반,긴급,계약,행사,점검,공사일정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style-name="ce34"/>
          <table:covered-table-cell table:style-name="ce33"/>
          <table:table-cell table:style-name="ce53" office:value-type="string">
            <text:p>필수 및 긴급 공지 열람 여부 표시 및 저장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2">
            <text:p>WM-311</text:p>
          </table:table-cell>
          <table:table-cell table:style-name="ce36" office:value-type="string" table:number-columns-spanned="1" table:number-rows-spanned="2">
            <text:p>입주민 편의 기능</text:p>
          </table:table-cell>
          <table:table-cell table:style-name="ce53" office:value-type="string">
            <text:p>입주자 대표 화상회의(WebRTC) 기능(참여자목록, 영상 및 음성 송수신, 회의시간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53" office:value-type="string">
            <text:p>입주민 실시간 채팅 단지별 그룹 채팅방 제공(WebSocket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2">
            <text:p>WM-312</text:p>
          </table:table-cell>
          <table:table-cell table:style-name="ce58" office:value-type="string" table:number-columns-spanned="1" table:number-rows-spanned="2">
            <text:p>시설 이력 조회</text:p>
          </table:table-cell>
          <table:table-cell table:style-name="ce53" office:value-type="string">
            <text:p>시설 관리 이력 조회(시설명,점검일자,점검내용,담당자명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4"/>
          <table:covered-table-cell table:style-name="ce33"/>
          <table:table-cell table:style-name="ce53" office:value-type="string">
            <text:p>시설 관리 이력 PDF 출력 및 다운로드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14">
          <table:table-cell table:style-name="ce45" office:value-type="string">
            <text:p>WM-313</text:p>
          </table:table-cell>
          <table:table-cell table:style-name="ce36" office:value-type="string">
            <text:p>통계 조회</text:p>
          </table:table-cell>
          <table:table-cell table:style-name="ce53" office:value-type="string">
            <text:p>입주민 개개인 맞춤통계(내가 속한 단지의 월별 평균과 나의 월별 전기,수도,난방,공용 관리비 비교, </text:p>
            <text:p>나의 공용시설 이용 횟수, 단지 내 민원발생 건수)</text:p>
          </table:table-cell>
          <table:table-cell table:style-name="ce40" table:number-columns-spanned="2" table:number-rows-spanned="1"/>
          <table:covered-table-cell table:style-name="ce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2">
          <table:table-cell/>
          <table:table-cell table:style-name="ce59" table:number-columns-repeated="2"/>
          <table:table-cell table:number-columns-repeated="1021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우리집맵핑_사용자" table:style-name="ta7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5" table:number-columns-repeated="1018" table:default-cell-style-name="Excel_20_Built-in_20_Normal"/>
        <table:table-row table:style-name="ro6">
          <table:table-cell table:style-name="ce30" office:value-type="string" table:number-columns-spanned="5" table:number-rows-spanned="1">
            <text:p>요구사항 정의서</text:p>
          </table:table-cell>
          <table:covered-table-cell table:number-columns-repeated="3" table:style-name="ce6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table-cell table:style-name="ce31" office:value-type="string">
            <text:p>시스템 명</text:p>
          </table:table-cell>
          <table:table-cell table:style-name="ce35" office:value-type="string" table:number-columns-spanned="2" table:number-rows-spanned="1">
            <text:p>주택관리시스템_사용자</text:p>
          </table:table-cell>
          <table:covered-table-cell table:style-name="ce7"/>
          <table:table-cell table:style-name="ce31" office:value-type="string">
            <text:p>작성일</text:p>
          </table:table-cell>
          <table:table-cell table:style-name="ce41" office:value-type="date" office:date-value="2026-04-13">
            <text:p>2026-04-13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요구사항 ID</text:p>
          </table:table-cell>
          <table:table-cell table:style-name="ce30" office:value-type="string">
            <text:p>요구사항 명</text:p>
          </table:table-cell>
          <table:table-cell table:style-name="ce30" office:value-type="string">
            <text:p>요구사항 상세내역 </text:p>
          </table:table-cell>
          <table:table-cell table:style-name="ce30" office:value-type="string" table:number-columns-spanned="2" table:number-rows-spanned="1">
            <text:p>비고</text:p>
          </table:table-cell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4">
            <text:p>WM-401</text:p>
          </table:table-cell>
          <table:table-cell table:style-name="ce36" office:value-type="string" table:number-columns-spanned="1" table:number-rows-spanned="4">
            <text:p>안내 공고 확인</text:p>
          </table:table-cell>
          <table:table-cell table:style-name="ce38" office:value-type="string">
            <text:p>공공주택 관련 공고 조회(전체 공고 목록)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공고 상세 정보 확인 (모집 일정, 조건, 위치, 가격,제출 서류,문의처)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공고 검색 및 필터 기능(지역, 가격, 유형)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covered-table-cell table:number-columns-repeated="2" table:style-name="ce34"/>
          <table:table-cell table:style-name="ce38" office:value-type="string">
            <text:p>관심 공고 즐겨찾기 기능</text:p>
          </table:table-cell>
          <table:table-cell table:style-name="ce36" table:number-columns-spanned="2" table:number-rows-spanned="1"/>
          <table:covered-table-cell table:style-name="ce7"/>
          <table:table-cell table:style-name="ce42"/>
          <table:table-cell table:number-columns-repeated="1018"/>
        </table:table-row>
        <table:table-row table:style-name="ro10">
          <table:table-cell table:style-name="ce45" office:value-type="string" table:number-columns-spanned="1" table:number-rows-spanned="4">
            <text:p>WM-402</text:p>
          </table:table-cell>
          <table:table-cell table:style-name="ce36" office:value-type="string" table:number-columns-spanned="1" table:number-rows-spanned="4">
            <text:p>공공주택 정보 조회</text:p>
          </table:table-cell>
          <table:table-cell table:style-name="ce53" office:value-type="string">
            <text:p>전체 단지 목록 조회 및 상세 정보 조회</text:p>
          </table:table-cell>
          <table:table-cell table:style-name="ce36" table:number-columns-spanned="2" table:number-rows-spanned="1"/>
          <table:covered-table-cell table:style-name="ce7"/>
          <table:table-cell table:style-name="ce43"/>
          <table:table-cell table:number-columns-repeated="1018"/>
        </table:table-row>
        <table:table-row table:style-name="ro11">
          <table:covered-table-cell table:number-columns-repeated="2" table:style-name="ce33"/>
          <table:table-cell table:style-name="ce37" office:value-type="string">
            <text:p>위치 정보 제공(카카오 지도 API 기반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37" office:value-type="string">
            <text:p>단지 이미지 및 도면 확인 (시설 및 주변 환경정보 제공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37" office:value-type="string">
            <text:p>단지별 통계 정보 조회(관리비, 입주현황, 전세 월세 금액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table-cell table:style-name="ce45" office:value-type="string" table:number-columns-spanned="1" table:number-rows-spanned="2">
            <text:p>WM-403</text:p>
          </table:table-cell>
          <table:table-cell table:style-name="ce36" office:value-type="string" table:number-columns-spanned="1" table:number-rows-spanned="2">
            <text:p>시설 이력 조회</text:p>
          </table:table-cell>
          <table:table-cell table:style-name="ce37" office:value-type="string">
            <text:p>단지 시설 유지보수 이력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4"/>
          <table:table-cell table:style-name="ce37" office:value-type="string">
            <text:p>시설 점검 기록 확인 / 하자보수 이력 확인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4">
            <text:p>WM-404</text:p>
          </table:table-cell>
          <table:table-cell table:style-name="ce36" office:value-type="string" table:number-columns-spanned="1" table:number-rows-spanned="4">
            <text:p>계약 신청 및 조회</text:p>
          </table:table-cell>
          <table:table-cell table:style-name="ce37" office:value-type="string">
            <text:p>공고 기반 계약 신청 진행 및 상태 조회(접수,심사중,승인/반려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37" office:value-type="string">
            <text:p>계약 신청 반려 시, 반려 사유 확인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37" office:value-type="string">
            <text:p>신청서 작성 및 제출(필요 정보 입력 및 파일 업로드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4"/>
          <table:table-cell table:style-name="ce37" office:value-type="string">
            <text:p>계약 신청 완료 후 상태 확인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table-cell table:style-name="ce45" office:value-type="string" table:number-columns-spanned="1" table:number-rows-spanned="3">
            <text:p>WM-405</text:p>
          </table:table-cell>
          <table:table-cell table:style-name="ce36" office:value-type="string" table:number-columns-spanned="1" table:number-rows-spanned="3">
            <text:p>문의게시판</text:p>
          </table:table-cell>
          <table:table-cell table:style-name="ce37" office:value-type="string">
            <text:p>사용자 문의글 목록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37" office:value-type="string">
            <text:p>사용자 문의글 작성 및 수정,삭제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4"/>
          <table:table-cell table:style-name="ce37" office:value-type="string">
            <text:p>문의글 관리사무소 관리자 답변 확인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table-cell table:style-name="ce45" office:value-type="string" table:number-columns-spanned="1" table:number-rows-spanned="5">
            <text:p>WM-406</text:p>
          </table:table-cell>
          <table:table-cell table:style-name="ce60" office:value-type="string" table:number-columns-spanned="1" table:number-rows-spanned="5">
            <text:p>건물 간 비교 조회</text:p>
          </table:table-cell>
          <table:table-cell table:style-name="ce37" office:value-type="string">
            <text:p>가격 비교(매매가, 전세, 월세 항목별 비교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3"/>
          <table:covered-table-cell/>
          <table:table-cell table:style-name="ce37" office:value-type="string">
            <text:p>시설 비교(주차, 엘리베이터, 경비, 놀이터, CCTV,헬스장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3"/>
          <table:covered-table-cell/>
          <table:table-cell table:style-name="ce37" office:value-type="string">
            <text:p>교통 접근성 비교(인근 지하철역, 버스 정류장 거리)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style-name="ce33"/>
          <table:covered-table-cell/>
          <table:table-cell table:style-name="ce37" office:value-type="string">
            <text:p>비교 결과 테이블, 그래프 형식 시각화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style-name="ce34"/>
          <table:covered-table-cell/>
          <table:table-cell table:style-name="ce37" office:value-type="string">
            <text:p>비교 결과 저장 및 공유 기능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table-cell table:style-name="ce45" office:value-type="string" table:number-columns-spanned="1" table:number-rows-spanned="7">
            <text:p>WM-407</text:p>
          </table:table-cell>
          <table:table-cell table:style-name="ce36" office:value-type="string" table:number-columns-spanned="1" table:number-rows-spanned="7">
            <text:p>마이페이지</text:p>
          </table:table-cell>
          <table:table-cell table:style-name="ce37" office:value-type="string">
            <text:p>회원 기본 정보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회원 정보 수정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계약 신청 내역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신청 상태 추적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1">
          <table:covered-table-cell table:number-columns-repeated="2" table:style-name="ce33"/>
          <table:table-cell table:style-name="ce37" office:value-type="string">
            <text:p>관심 공고 등록/해제 및 조회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3"/>
          <table:table-cell table:style-name="ce37" office:value-type="string">
            <text:p>회원 탈퇴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>
          <table:covered-table-cell table:number-columns-repeated="2" table:style-name="ce34"/>
          <table:table-cell table:style-name="ce37" office:value-type="string">
            <text:p>알림 수신 여부 설정</text:p>
          </table:table-cell>
          <table:table-cell table:style-name="ce36" table:number-columns-spanned="2" table:number-rows-spanned="1"/>
          <table:covered-table-cell table:style-name="ce7"/>
          <table:table-cell table:number-columns-repeated="1019"/>
        </table:table-row>
        <table:table-row table:style-name="ro10" table:number-rows-repeated="898">
          <table:table-cell/>
          <table:table-cell table:style-name="ce56" table:number-columns-repeated="2"/>
          <table:table-cell table:number-columns-repeated="1021"/>
        </table:table-row>
        <table:table-row table:style-name="ro6" table:number-rows-repeated="10476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'Malgun Gothic'" svg:font-family="''Malgun Gothic'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date-style style:name="N148">
      <number:year number:style="long"/>
      <number:text>년 </number:text>
      <number:month/>
      <number:text>월 </number:text>
      <number:day/>
      <number:text>일</number:text>
    </number:date-style>
    <number:date-style style:name="N149">
      <number:year number:style="long"/>
      <number:text>-</number:text>
      <number:month number:style="long"/>
      <number:text>-</number:text>
      <number:day number:style="long"/>
    </number:date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Dotum" fo:font-size="10pt" fo:font-style="normal" fo:text-shadow="none" style:text-underline-style="none" fo:font-weight="normal" style:font-name-asian="Dotum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4">2026-04-14</text:date>, <text:time>10:05:1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개정이력" style:display-name="PageStyle_개정이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표지" style:display-name="PageStyle_표지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우리집맵핑_5f_공통" style:display-name="PageStyle_우리집맵핑_공통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우리집맵핑_5f_중앙관리자" style:display-name="PageStyle_우리집맵핑_중앙관리자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우리집맵핑_5f_관리사무소" style:display-name="PageStyle_우리집맵핑_관리사무소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우리집맵핑_5f_입주민" style:display-name="PageStyle_우리집맵핑_입주민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우리집맵핑_5f_사용자" style:display-name="PageStyle_우리집맵핑_사용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60" meta:object-count="0"/>
    <meta:generator>OpenOffice/4.1.16$Win32 OpenOffice.org_project/4116m3$Build-9816</meta:generator>
  </office:meta>
</office:document-meta>
</file>