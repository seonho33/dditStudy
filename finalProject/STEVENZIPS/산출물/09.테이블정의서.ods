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rlito" svg:font-family="Carlito" style:font-pitch="variable"/>
    <style:font-face style:name="맑은 고딕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5.831cm"/>
    </style:style>
    <style:style style:name="co3" style:family="table-column">
      <style:table-column-properties fo:break-before="auto" style:column-width="2.808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3.888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0.647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1.859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776cm" fo:break-before="auto" style:use-optimal-row-height="false"/>
    </style:style>
    <style:style style:name="ta1" style:family="table" style:master-page-name="PageStyle_5f_테이블정의서">
      <style:table-properties table:display="true" style:writing-mode="lr-tb"/>
    </style:style>
    <style:style style:name="ce1" style:family="table-cell" style:parent-style-name="Normal" style:data-style-name="N8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Normal" style:data-style-name="N8000">
      <style:table-cell-properties fo:background-color="#a6a6a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" style:data-style-name="N8000">
      <style:table-cell-properties fo:background-color="#e7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" style:data-style-name="N8000">
      <style:table-cell-properties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" style:data-style-name="N8000">
      <style:table-cell-properties fo:background-color="#e7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" style:data-style-name="N8000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" style:data-style-name="N8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" style:data-style-name="N8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Normal" style:data-style-name="N8000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테이블정의서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Default"/>
        <table:table-row table:style-name="ro1">
          <table:table-cell table:style-name="ce1" office:value-type="string" table:number-columns-spanned="8" table:number-rows-spanned="1">
            <text:p>※ 본 문서는 DataBase의 테이블명 순으로 정렬되어 있음 ※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>
            <text:p>분류</text:p>
          </table:table-cell>
          <table:table-cell table:style-name="ce2" office:value-type="string" table:number-columns-spanned="7" table:number-rows-spanned="1">
            <text:p>테이블 (총 78개)</text:p>
          </table:table-cell>
          <table:covered-table-cell table:number-columns-repeated="6" table:style-name="ce2"/>
          <table:table-cell table:number-columns-repeated="1016"/>
        </table:table-row>
        <table:table-row table:style-name="ro3">
          <table:table-cell table:style-name="ce3" office:value-type="string">
            <text:p>회원/관리자/세대</text:p>
          </table:table-cell>
          <table:table-cell office:value-type="string" table:number-columns-spanned="7" table:number-rows-spanned="1">
            <text:p>ADM, APT_ANN_BOARD_POST, APT_BOARD_COMMENT, APT_BOARD_INSTANCE, APT_BOARD_POST, APT_COMPLEX, APT_DETAIL, APT_HO_TY, APT_INFRA, APT_UNIT, AUTH, HSHLD_MEMBER, MANAGER, MEMBER, MNGR_RQST, RESIDENT_RQST, USER_ROLE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게시판/공지</text:p>
          </table:table-cell>
          <table:table-cell office:value-type="string" table:number-columns-spanned="7" table:number-rows-spanned="1">
            <text:p>CENTER_ANN_BOARD_POST, CENTER_BOARD_COMMENT, CENTER_BOARD_INSTANCE, CENTER_BOARD_POST, COMMENT_LIKE, NOTICE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시설/계약/예약</text:p>
          </table:table-cell>
          <table:table-cell office:value-type="string" table:number-columns-spanned="7" table:number-rows-spanned="1">
            <text:p>FACILITY, FACILITY_CHECK_HSTRY, FACILITY_CONTRACT, FACILITY_CONTRACT_TARGET, FACILITY_HSTRY, PARTNER, PUBLIC_FACILITY, PUBLIC_ITEM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관리비/검침/결제</text:p>
          </table:table-cell>
          <table:table-cell office:value-type="string" table:number-columns-spanned="7" table:number-rows-spanned="1">
            <text:p>AUTO_PAYMENT, BILL, BILL_DETAIL, BUDGET, METER_HSTRY, METER_UPLOAD_HSTRY, PAYMENT, REFUND, UTILITY_PROVIDER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임대/신청</text:p>
          </table:table-cell>
          <table:table-cell office:value-type="string" table:number-columns-spanned="7" table:number-rows-spanned="1">
            <text:p>APLCT, RENT_CTRT, RENT_CTRT_DOC, RENT_LISTING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차량/방문</text:p>
          </table:table-cell>
          <table:table-cell office:value-type="string" table:number-columns-spanned="7" table:number-rows-spanned="1">
            <text:p>VST_VHCL_RSVT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설문/AI</text:p>
          </table:table-cell>
          <table:table-cell office:value-type="string" table:number-columns-spanned="7" table:number-rows-spanned="1">
            <text:p>AI_RQST, AI_RSLT, SURVEY, SURVEY_RSLT, SURVEY_RSPNS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알림/채팅/연동</text:p>
          </table:table-cell>
          <table:table-cell office:value-type="string" table:number-columns-spanned="7" table:number-rows-spanned="1">
            <text:p>CHAT_MESSAGE, CHAT_ROOM, CHAT_ROOM_MEMBER, CHAT_ROOM_READ, SMS_SND, SMS_SND_DTL, WEBHOOK_LOG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공통코드</text:p>
          </table:table-cell>
          <table:table-cell office:value-type="string" table:number-columns-spanned="7" table:number-rows-spanned="1">
            <text:p>COMMON_CODE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파일</text:p>
          </table:table-cell>
          <table:table-cell office:value-type="string" table:number-columns-spanned="7" table:number-rows-spanned="1">
            <text:p>ATTACH_FILE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4">
          <table:table-cell table:style-name="ce3" office:value-type="string">
            <text:p>기타</text:p>
          </table:table-cell>
          <table:table-cell office:value-type="string" table:number-columns-spanned="7" table:number-rows-spanned="1">
            <text:p>CNTRCT_FRM, COMPLEX_3D, COMPLEX_SCHEDULE, CTRT_MGR, CTRT_PAY_HSTRY, CVPL, CVPL_AI_ANLS, CVPL_HSTRY, EXPENSE, HSHLD_HEAD, KAKAO_ALIM, LAW_DONG, MGMT_OFC_BANK_ACNT, MGMT_OFFICE, MGMT_OPR_TM, MNGR_VACATION_SCHDL, NOTIFICATION, RSID_VHCL, SBMSN_DOC</text:p>
          </table:table-cell>
          <table:covered-table-cell/>
          <table:covered-table-cell table:number-columns-repeated="5" table:style-name="ce11"/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">
            <text:p>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DM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PT_NM</text:p>
          </table:table-cell>
          <table:table-cell office:value-type="string">
            <text:p>부서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STN_NM</text:p>
          </table:table-cell>
          <table:table-cell office:value-type="string">
            <text:p>직위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">
            <text:p>2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AI 요청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I_RQ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AI 요청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I_RQST_NO</text:p>
          </table:table-cell>
          <table:table-cell office:value-type="string">
            <text:p>AI 요청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HAT_ROOM_NO</text:p>
          </table:table-cell>
          <table:table-cell office:value-type="string">
            <text:p>채팅 방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QST_CN</text:p>
          </table:table-cell>
          <table:table-cell office:value-type="string">
            <text:p>요청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QST_SUMRY_CN</text:p>
          </table:table-cell>
          <table:table-cell office:value-type="string">
            <text:p>요청 요약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HAT_MSG_NO</text:p>
          </table:table-cell>
          <table:table-cell office:value-type="string">
            <text:p>채팅 메시지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">
            <text:p>3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AI 결과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I_RSL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AI 결과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I_RSLT_NO</text:p>
          </table:table-cell>
          <table:table-cell office:value-type="string">
            <text:p>AI 결과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M_SCR</text:p>
          </table:table-cell>
          <table:table-cell office:value-type="string">
            <text:p>RCM 점수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I_RSLT_CN</text:p>
          </table:table-cell>
          <table:table-cell office:value-type="string">
            <text:p>AI 결과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I_RQST_NO</text:p>
          </table:table-cell>
          <table:table-cell office:value-type="string">
            <text:p>AI 요청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엔티티 타입명</text:p>
          </table:table-cell>
          <table:table-cell table:style-name="ce8" office:value-type="string" table:number-columns-spanned="2" table:number-rows-spanned="1">
            <text:p>신청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LC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신청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LCT_NO</text:p>
          </table:table-cell>
          <table:table-cell office:value-type="string">
            <text:p>신청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N_NO</text:p>
          </table:table-cell>
          <table:table-cell office:value-type="string">
            <text:p>공고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O_TY_NO</text:p>
          </table:table-cell>
          <table:table-cell office:value-type="string">
            <text:p>호 유형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PLCT_STTS_CD</text:p>
          </table:table-cell>
          <table:table-cell office:value-type="string">
            <text:p>신청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JCT_RSN_CN</text:p>
          </table:table-cell>
          <table:table-cell office:value-type="string">
            <text:p>반려 사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">
            <text:p>5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공지 게시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ANN_BOARD_PO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공지 게시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N_NO</text:p>
          </table:table-cell>
          <table:table-cell office:value-type="string">
            <text:p>공고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TL</text:p>
          </table:table-cell>
          <table:table-cell office:value-type="string">
            <text:p>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N</text:p>
          </table:table-cell>
          <table:table-cell office:value-type="string">
            <text:p>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RTR_ID</text:p>
          </table:table-cell>
          <table:table-cell office:value-type="string">
            <text:p>작성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OP_FIX_YN</text:p>
          </table:table-cell>
          <table:table-cell office:value-type="string">
            <text:p>상단 고정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BLANC_BGNG_DT</text:p>
          </table:table-cell>
          <table:table-cell office:value-type="string">
            <text:p>PBLANC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LANC_END_DT</text:p>
          </table:table-cell>
          <table:table-cell office:value-type="string">
            <text:p>PBLANC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NQ_CNT</text:p>
          </table:table-cell>
          <table:table-cell office:value-type="string">
            <text:p>조회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">
            <text:p>6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게시판 댓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BOARD_COMMEN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게시판 댓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MT_NO</text:p>
          </table:table-cell>
          <table:table-cell office:value-type="string">
            <text:p>댓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ST_NO</text:p>
          </table:table-cell>
          <table:table-cell office:value-type="string">
            <text:p>게시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MT_GROUP</text:p>
          </table:table-cell>
          <table:table-cell office:value-type="string">
            <text:p>댓글 그룹</text:p>
          </table:table-cell>
          <table:table-cell office:value-type="string">
            <text:p>N/A</text:p>
          </table:table-cell>
          <table:table-cell office:value-type="string">
            <text:p>NUMBER(8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MT_CN</text:p>
          </table:table-cell>
          <table:table-cell office:value-type="string">
            <text:p>댓글 내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MT_SORT_ORD</text:p>
          </table:table-cell>
          <table:table-cell office:value-type="string">
            <text:p>댓글 정렬 순서</text:p>
          </table:table-cell>
          <table:table-cell office:value-type="string">
            <text:p>N/A</text:p>
          </table:table-cell>
          <table:table-cell office:value-type="string">
            <text:p>NUMBER(8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">
            <text:p>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게시판 인스턴스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BOARD_INSTANC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게시판 인스턴스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OARD_TY_CD</text:p>
          </table:table-cell>
          <table:table-cell office:value-type="string">
            <text:p>게시판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OARD_NM</text:p>
          </table:table-cell>
          <table:table-cell office:value-type="string">
            <text:p>게시판 명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8">
            <text:p>8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게시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BOARD_PO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게시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T_NO</text:p>
          </table:table-cell>
          <table:table-cell office:value-type="string">
            <text:p>게시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TL</text:p>
          </table:table-cell>
          <table:table-cell office:value-type="string">
            <text:p>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N</text:p>
          </table:table-cell>
          <table:table-cell office:value-type="string">
            <text:p>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TR_ID</text:p>
          </table:table-cell>
          <table:table-cell office:value-type="string">
            <text:p>작성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Q_CNT</text:p>
          </table:table-cell>
          <table:table-cell office:value-type="string">
            <text:p>조회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PN_YN</text:p>
          </table:table-cell>
          <table:table-cell office:value-type="string">
            <text:p>OPN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RRT_CD</text:p>
          </table:table-cell>
          <table:table-cell office:value-type="string">
            <text:p>우선순위 코드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9">
            <text:p>9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단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COMPLEX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단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M</text:p>
          </table:table-cell>
          <table:table-cell office:value-type="string">
            <text:p>아파트 단지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JD_CD</text:p>
          </table:table-cell>
          <table:table-cell office:value-type="string">
            <text:p>법정동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IDO_NM</text:p>
          </table:table-cell>
          <table:table-cell office:value-type="string">
            <text:p>시도 명</text:p>
          </table:table-cell>
          <table:table-cell office:value-type="string">
            <text:p>N/A</text:p>
          </table:table-cell>
          <table:table-cell office:value-type="string">
            <text:p>VARCHAR2(2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IGUNGU_NM</text:p>
          </table:table-cell>
          <table:table-cell office:value-type="string">
            <text:p>시군구 명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MD_NM</text:p>
          </table:table-cell>
          <table:table-cell office:value-type="string">
            <text:p>읍면동 명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AT_VAL</text:p>
          </table:table-cell>
          <table:table-cell office:value-type="string">
            <text:p>위도 값</text:p>
          </table:table-cell>
          <table:table-cell office:value-type="string">
            <text:p>N/A</text:p>
          </table:table-cell>
          <table:table-cell office:value-type="string">
            <text:p>NUMBER(18,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ON_VAL</text:p>
          </table:table-cell>
          <table:table-cell office:value-type="string">
            <text:p>경도 값</text:p>
          </table:table-cell>
          <table:table-cell office:value-type="string">
            <text:p>N/A</text:p>
          </table:table-cell>
          <table:table-cell office:value-type="string">
            <text:p>NUMBER(18,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NIT_CNT</text:p>
          </table:table-cell>
          <table:table-cell office:value-type="string">
            <text:p>UNIT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LD_YR</text:p>
          </table:table-cell>
          <table:table-cell office:value-type="string">
            <text:p>건물 연도</text:p>
          </table:table-cell>
          <table:table-cell office:value-type="string">
            <text:p>N/A</text:p>
          </table:table-cell>
          <table:table-cell office:value-type="string">
            <text:p>VARCHAR2(8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NSCO_NM</text:p>
          </table:table-cell>
          <table:table-cell office:value-type="string">
            <text:p>건설사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IMG_FILE_NO</text:p>
          </table:table-cell>
          <table:table-cell office:value-type="string">
            <text:p>이미지 파일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PRSNT_IMG_FILE_NO</text:p>
          </table:table-cell>
          <table:table-cell office:value-type="string">
            <text:p>대표 이미지 파일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EAT_TY</text:p>
          </table:table-cell>
          <table:table-cell office:value-type="string">
            <text:p>난방 유형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KG_CNT</text:p>
          </table:table-cell>
          <table:table-cell office:value-type="string">
            <text:p>PKG 건수</text:p>
          </table:table-cell>
          <table:table-cell office:value-type="string">
            <text:p>N/A</text:p>
          </table:table-cell>
          <table:table-cell office:value-type="string">
            <text:p>NUMBER(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AX_FLOOR</text:p>
          </table:table-cell>
          <table:table-cell office:value-type="string">
            <text:p>최대 층</text:p>
          </table:table-cell>
          <table:table-cell office:value-type="string">
            <text:p>N/A</text:p>
          </table:table-cell>
          <table:table-cell office:value-type="string">
            <text:p>NUMBER(3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REE_PKG_CNT</text:p>
          </table:table-cell>
          <table:table-cell office:value-type="string">
            <text:p>무료 PKG 건수</text:p>
          </table:table-cell>
          <table:table-cell office:value-type="string">
            <text:p>N/A</text:p>
          </table:table-cell>
          <table:table-cell office:value-type="string">
            <text:p>NUMBER(1,0)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ONG_CNT</text:p>
          </table:table-cell>
          <table:table-cell office:value-type="string">
            <text:p>동 건수</text:p>
          </table:table-cell>
          <table:table-cell office:value-type="string">
            <text:p>N/A</text:p>
          </table:table-cell>
          <table:table-cell office:value-type="string">
            <text:p>NUMBER(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OROJUSO</text:p>
          </table:table-cell>
          <table:table-cell office:value-type="string">
            <text:p>도로명주소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C_CNT</text:p>
          </table:table-cell>
          <table:table-cell office:value-type="string">
            <text:p>세대 건수</text:p>
          </table:table-cell>
          <table:table-cell office:value-type="string">
            <text:p>N/A</text:p>
          </table:table-cell>
          <table:table-cell office:value-type="string">
            <text:p>VARCHAR2(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0">
            <text:p>10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세대 상세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DETAI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세대 상세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LOOR</text:p>
          </table:table-cell>
          <table:table-cell office:value-type="string">
            <text:p>층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_TY_NO</text:p>
          </table:table-cell>
          <table:table-cell office:value-type="string">
            <text:p>호 유형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O_STTS_CD</text:p>
          </table:table-cell>
          <table:table-cell office:value-type="string">
            <text:p>호 상태 코드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 office:value-type="string">
            <text:p>'EMPTY'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MAGE_NO</text:p>
          </table:table-cell>
          <table:table-cell office:value-type="string">
            <text:p>이미지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NO_IMAGE_NO</text:p>
          </table:table-cell>
          <table:table-cell office:value-type="string">
            <text:p>파노라마 이미지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ONG_NO</text:p>
          </table:table-cell>
          <table:table-cell office:value-type="string">
            <text:p>동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O</text:p>
          </table:table-cell>
          <table:table-cell office:value-type="string">
            <text:p>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1">
            <text:p>11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호 유형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HO_T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호 유형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_TY_NO</text:p>
          </table:table-cell>
          <table:table-cell office:value-type="string">
            <text:p>호 유형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_NM</text:p>
          </table:table-cell>
          <table:table-cell office:value-type="string">
            <text:p>유형 명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CLUSIVE_SIZE</text:p>
          </table:table-cell>
          <table:table-cell office:value-type="string">
            <text:p>전용 크기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OM_CNT</text:p>
          </table:table-cell>
          <table:table-cell office:value-type="string">
            <text:p>방 건수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ATHROOM_CNT</text:p>
          </table:table-cell>
          <table:table-cell office:value-type="string">
            <text:p>욕실 건수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MAGE_FILE_NO</text:p>
          </table:table-cell>
          <table:table-cell office:value-type="string">
            <text:p>이미지 파일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2">
            <text:p>12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인프라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INFRA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인프라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FRA_NO</text:p>
          </table:table-cell>
          <table:table-cell office:value-type="string">
            <text:p>INFRA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FRA_NM</text:p>
          </table:table-cell>
          <table:table-cell office:value-type="string">
            <text:p>INFRA 명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TEGORY_CD</text:p>
          </table:table-cell>
          <table:table-cell office:value-type="string">
            <text:p>카테고리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3">
            <text:p>13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아파트 동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PT_UNI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아파트 동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NG_NO</text:p>
          </table:table-cell>
          <table:table-cell office:value-type="string">
            <text:p>동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NG_NM</text:p>
          </table:table-cell>
          <table:table-cell office:value-type="string">
            <text:p>동 명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LOOR</text:p>
          </table:table-cell>
          <table:table-cell office:value-type="string">
            <text:p>층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NIT_CNT</text:p>
          </table:table-cell>
          <table:table-cell office:value-type="string">
            <text:p>UNIT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4">
            <text:p>14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첨부 파일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TTACH_FIL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첨부 파일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ILE_GROUP_NO</text:p>
          </table:table-cell>
          <table:table-cell office:value-type="string">
            <text:p>파일 그룹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ILE_OG_NAME</text:p>
          </table:table-cell>
          <table:table-cell office:value-type="string">
            <text:p>파일 원본 NAME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ILE_SAVE_UUID</text:p>
          </table:table-cell>
          <table:table-cell office:value-type="string">
            <text:p>파일 저장 UUID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ILE_PATH</text:p>
          </table:table-cell>
          <table:table-cell office:value-type="string">
            <text:p>파일 경로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ILE_EXT</text:p>
          </table:table-cell>
          <table:table-cell office:value-type="string">
            <text:p>파일 확장자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ILE_SIZE</text:p>
          </table:table-cell>
          <table:table-cell office:value-type="string">
            <text:p>파일 크기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IME_TYPE</text:p>
          </table:table-cell>
          <table:table-cell office:value-type="string">
            <text:p>MIME 유형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ILE_SORT_ORDER</text:p>
          </table:table-cell>
          <table:table-cell office:value-type="string">
            <text:p>파일 정렬 ORDER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OWN_CNT</text:p>
          </table:table-cell>
          <table:table-cell office:value-type="string">
            <text:p>다운로드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OOGLE_ID</text:p>
          </table:table-cell>
          <table:table-cell office:value-type="string">
            <text:p>GOOGLE 아이디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ot Null</text:p>
          </table:table-cell>
          <table:table-cell/>
          <table:table-cell office:value-type="string">
            <text:p>UK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string">
            <text:p>CAT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5">
            <text:p>1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권한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UTH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권한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ROLE_CD</text:p>
          </table:table-cell>
          <table:table-cell office:value-type="string">
            <text:p>사용자 권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office:value-type="string">
            <text:p>'ROLE_MEMBER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6">
            <text:p>1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자동 결제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AUTO_PAYMEN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자동 결제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UTO_PAY_NO</text:p>
          </table:table-cell>
          <table:table-cell office:value-type="string">
            <text:p>자동 결제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ILL_NO</text:p>
          </table:table-cell>
          <table:table-cell office:value-type="string">
            <text:p>관리비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Y_MTHD_CD</text:p>
          </table:table-cell>
          <table:table-cell office:value-type="string">
            <text:p>결제 수단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LLING_KEY</text:p>
          </table:table-cell>
          <table:table-cell office:value-type="string">
            <text:p>빌링 키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AY_STTS_CD</text:p>
          </table:table-cell>
          <table:table-cell office:value-type="string">
            <text:p>결제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ART_DT</text:p>
          </table:table-cell>
          <table:table-cell office:value-type="string">
            <text:p>START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ND_DT</text:p>
          </table:table-cell>
          <table:table-cell office:value-type="string">
            <text:p>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AY_DAY</text:p>
          </table:table-cell>
          <table:table-cell office:value-type="string">
            <text:p>결제 DAY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7">
            <text:p>1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비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BIL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비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LL_NO</text:p>
          </table:table-cell>
          <table:table-cell office:value-type="string">
            <text:p>관리비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ILL_YM</text:p>
          </table:table-cell>
          <table:table-cell office:value-type="string">
            <text:p>관리비 연월</text:p>
          </table:table-cell>
          <table:table-cell office:value-type="string">
            <text:p>N/A</text:p>
          </table:table-cell>
          <table:table-cell office:value-type="string">
            <text:p>VARCHAR2(6)</text:p>
          </table:table-cell>
          <table:table-cell office:value-type="string">
            <text:p>Not Null</text:p>
          </table:table-cell>
          <table:table-cell office:value-type="string">
            <text:p>TO_CHAR(SYSDATE, 'YYYYMM')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LL_PBLANC_DT</text:p>
          </table:table-cell>
          <table:table-cell office:value-type="string">
            <text:p>관리비 PBLANC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ILL_TOT_AMT</text:p>
          </table:table-cell>
          <table:table-cell office:value-type="string">
            <text:p>관리비 TOT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UE_DT</text:p>
          </table:table-cell>
          <table:table-cell office:value-type="string">
            <text:p>DUE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MT_STTS_CD</text:p>
          </table:table-cell>
          <table:table-cell office:value-type="string">
            <text:p>납부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YMT_DT</text:p>
          </table:table-cell>
          <table:table-cell office:value-type="string">
            <text:p>납부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YMT_AMT</text:p>
          </table:table-cell>
          <table:table-cell office:value-type="string">
            <text:p>납부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ATE_FEE_RT</text:p>
          </table:table-cell>
          <table:table-cell office:value-type="string">
            <text:p>연체 료 율</text:p>
          </table:table-cell>
          <table:table-cell office:value-type="string">
            <text:p>N/A</text:p>
          </table:table-cell>
          <table:table-cell office:value-type="string">
            <text:p>NUMBER(5,4)</text:p>
          </table:table-cell>
          <table:table-cell office:value-type="string">
            <text:p>Not Null</text:p>
          </table:table-cell>
          <table:table-cell office:value-type="string">
            <text:p>0.03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ATE_FEE_AMT</text:p>
          </table:table-cell>
          <table:table-cell office:value-type="string">
            <text:p>연체 료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8">
            <text:p>1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비 상세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BILL_DETAI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비 상세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LL_DETAIL_NO</text:p>
          </table:table-cell>
          <table:table-cell office:value-type="string">
            <text:p>관리비 상세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ILL_NO</text:p>
          </table:table-cell>
          <table:table-cell office:value-type="string">
            <text:p>관리비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ILL_ITEM_CD</text:p>
          </table:table-cell>
          <table:table-cell office:value-type="string">
            <text:p>관리비 자원 코드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LL_ITEM_AMT</text:p>
          </table:table-cell>
          <table:table-cell office:value-type="string">
            <text:p>관리비 자원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19">
            <text:p>19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예산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BUDGE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예산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DGET_NO</text:p>
          </table:table-cell>
          <table:table-cell office:value-type="string">
            <text:p>예산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UDGET_CD</text:p>
          </table:table-cell>
          <table:table-cell office:value-type="string">
            <text:p>예산 코드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DGET_YR</text:p>
          </table:table-cell>
          <table:table-cell office:value-type="string">
            <text:p>예산 연도</text:p>
          </table:table-cell>
          <table:table-cell office:value-type="string">
            <text:p>N/A</text:p>
          </table:table-cell>
          <table:table-cell office:value-type="string">
            <text:p>NUMBER(4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UDGET_MM</text:p>
          </table:table-cell>
          <table:table-cell office:value-type="string">
            <text:p>예산 월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DGET_AMT</text:p>
          </table:table-cell>
          <table:table-cell office:value-type="string">
            <text:p>예산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UDGET_CN</text:p>
          </table:table-cell>
          <table:table-cell office:value-type="string">
            <text:p>예산 내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MRK_CN</text:p>
          </table:table-cell>
          <table:table-cell office:value-type="string">
            <text:p>비고 내용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0">
            <text:p>20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센터 공지 게시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ENTER_ANN_BOARD_PO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센터 공지 게시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N_NO</text:p>
          </table:table-cell>
          <table:table-cell office:value-type="string">
            <text:p>공고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TL</text:p>
          </table:table-cell>
          <table:table-cell office:value-type="string">
            <text:p>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N</text:p>
          </table:table-cell>
          <table:table-cell office:value-type="string">
            <text:p>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TR_ID</text:p>
          </table:table-cell>
          <table:table-cell office:value-type="string">
            <text:p>작성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OP_FIX_YN</text:p>
          </table:table-cell>
          <table:table-cell office:value-type="string">
            <text:p>상단 고정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LANC_BGNG_DT</text:p>
          </table:table-cell>
          <table:table-cell office:value-type="string">
            <text:p>PBLANC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LANC_END_DT</text:p>
          </table:table-cell>
          <table:table-cell office:value-type="string">
            <text:p>PBLANC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CRT_BGNG_DT</text:p>
          </table:table-cell>
          <table:table-cell office:value-type="string">
            <text:p>모집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CRT_END_DT</text:p>
          </table:table-cell>
          <table:table-cell office:value-type="string">
            <text:p>모집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Q_CNT</text:p>
          </table:table-cell>
          <table:table-cell office:value-type="string">
            <text:p>조회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PN_YN</text:p>
          </table:table-cell>
          <table:table-cell office:value-type="string">
            <text:p>OPN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BMSN_DOC</text:p>
          </table:table-cell>
          <table:table-cell office:value-type="string">
            <text:p>제출 문서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VIN_PRD_DT</text:p>
          </table:table-cell>
          <table:table-cell office:value-type="string">
            <text:p>입주 예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1">
            <text:p>2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센터 게시판 댓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ENTER_BOARD_COMMEN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센터 게시판 댓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MT_NO</text:p>
          </table:table-cell>
          <table:table-cell office:value-type="string">
            <text:p>댓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ST_NO</text:p>
          </table:table-cell>
          <table:table-cell office:value-type="string">
            <text:p>게시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MT_GROUP</text:p>
          </table:table-cell>
          <table:table-cell office:value-type="string">
            <text:p>댓글 그룹</text:p>
          </table:table-cell>
          <table:table-cell office:value-type="string">
            <text:p>N/A</text:p>
          </table:table-cell>
          <table:table-cell office:value-type="string">
            <text:p>NUMBER(8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MT_CN</text:p>
          </table:table-cell>
          <table:table-cell office:value-type="string">
            <text:p>댓글 내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MT_SORT_ORD</text:p>
          </table:table-cell>
          <table:table-cell office:value-type="string">
            <text:p>댓글 정렬 순서</text:p>
          </table:table-cell>
          <table:table-cell office:value-type="string">
            <text:p>N/A</text:p>
          </table:table-cell>
          <table:table-cell office:value-type="string">
            <text:p>NUMBER(8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2">
            <text:p>22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센터 게시판 인스턴스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ENTER_BOARD_INSTANC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센터 게시판 인스턴스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ARD_NM</text:p>
          </table:table-cell>
          <table:table-cell office:value-type="string">
            <text:p>게시판 명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OARD_TY_CD</text:p>
          </table:table-cell>
          <table:table-cell office:value-type="string">
            <text:p>게시판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3">
            <text:p>23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센터 게시판 게시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ENTER_BOARD_PO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센터 게시판 게시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T_NO</text:p>
          </table:table-cell>
          <table:table-cell office:value-type="string">
            <text:p>게시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TL</text:p>
          </table:table-cell>
          <table:table-cell office:value-type="string">
            <text:p>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N</text:p>
          </table:table-cell>
          <table:table-cell office:value-type="string">
            <text:p>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TR_ID</text:p>
          </table:table-cell>
          <table:table-cell office:value-type="string">
            <text:p>작성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OP_FIX_YN</text:p>
          </table:table-cell>
          <table:table-cell office:value-type="string">
            <text:p>상단 고정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Q_CNT</text:p>
          </table:table-cell>
          <table:table-cell office:value-type="string">
            <text:p>조회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4">
            <text:p>24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채팅 MESSAGE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HAT_MESSAG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채팅 MESSAGE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AT_MSG_NO</text:p>
          </table:table-cell>
          <table:table-cell office:value-type="string">
            <text:p>채팅 메시지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T_ROOM_NO</text:p>
          </table:table-cell>
          <table:table-cell office:value-type="string">
            <text:p>채팅 방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SG_TY_CD</text:p>
          </table:table-cell>
          <table:table-cell office:value-type="string">
            <text:p>메시지 유형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office:value-type="string">
            <text:p>'TEXT'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SG_CN</text:p>
          </table:table-cell>
          <table:table-cell office:value-type="string">
            <text:p>메시지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ENDER_TY</text:p>
          </table:table-cell>
          <table:table-cell office:value-type="string">
            <text:p>송신자 유형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office:value-type="string">
            <text:p>'USER'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HAT_MEMBER_ID</text:p>
          </table:table-cell>
          <table:table-cell office:value-type="string">
            <text:p>채팅 참여자 아이디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5">
            <text:p>2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채팅방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HAT_ROOM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채팅방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AT_ROOM_NO</text:p>
          </table:table-cell>
          <table:table-cell office:value-type="string">
            <text:p>채팅 방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T_ROOM_NM</text:p>
          </table:table-cell>
          <table:table-cell office:value-type="string">
            <text:p>채팅 방 명</text:p>
          </table:table-cell>
          <table:table-cell office:value-type="string">
            <text:p>N/A</text:p>
          </table:table-cell>
          <table:table-cell office:value-type="string">
            <text:p>VARCHAR2(1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HAT_ROOM_TY_CD</text:p>
          </table:table-cell>
          <table:table-cell office:value-type="string">
            <text:p>채팅 방 유형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GTR_ID</text:p>
          </table:table-cell>
          <table:table-cell office:value-type="string">
            <text:p>등록자 아이디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HAT_JOIN_KEY</text:p>
          </table:table-cell>
          <table:table-cell office:value-type="string">
            <text:p>채팅 입장 키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HAT_ROOM_DESC</text:p>
          </table:table-cell>
          <table:table-cell office:value-type="string">
            <text:p>채팅 방 DESC</text:p>
          </table:table-cell>
          <table:table-cell office:value-type="string">
            <text:p>N/A</text:p>
          </table:table-cell>
          <table:table-cell office:value-type="string">
            <text:p>VARCHAR2(6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6">
            <text:p>2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채팅방 참여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HAT_ROOM_MEMBE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채팅방 참여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T_MEMBER_ID</text:p>
          </table:table-cell>
          <table:table-cell office:value-type="string">
            <text:p>채팅 참여자 아이디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HATROLE_CD</text:p>
          </table:table-cell>
          <table:table-cell office:value-type="string">
            <text:p>CHATROLE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OIN_DTTM</text:p>
          </table:table-cell>
          <table:table-cell office:value-type="string">
            <text:p>입장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FT_DTTM</text:p>
          </table:table-cell>
          <table:table-cell office:value-type="string">
            <text:p>퇴장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HAT_ROOM_NO</text:p>
          </table:table-cell>
          <table:table-cell office:value-type="string">
            <text:p>채팅 방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OTI_YN</text:p>
          </table:table-cell>
          <table:table-cell office:value-type="string">
            <text:p>알림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7">
            <text:p>27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채팅 방 열람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HAT_ROOM_READ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채팅 방 열람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AT_ROOM_NO</text:p>
          </table:table-cell>
          <table:table-cell office:value-type="string">
            <text:p>채팅 방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T_MEMBER_ID</text:p>
          </table:table-cell>
          <table:table-cell office:value-type="string">
            <text:p>채팅 참여자 아이디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AST_READ_MSG_NO</text:p>
          </table:table-cell>
          <table:table-cell office:value-type="string">
            <text:p>LAST 열람 메시지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8">
            <text:p>2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CNTRCT FRM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NTRCT_FRM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CNTRCT FRM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M_NO</text:p>
          </table:table-cell>
          <table:table-cell office:value-type="string">
            <text:p>서식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M_NM</text:p>
          </table:table-cell>
          <table:table-cell office:value-type="string">
            <text:p>서식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T_TYPE_CD</text:p>
          </table:table-cell>
          <table:table-cell office:value-type="string">
            <text:p>임대 유형 코드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ILE_NO</text:p>
          </table:table-cell>
          <table:table-cell office:value-type="string">
            <text:p>파일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29">
            <text:p>29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댓글 LIKE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OMMENT_LIK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댓글 LIKE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MT_LIKE_NO</text:p>
          </table:table-cell>
          <table:table-cell office:value-type="string">
            <text:p>댓글 LIKE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OARD_TYPE_CD</text:p>
          </table:table-cell>
          <table:table-cell office:value-type="string">
            <text:p>게시판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MT_NO</text:p>
          </table:table-cell>
          <table:table-cell office:value-type="string">
            <text:p>댓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0">
            <text:p>30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공통 코드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OMMON_COD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공통 코드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OUP_CODE_NO</text:p>
          </table:table-cell>
          <table:table-cell office:value-type="string">
            <text:p>그룹 CODE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DE_NO_CD</text:p>
          </table:table-cell>
          <table:table-cell office:value-type="string">
            <text:p>CODE 번호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DE_NAME</text:p>
          </table:table-cell>
          <table:table-cell office:value-type="string">
            <text:p>CODE NAME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DE_CONTENT</text:p>
          </table:table-cell>
          <table:table-cell office:value-type="string">
            <text:p>CODE CONTENT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ORT_ORDER</text:p>
          </table:table-cell>
          <table:table-cell office:value-type="string">
            <text:p>정렬 ORDER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1">
            <text:p>3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단지 3D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OMPLEX_3D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단지 3D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DEL_NO</text:p>
          </table:table-cell>
          <table:table-cell office:value-type="string">
            <text:p>모델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DEL_NM</text:p>
          </table:table-cell>
          <table:table-cell office:value-type="string">
            <text:p>모델 명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ILE_PATH</text:p>
          </table:table-cell>
          <table:table-cell office:value-type="string">
            <text:p>파일 경로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GNL_FILE_NM</text:p>
          </table:table-cell>
          <table:table-cell office:value-type="string">
            <text:p>원본 파일 명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TRG_FILE_UUID</text:p>
          </table:table-cell>
          <table:table-cell office:value-type="string">
            <text:p>저장 파일 UUID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IME_TYPE_CD</text:p>
          </table:table-cell>
          <table:table-cell office:value-type="string">
            <text:p>MIME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ILE_SZ</text:p>
          </table:table-cell>
          <table:table-cell office:value-type="string">
            <text:p>파일 크기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LE_EXTN</text:p>
          </table:table-cell>
          <table:table-cell office:value-type="string">
            <text:p>파일 확장자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2">
            <text:p>32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단지 일정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OMPLEX_SCHEDUL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단지 일정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EDULE_NO</text:p>
          </table:table-cell>
          <table:table-cell office:value-type="string">
            <text:p>일정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CHDL_TTL</text:p>
          </table:table-cell>
          <table:table-cell office:value-type="string">
            <text:p>일정 제목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OC_CN</text:p>
          </table:table-cell>
          <table:table-cell office:value-type="string">
            <text:p>위치 내용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HDL_STTS_CD</text:p>
          </table:table-cell>
          <table:table-cell office:value-type="string">
            <text:p>일정 상태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GTR_ID</text:p>
          </table:table-cell>
          <table:table-cell office:value-type="string">
            <text:p>등록자 아이디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CHDL_CN</text:p>
          </table:table-cell>
          <table:table-cell office:value-type="string">
            <text:p>일정 내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TILITY_PROVIDER_NO</text:p>
          </table:table-cell>
          <table:table-cell office:value-type="string">
            <text:p>검침 제공자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3">
            <text:p>33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CTRT MGR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TRT_MG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CTRT MGR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TRT_MGR_NO</text:p>
          </table:table-cell>
          <table:table-cell office:value-type="string">
            <text:p>계약 MGR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GR_ASGN_DT</text:p>
          </table:table-cell>
          <table:table-cell office:value-type="string">
            <text:p>MGR ASGN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G_YN</text:p>
          </table:table-cell>
          <table:table-cell office:value-type="string">
            <text:p>CHG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NT_CTRT_NO</text:p>
          </table:table-cell>
          <table:table-cell office:value-type="string">
            <text:p>임대 계약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4">
            <text:p>34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CTRT PAY 이력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TRT_PAY_HSTR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CTRT PAY 이력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TRT_PAY_NO</text:p>
          </table:table-cell>
          <table:table-cell office:value-type="string">
            <text:p>계약 결제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Y_TY_CD</text:p>
          </table:table-cell>
          <table:table-cell office:value-type="string">
            <text:p>결제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Y_AMT</text:p>
          </table:table-cell>
          <table:table-cell office:value-type="string">
            <text:p>결제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Y_DT</text:p>
          </table:table-cell>
          <table:table-cell office:value-type="string">
            <text:p>결제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AY_STTS_CD</text:p>
          </table:table-cell>
          <table:table-cell office:value-type="string">
            <text:p>결제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Y_MTHD_CD</text:p>
          </table:table-cell>
          <table:table-cell office:value-type="string">
            <text:p>결제 수단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NT_CTRT_NO</text:p>
          </table:table-cell>
          <table:table-cell office:value-type="string">
            <text:p>임대 계약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5">
            <text:p>3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민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VP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민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VPL_NO</text:p>
          </table:table-cell>
          <table:table-cell office:value-type="string">
            <text:p>민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VPL_TY_CD</text:p>
          </table:table-cell>
          <table:table-cell office:value-type="string">
            <text:p>민원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VPL_LOC</text:p>
          </table:table-cell>
          <table:table-cell office:value-type="string">
            <text:p>민원 위치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VPL_CN</text:p>
          </table:table-cell>
          <table:table-cell office:value-type="string">
            <text:p>민원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VPL_STTS_CD</text:p>
          </table:table-cell>
          <table:table-cell office:value-type="string">
            <text:p>민원 상태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VPL_REG_DT</text:p>
          </table:table-cell>
          <table:table-cell office:value-type="string">
            <text:p>민원 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VPL_MDF_DT</text:p>
          </table:table-cell>
          <table:table-cell office:value-type="string">
            <text:p>민원 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VPL_RCPT_DT</text:p>
          </table:table-cell>
          <table:table-cell office:value-type="string">
            <text:p>민원 수신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VPL_END_DT</text:p>
          </table:table-cell>
          <table:table-cell office:value-type="string">
            <text:p>민원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VPL_PRRT</text:p>
          </table:table-cell>
          <table:table-cell office:value-type="string">
            <text:p>민원 우선순위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VPL_FILE_NO</text:p>
          </table:table-cell>
          <table:table-cell office:value-type="string">
            <text:p>민원 파일 번호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VPL_TTL</text:p>
          </table:table-cell>
          <table:table-cell office:value-type="string">
            <text:p>민원 제목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6">
            <text:p>3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민원 AI ANLS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VPL_AI_ANLS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민원 AI ANLS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LS_NO</text:p>
          </table:table-cell>
          <table:table-cell office:value-type="string">
            <text:p>분석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ISK_SCR</text:p>
          </table:table-cell>
          <table:table-cell office:value-type="string">
            <text:p>위험 점수</text:p>
          </table:table-cell>
          <table:table-cell office:value-type="string">
            <text:p>N/A</text:p>
          </table:table-cell>
          <table:table-cell office:value-type="string">
            <text:p>NUMBER(3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ISK_GRAD</text:p>
          </table:table-cell>
          <table:table-cell office:value-type="string">
            <text:p>위험 등급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RED_CTGRY</text:p>
          </table:table-cell>
          <table:table-cell office:value-type="string">
            <text:p>예측 분류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N_RISK_CN</text:p>
          </table:table-cell>
          <table:table-cell office:value-type="string">
            <text:p>연쇄 위험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LS_DT</text:p>
          </table:table-cell>
          <table:table-cell office:value-type="string">
            <text:p>분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VPL_NO</text:p>
          </table:table-cell>
          <table:table-cell office:value-type="string">
            <text:p>민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7">
            <text:p>37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민원 이력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CVPL_HSTR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민원 이력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VPL_HSTRY_ID</text:p>
          </table:table-cell>
          <table:table-cell office:value-type="string">
            <text:p>민원 이력 아이디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VPL_ANS</text:p>
          </table:table-cell>
          <table:table-cell office:value-type="string">
            <text:p>민원 답변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IC_ID</text:p>
          </table:table-cell>
          <table:table-cell office:value-type="string">
            <text:p>담당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VPL_REG_DT</text:p>
          </table:table-cell>
          <table:table-cell office:value-type="string">
            <text:p>민원 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VPL_STTS_CD</text:p>
          </table:table-cell>
          <table:table-cell office:value-type="string">
            <text:p>민원 상태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VPL_NO</text:p>
          </table:table-cell>
          <table:table-cell office:value-type="string">
            <text:p>민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8">
            <text:p>38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EXPENSE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EXPENS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EXPENSE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XPENSE_NO</text:p>
          </table:table-cell>
          <table:table-cell office:value-type="string">
            <text:p>지출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ENSE_YR</text:p>
          </table:table-cell>
          <table:table-cell office:value-type="string">
            <text:p>지출 연도</text:p>
          </table:table-cell>
          <table:table-cell office:value-type="string">
            <text:p>N/A</text:p>
          </table:table-cell>
          <table:table-cell office:value-type="string">
            <text:p>NUMBER(4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PENSE_MM</text:p>
          </table:table-cell>
          <table:table-cell office:value-type="string">
            <text:p>지출 월</text:p>
          </table:table-cell>
          <table:table-cell office:value-type="string">
            <text:p>N/A</text:p>
          </table:table-cell>
          <table:table-cell office:value-type="string">
            <text:p>NUMBER(2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PENSE_AMT</text:p>
          </table:table-cell>
          <table:table-cell office:value-type="string">
            <text:p>지출 금액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XPENSE_CD</text:p>
          </table:table-cell>
          <table:table-cell office:value-type="string">
            <text:p>지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XPENSE_CN</text:p>
          </table:table-cell>
          <table:table-cell office:value-type="string">
            <text:p>지출 내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MRK_CN</text:p>
          </table:table-cell>
          <table:table-cell office:value-type="string">
            <text:p>비고 내용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39">
            <text:p>39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시설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FACILIT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시설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CILITY_NO</text:p>
          </table:table-cell>
          <table:table-cell office:value-type="string">
            <text:p>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ACILITY_TY_CD</text:p>
          </table:table-cell>
          <table:table-cell office:value-type="string">
            <text:p>시설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STL_DT</text:p>
          </table:table-cell>
          <table:table-cell office:value-type="string">
            <text:p>설치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ACILITY_NM</text:p>
          </table:table-cell>
          <table:table-cell office:value-type="string">
            <text:p>시설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ONG_NO</text:p>
          </table:table-cell>
          <table:table-cell office:value-type="string">
            <text:p>동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OC_CN</text:p>
          </table:table-cell>
          <table:table-cell office:value-type="string">
            <text:p>위치 내용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ILE_GROUP_NO</text:p>
          </table:table-cell>
          <table:table-cell office:value-type="string">
            <text:p>파일 그룹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0">
            <text:p>40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시설 점검 이력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FACILITY_CHECK_HSTR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시설 점검 이력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C_CHK_HSTRY_NO</text:p>
          </table:table-cell>
          <table:table-cell office:value-type="string">
            <text:p>시설 점검 이력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ACILITY_NO</text:p>
          </table:table-cell>
          <table:table-cell office:value-type="string">
            <text:p>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RTNER_NO</text:p>
          </table:table-cell>
          <table:table-cell office:value-type="string">
            <text:p>업체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K_DT</text:p>
          </table:table-cell>
          <table:table-cell office:value-type="string">
            <text:p>점검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K_STTS_CD</text:p>
          </table:table-cell>
          <table:table-cell office:value-type="string">
            <text:p>점검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HK_CN</text:p>
          </table:table-cell>
          <table:table-cell office:value-type="string">
            <text:p>점검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MK</text:p>
          </table:table-cell>
          <table:table-cell office:value-type="string">
            <text:p>비고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HK_TY_CD</text:p>
          </table:table-cell>
          <table:table-cell office:value-type="string">
            <text:p>점검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HK_FLOW_NO</text:p>
          </table:table-cell>
          <table:table-cell office:value-type="string">
            <text:p>점검 흐름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ONT_NO</text:p>
          </table:table-cell>
          <table:table-cell office:value-type="string">
            <text:p>계약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SE_RESTRICT_YN</text:p>
          </table:table-cell>
          <table:table-cell office:value-type="string">
            <text:p>USE 제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SE_RESTRICT_BGNG_DT</text:p>
          </table:table-cell>
          <table:table-cell office:value-type="string">
            <text:p>USE 제한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SE_RESTRICT_END_DT</text:p>
          </table:table-cell>
          <table:table-cell office:value-type="string">
            <text:p>USE 제한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HK_CTGRY_CD</text:p>
          </table:table-cell>
          <table:table-cell office:value-type="string">
            <text:p>점검 분류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1">
            <text:p>4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시설 계약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FACILITY_CONTRAC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시설 계약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T_NO</text:p>
          </table:table-cell>
          <table:table-cell office:value-type="string">
            <text:p>계약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ACILITY_NO</text:p>
          </table:table-cell>
          <table:table-cell office:value-type="string">
            <text:p>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RTNER_NO</text:p>
          </table:table-cell>
          <table:table-cell office:value-type="string">
            <text:p>업체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NT_NM</text:p>
          </table:table-cell>
          <table:table-cell office:value-type="string">
            <text:p>계약 명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ID_TY_CD</text:p>
          </table:table-cell>
          <table:table-cell office:value-type="string">
            <text:p>입찰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ONT_DT</text:p>
          </table:table-cell>
          <table:table-cell office:value-type="string">
            <text:p>계약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NT_STTS_CD</text:p>
          </table:table-cell>
          <table:table-cell office:value-type="string">
            <text:p>계약 상태 코드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NT_AMT</text:p>
          </table:table-cell>
          <table:table-cell office:value-type="string">
            <text:p>계약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YMT_DT</text:p>
          </table:table-cell>
          <table:table-cell office:value-type="string">
            <text:p>납부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T_BGNG_DT</text:p>
          </table:table-cell>
          <table:table-cell office:value-type="string">
            <text:p>계약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ONT_END_DT</text:p>
          </table:table-cell>
          <table:table-cell office:value-type="string">
            <text:p>계약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ONT_TY_CD</text:p>
          </table:table-cell>
          <table:table-cell office:value-type="string">
            <text:p>계약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NT_TARGET_CD</text:p>
          </table:table-cell>
          <table:table-cell office:value-type="string">
            <text:p>계약 대상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ONT_CN</text:p>
          </table:table-cell>
          <table:table-cell office:value-type="string">
            <text:p>계약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MRK_CN</text:p>
          </table:table-cell>
          <table:table-cell office:value-type="string">
            <text:p>비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ILE_GROUP_NO</text:p>
          </table:table-cell>
          <table:table-cell office:value-type="string">
            <text:p>파일 그룹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2">
            <text:p>42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시설 계약 대상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FACILITY_CONTRACT_TARGE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시설 계약 대상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T_NO</text:p>
          </table:table-cell>
          <table:table-cell office:value-type="string">
            <text:p>계약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ACILITY_NO</text:p>
          </table:table-cell>
          <table:table-cell office:value-type="string">
            <text:p>시설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3">
            <text:p>43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시설 이력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FACILITY_HSTR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시설 이력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SVT_NO</text:p>
          </table:table-cell>
          <table:table-cell office:value-type="string">
            <text:p>예약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MN_FACILITY_ITEM_NO</text:p>
          </table:table-cell>
          <table:table-cell office:value-type="string">
            <text:p>공용 시설 자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SVT_DT</text:p>
          </table:table-cell>
          <table:table-cell office:value-type="string">
            <text:p>예약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SVT_BGNG_DTTM</text:p>
          </table:table-cell>
          <table:table-cell office:value-type="string">
            <text:p>예약 시작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SVT_END_DTTM</text:p>
          </table:table-cell>
          <table:table-cell office:value-type="string">
            <text:p>예약 종료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SVT_STTS_CD</text:p>
          </table:table-cell>
          <table:table-cell office:value-type="string">
            <text:p>예약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_PRSN_CNT</text:p>
          </table:table-cell>
          <table:table-cell office:value-type="string">
            <text:p>USE 인원 건수</text:p>
          </table:table-cell>
          <table:table-cell office:value-type="string">
            <text:p>N/A</text:p>
          </table:table-cell>
          <table:table-cell office:value-type="string">
            <text:p>NUMBER(5,0)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SE_PRPS_CN</text:p>
          </table:table-cell>
          <table:table-cell office:value-type="string">
            <text:p>USE 목적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JCT_RSN_CN</text:p>
          </table:table-cell>
          <table:table-cell office:value-type="string">
            <text:p>반려 사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4">
            <text:p>44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세대 HEAD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HSHLD_HEAD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세대 HEAD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OUT_CD</text:p>
          </table:table-cell>
          <table:table-cell office:value-type="string">
            <text:p>입퇴거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OVE_IN_DT</text:p>
          </table:table-cell>
          <table:table-cell office:value-type="string">
            <text:p>이동 입주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OVE_OUT_DT</text:p>
          </table:table-cell>
          <table:table-cell office:value-type="string">
            <text:p>이동 퇴거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EAD_YN</text:p>
          </table:table-cell>
          <table:table-cell office:value-type="string">
            <text:p>세대주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5">
            <text:p>45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세대 구성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HSHLD_MEMBE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세대 구성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SHLD_MBR_NM</text:p>
          </table:table-cell>
          <table:table-cell office:value-type="string">
            <text:p>세대 구성원 명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6">
            <text:p>46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KAKAO ALIM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KAKAO_ALIM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KAKAO ALIM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IM_NO</text:p>
          </table:table-cell>
          <table:table-cell office:value-type="string">
            <text:p>알림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IM_TY_CD</text:p>
          </table:table-cell>
          <table:table-cell office:value-type="string">
            <text:p>알림 유형 코드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IM_TTL</text:p>
          </table:table-cell>
          <table:table-cell office:value-type="string">
            <text:p>알림 제목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IM_CN</text:p>
          </table:table-cell>
          <table:table-cell office:value-type="string">
            <text:p>알림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INK_URL</text:p>
          </table:table-cell>
          <table:table-cell office:value-type="string">
            <text:p>링크 URL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AD_YN</text:p>
          </table:table-cell>
          <table:table-cell office:value-type="string">
            <text:p>열람 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ND_DTTM</text:p>
          </table:table-cell>
          <table:table-cell office:value-type="string">
            <text:p>발송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GTR_ID</text:p>
          </table:table-cell>
          <table:table-cell office:value-type="string">
            <text:p>등록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7">
            <text:p>4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LAW DONG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LAW_DONG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LAW DONG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WD_CD</text:p>
          </table:table-cell>
          <table:table-cell office:value-type="string">
            <text:p>법정동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DO_NM</text:p>
          </table:table-cell>
          <table:table-cell office:value-type="string">
            <text:p>시도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IGUNGU_NM</text:p>
          </table:table-cell>
          <table:table-cell office:value-type="string">
            <text:p>시군구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ONG_NM</text:p>
          </table:table-cell>
          <table:table-cell office:value-type="string">
            <text:p>동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I_NM</text:p>
          </table:table-cell>
          <table:table-cell office:value-type="string">
            <text:p>리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8">
            <text:p>4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ANAGE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GMT_OFC_NO</text:p>
          </table:table-cell>
          <table:table-cell office:value-type="string">
            <text:p>관리 사무소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NGR_DUTY_CD</text:p>
          </table:table-cell>
          <table:table-cell office:value-type="string">
            <text:p>관리자 직무 코드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49">
            <text:p>49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회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EMBE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회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ID</text:p>
          </table:table-cell>
          <table:table-cell office:value-type="string">
            <text:p>사용자 아이디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U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SER_PW</text:p>
          </table:table-cell>
          <table:table-cell office:value-type="string">
            <text:p>사용자 비밀번호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SER_NM</text:p>
          </table:table-cell>
          <table:table-cell office:value-type="string">
            <text:p>사용자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R_RRNO</text:p>
          </table:table-cell>
          <table:table-cell office:value-type="string">
            <text:p>사용자 주민등록번호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R_TELNO</text:p>
          </table:table-cell>
          <table:table-cell office:value-type="string">
            <text:p>사용자 전화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R_EML</text:p>
          </table:table-cell>
          <table:table-cell office:value-type="string">
            <text:p>사용자 이메일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R_YN</text:p>
          </table:table-cell>
          <table:table-cell office:value-type="string">
            <text:p>사용자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MS_RCV_YN</text:p>
          </table:table-cell>
          <table:table-cell office:value-type="string">
            <text:p>문자 수신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MS_NTC_RCV_YN</text:p>
          </table:table-cell>
          <table:table-cell office:value-type="string">
            <text:p>문자 공지 수신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MS_CTRT_RCV_YN</text:p>
          </table:table-cell>
          <table:table-cell office:value-type="string">
            <text:p>문자 계약 수신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ML_RCV_YN</text:p>
          </table:table-cell>
          <table:table-cell office:value-type="string">
            <text:p>이메일 수신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EML_NTC_RCV_YN</text:p>
          </table:table-cell>
          <table:table-cell office:value-type="string">
            <text:p>이메일 공지 수신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ML_CTRT_RCV_YN</text:p>
          </table:table-cell>
          <table:table-cell office:value-type="string">
            <text:p>이메일 계약 수신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ROF_FILE_ID</text:p>
          </table:table-cell>
          <table:table-cell office:value-type="string">
            <text:p>PROF 파일 아이디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0">
            <text:p>50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검침 이력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ETER_HSTR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검침 이력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TER_HSTRY_NO</text:p>
          </table:table-cell>
          <table:table-cell office:value-type="string">
            <text:p>검침 이력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ACILITY_NO</text:p>
          </table:table-cell>
          <table:table-cell office:value-type="string">
            <text:p>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ETER_DT</text:p>
          </table:table-cell>
          <table:table-cell office:value-type="string">
            <text:p>검침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E_VAL</text:p>
          </table:table-cell>
          <table:table-cell office:value-type="string">
            <text:p>전월 지침 값</text:p>
          </table:table-cell>
          <table:table-cell office:value-type="string">
            <text:p>N/A</text:p>
          </table:table-cell>
          <table:table-cell office:value-type="string">
            <text:p>NUMBER(10,2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URR_VAL</text:p>
          </table:table-cell>
          <table:table-cell office:value-type="string">
            <text:p>당월 지침 값</text:p>
          </table:table-cell>
          <table:table-cell office:value-type="string">
            <text:p>N/A</text:p>
          </table:table-cell>
          <table:table-cell office:value-type="string">
            <text:p>NUMBER(10,2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TER_CN</text:p>
          </table:table-cell>
          <table:table-cell office:value-type="string">
            <text:p>검침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ETER_RSLT_CD</text:p>
          </table:table-cell>
          <table:table-cell office:value-type="string">
            <text:p>검침 결과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TILITY_PROVIDER_NO</text:p>
          </table:table-cell>
          <table:table-cell office:value-type="string">
            <text:p>검침 제공자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ETER_TY_CD</text:p>
          </table:table-cell>
          <table:table-cell office:value-type="string">
            <text:p>검침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ETER_SCOPE</text:p>
          </table:table-cell>
          <table:table-cell office:value-type="string">
            <text:p>검침 범위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1">
            <text:p>51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검침 업로드 이력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ETER_UPLOAD_HSTR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검침 업로드 이력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TER_UPLOAD_HSTRY_NO</text:p>
          </table:table-cell>
          <table:table-cell office:value-type="string">
            <text:p>검침 업로드 이력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TILITY_PROVIDER_NO</text:p>
          </table:table-cell>
          <table:table-cell office:value-type="string">
            <text:p>검침 제공자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ILE_GROUP_NO</text:p>
          </table:table-cell>
          <table:table-cell office:value-type="string">
            <text:p>파일 그룹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PLOAD_DT</text:p>
          </table:table-cell>
          <table:table-cell office:value-type="string">
            <text:p>업로드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PLOAD_USER_NO</text:p>
          </table:table-cell>
          <table:table-cell office:value-type="string">
            <text:p>업로드 사용자 번호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OTAL_CNT</text:p>
          </table:table-cell>
          <table:table-cell office:value-type="string">
            <text:p>전체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ot 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PLOAD_STTS_CD</text:p>
          </table:table-cell>
          <table:table-cell office:value-type="string">
            <text:p>업로드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RR_CN</text:p>
          </table:table-cell>
          <table:table-cell office:value-type="string">
            <text:p>오류 내용</text:p>
          </table:table-cell>
          <table:table-cell office:value-type="string">
            <text:p>N/A</text:p>
          </table:table-cell>
          <table:table-cell office:value-type="string">
            <text:p>VARCHAR2(2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MRK_CN</text:p>
          </table:table-cell>
          <table:table-cell office:value-type="string">
            <text:p>비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2">
            <text:p>52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 사무소 BANK ACNT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GMT_OFC_BANK_ACN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 사무소 BANK ACNT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FC_BANK_ACNT_NO</text:p>
          </table:table-cell>
          <table:table-cell office:value-type="string">
            <text:p>사무소 은행 계좌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GMT_OFC_ACNT_NO</text:p>
          </table:table-cell>
          <table:table-cell office:value-type="string">
            <text:p>관리 사무소 계좌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GMT_OFC_ACNT_HLDR_NM</text:p>
          </table:table-cell>
          <table:table-cell office:value-type="string">
            <text:p>관리 사무소 계좌 예금주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GMT_OFC_BANK_CD</text:p>
          </table:table-cell>
          <table:table-cell office:value-type="string">
            <text:p>관리 사무소 은행 코드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GMT_OFC_NO</text:p>
          </table:table-cell>
          <table:table-cell office:value-type="string">
            <text:p>관리 사무소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3">
            <text:p>53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 OFFICE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GMT_OFFIC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 OFFICE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GMT_OFC_NO</text:p>
          </table:table-cell>
          <table:table-cell office:value-type="string">
            <text:p>관리 사무소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GMT_OFC_NM</text:p>
          </table:table-cell>
          <table:table-cell office:value-type="string">
            <text:p>관리 사무소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GMT_OFC_TELNO</text:p>
          </table:table-cell>
          <table:table-cell office:value-type="string">
            <text:p>관리 사무소 전화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GMT_OFC_EML</text:p>
          </table:table-cell>
          <table:table-cell office:value-type="string">
            <text:p>관리 사무소 이메일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4">
            <text:p>54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 OPR TM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GMT_OPR_TM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 OPR TM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PR_TM_NO</text:p>
          </table:table-cell>
          <table:table-cell office:value-type="string">
            <text:p>운영 시간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GMT_OFC_NO</text:p>
          </table:table-cell>
          <table:table-cell office:value-type="string">
            <text:p>관리 사무소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Y_CD</text:p>
          </table:table-cell>
          <table:table-cell office:value-type="string">
            <text:p>DAY 코드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PR_ST_TM</text:p>
          </table:table-cell>
          <table:table-cell office:value-type="string">
            <text:p>운영 ST 시간</text:p>
          </table:table-cell>
          <table:table-cell office:value-type="string">
            <text:p>N/A</text:p>
          </table:table-cell>
          <table:table-cell office:value-type="string">
            <text:p>VARCHAR2(4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PR_ED_TM</text:p>
          </table:table-cell>
          <table:table-cell office:value-type="string">
            <text:p>운영 ED 시간</text:p>
          </table:table-cell>
          <table:table-cell office:value-type="string">
            <text:p>N/A</text:p>
          </table:table-cell>
          <table:table-cell office:value-type="string">
            <text:p>VARCHAR2(4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RK_ST_TM</text:p>
          </table:table-cell>
          <table:table-cell office:value-type="string">
            <text:p>BRK ST 시간</text:p>
          </table:table-cell>
          <table:table-cell office:value-type="string">
            <text:p>N/A</text:p>
          </table:table-cell>
          <table:table-cell office:value-type="string">
            <text:p>VARCHAR2(4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RK_ED_TM</text:p>
          </table:table-cell>
          <table:table-cell office:value-type="string">
            <text:p>BRK ED 시간</text:p>
          </table:table-cell>
          <table:table-cell office:value-type="string">
            <text:p>N/A</text:p>
          </table:table-cell>
          <table:table-cell office:value-type="string">
            <text:p>VARCHAR2(4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FF_YN</text:p>
          </table:table-cell>
          <table:table-cell office:value-type="string">
            <text:p>사무소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5">
            <text:p>5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자 생성 요청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NGR_RQ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자 생성 요청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QST_NO</text:p>
          </table:table-cell>
          <table:table-cell office:value-type="string">
            <text:p>요청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QST_LOGIN_ID</text:p>
          </table:table-cell>
          <table:table-cell office:value-type="string">
            <text:p>요청 로그인 아이디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QST_MNGR_NM</text:p>
          </table:table-cell>
          <table:table-cell office:value-type="string">
            <text:p>요청 관리자 명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QST_DUTY_CD</text:p>
          </table:table-cell>
          <table:table-cell office:value-type="string">
            <text:p>요청 직무 코드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QST_DT</text:p>
          </table:table-cell>
          <table:table-cell office:value-type="string">
            <text:p>요청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QST_STTS_CD</text:p>
          </table:table-cell>
          <table:table-cell office:value-type="string">
            <text:p>요청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PRV_DT</text:p>
          </table:table-cell>
          <table:table-cell office:value-type="string">
            <text:p>승인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PRV_ID</text:p>
          </table:table-cell>
          <table:table-cell office:value-type="string">
            <text:p>승인 아이디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JCT_RSN_CN</text:p>
          </table:table-cell>
          <table:table-cell office:value-type="string">
            <text:p>반려 사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MRK_CN</text:p>
          </table:table-cell>
          <table:table-cell office:value-type="string">
            <text:p>비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CNT_DSPLY_YN</text:p>
          </table:table-cell>
          <table:table-cell office:value-type="string">
            <text:p>계좌 표시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6">
            <text:p>5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관리자 VACATION SCHDL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MNGR_VACATION_SCHD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관리자 VACATION SCHDL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ACATION_SCHDL_NO</text:p>
          </table:table-cell>
          <table:table-cell office:value-type="string">
            <text:p>휴가 일정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CHDL_BGNG_DT</text:p>
          </table:table-cell>
          <table:table-cell office:value-type="string">
            <text:p>일정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CHDL_END_DT</text:p>
          </table:table-cell>
          <table:table-cell office:value-type="string">
            <text:p>일정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CHDL_TTL</text:p>
          </table:table-cell>
          <table:table-cell office:value-type="string">
            <text:p>일정 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LOR_CD</text:p>
          </table:table-cell>
          <table:table-cell office:value-type="string">
            <text:p>색상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7">
            <text:p>57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공지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NOTIC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공지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N_NO</text:p>
          </table:table-cell>
          <table:table-cell office:value-type="string">
            <text:p>공고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ARD_NO</text:p>
          </table:table-cell>
          <table:table-cell office:value-type="string">
            <text:p>게시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TL</text:p>
          </table:table-cell>
          <table:table-cell office:value-type="string">
            <text:p>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N</text:p>
          </table:table-cell>
          <table:table-cell office:value-type="string">
            <text:p>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TR_ID</text:p>
          </table:table-cell>
          <table:table-cell office:value-type="string">
            <text:p>작성자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OP_FXD_YN</text:p>
          </table:table-cell>
          <table:table-cell office:value-type="string">
            <text:p>상단 FXD 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LANC_BGNG_DT</text:p>
          </table:table-cell>
          <table:table-cell office:value-type="string">
            <text:p>PBLANC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LANC_END_DT</text:p>
          </table:table-cell>
          <table:table-cell office:value-type="string">
            <text:p>PBLANC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CRT_BGNG_DT</text:p>
          </table:table-cell>
          <table:table-cell office:value-type="string">
            <text:p>모집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CRT_END_DT</text:p>
          </table:table-cell>
          <table:table-cell office:value-type="string">
            <text:p>모집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G_DTTM</text:p>
          </table:table-cell>
          <table:table-cell office:value-type="string">
            <text:p>등록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DF_DTTM</text:p>
          </table:table-cell>
          <table:table-cell office:value-type="string">
            <text:p>수정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Q_CNT</text:p>
          </table:table-cell>
          <table:table-cell office:value-type="string">
            <text:p>조회 건수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EL_YN</text:p>
          </table:table-cell>
          <table:table-cell office:value-type="string">
            <text:p>삭제 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8">
            <text:p>58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NOTIFICATION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NOTIFICATION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NOTIFICATION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TIFICATION_NO</text:p>
          </table:table-cell>
          <table:table-cell office:value-type="string">
            <text:p>알림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RGT_TY_CD</text:p>
          </table:table-cell>
          <table:table-cell office:value-type="string">
            <text:p>대상 유형 코드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RGT_NO</text:p>
          </table:table-cell>
          <table:table-cell office:value-type="string">
            <text:p>대상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TCN_TY_CD</text:p>
          </table:table-cell>
          <table:table-cell office:value-type="string">
            <text:p>알림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TCN_CN</text:p>
          </table:table-cell>
          <table:table-cell office:value-type="string">
            <text:p>알림 내용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AD_YN</text:p>
          </table:table-cell>
          <table:table-cell office:value-type="string">
            <text:p>열람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TCN_TTL</text:p>
          </table:table-cell>
          <table:table-cell office:value-type="string">
            <text:p>알림 제목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59">
            <text:p>59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협력업체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PARTNE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협력업체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RTNER_NO</text:p>
          </table:table-cell>
          <table:table-cell office:value-type="string">
            <text:p>업체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IZ_TY_NM</text:p>
          </table:table-cell>
          <table:table-cell office:value-type="string">
            <text:p>업종 유형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RTNER_NM</text:p>
          </table:table-cell>
          <table:table-cell office:value-type="string">
            <text:p>업체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IZRNO</text:p>
          </table:table-cell>
          <table:table-cell office:value-type="string">
            <text:p>사업자등록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_YN</text:p>
          </table:table-cell>
          <table:table-cell office:value-type="string">
            <text:p>사용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ot Null</text:p>
          </table:table-cell>
          <table:table-cell office:value-type="string">
            <text:p>'Y'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IC_NM</text:p>
          </table:table-cell>
          <table:table-cell office:value-type="string">
            <text:p>담당자 명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IC_TELNO</text:p>
          </table:table-cell>
          <table:table-cell office:value-type="string">
            <text:p>담당자 전화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IC_EMAIL</text:p>
          </table:table-cell>
          <table:table-cell office:value-type="string">
            <text:p>담당자 이메일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0">
            <text:p>60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결제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PAYMEN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결제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YMT_NO</text:p>
          </table:table-cell>
          <table:table-cell office:value-type="string">
            <text:p>납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ILL_NO</text:p>
          </table:table-cell>
          <table:table-cell office:value-type="string">
            <text:p>관리비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MP_UID</text:p>
          </table:table-cell>
          <table:table-cell office:value-type="string">
            <text:p>포트원 UID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Y_MTHD_CD</text:p>
          </table:table-cell>
          <table:table-cell office:value-type="string">
            <text:p>결제 수단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AY_AMT</text:p>
          </table:table-cell>
          <table:table-cell office:value-type="string">
            <text:p>결제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Y_STTS_CD</text:p>
          </table:table-cell>
          <table:table-cell office:value-type="string">
            <text:p>결제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_REQ_DT</text:p>
          </table:table-cell>
          <table:table-cell office:value-type="string">
            <text:p>결제 요청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AY_CMPL_DT</text:p>
          </table:table-cell>
          <table:table-cell office:value-type="string">
            <text:p>결제 완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AIL_RSN_CN</text:p>
          </table:table-cell>
          <table:table-cell office:value-type="string">
            <text:p>실패 사유 내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RD_ID</text:p>
          </table:table-cell>
          <table:table-cell office:value-type="string">
            <text:p>순서 아이디</text:p>
          </table:table-cell>
          <table:table-cell office:value-type="string">
            <text:p>N/A</text:p>
          </table:table-cell>
          <table:table-cell office:value-type="string">
            <text:p>VARCHAR2(2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1">
            <text:p>6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공용시설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PUBLIC_FACILIT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공용시설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MN_FACILITY_NO</text:p>
          </table:table-cell>
          <table:table-cell office:value-type="string">
            <text:p>공용 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ACILITY_NO</text:p>
          </table:table-cell>
          <table:table-cell office:value-type="string">
            <text:p>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MN_FACILITY_NM</text:p>
          </table:table-cell>
          <table:table-cell office:value-type="string">
            <text:p>공용 시설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MN_FACILITY_CN</text:p>
          </table:table-cell>
          <table:table-cell office:value-type="string">
            <text:p>공용 시설 내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MN_FACILITY_AMT</text:p>
          </table:table-cell>
          <table:table-cell office:value-type="string">
            <text:p>공용 시설 금액</text:p>
          </table:table-cell>
          <table:table-cell office:value-type="string">
            <text:p>N/A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MN_FACILITY_RSV_YN</text:p>
          </table:table-cell>
          <table:table-cell office:value-type="string">
            <text:p>공용 시설 예약 여부</text:p>
          </table:table-cell>
          <table:table-cell office:value-type="string">
            <text:p>N/A</text:p>
          </table:table-cell>
          <table:table-cell office:value-type="string">
            <text:p>VARCHAR2(1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N_FACILITY_OPR_HR</text:p>
          </table:table-cell>
          <table:table-cell office:value-type="string">
            <text:p>공용 시설 운영 HR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2">
            <text:p>62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공용시설 자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PUBLIC_ITEM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공용시설 자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MN_FACILITY_ITEM_NO</text:p>
          </table:table-cell>
          <table:table-cell office:value-type="string">
            <text:p>공용 시설 자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MN_FACILITY_NO</text:p>
          </table:table-cell>
          <table:table-cell office:value-type="string">
            <text:p>공용 시설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TEM_NM</text:p>
          </table:table-cell>
          <table:table-cell office:value-type="string">
            <text:p>자원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MN_FACILITY_STTS_CD</text:p>
          </table:table-cell>
          <table:table-cell office:value-type="string">
            <text:p>공용 시설 상태 코드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3">
            <text:p>63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환불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REFUND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환불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UND_NO</text:p>
          </table:table-cell>
          <table:table-cell office:value-type="string">
            <text:p>환불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FND_AMT</text:p>
          </table:table-cell>
          <table:table-cell office:value-type="string">
            <text:p>환불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FND_STTS_CD</text:p>
          </table:table-cell>
          <table:table-cell office:value-type="string">
            <text:p>환불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FND_DT</text:p>
          </table:table-cell>
          <table:table-cell office:value-type="string">
            <text:p>환불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FND_RSN_CN</text:p>
          </table:table-cell>
          <table:table-cell office:value-type="string">
            <text:p>환불 사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YMT_NO</text:p>
          </table:table-cell>
          <table:table-cell office:value-type="string">
            <text:p>납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4">
            <text:p>64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임대 CTRT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RENT_CTR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임대 CTRT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NT_CTRT_NO</text:p>
          </table:table-cell>
          <table:table-cell office:value-type="string">
            <text:p>임대 계약 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T_LSTG_NO</text:p>
          </table:table-cell>
          <table:table-cell office:value-type="string">
            <text:p>임대 매물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VOUT_DT</text:p>
          </table:table-cell>
          <table:table-cell office:value-type="string">
            <text:p>퇴거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VOUT_CMPL_DT</text:p>
          </table:table-cell>
          <table:table-cell office:value-type="string">
            <text:p>퇴거 완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TRT_STTS_CD</text:p>
          </table:table-cell>
          <table:table-cell office:value-type="string">
            <text:p>계약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TRT_AMT</text:p>
          </table:table-cell>
          <table:table-cell office:value-type="string">
            <text:p>계약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ID_PAY_AMT</text:p>
          </table:table-cell>
          <table:table-cell office:value-type="string">
            <text:p>MID 결제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L_AMT</text:p>
          </table:table-cell>
          <table:table-cell office:value-type="string">
            <text:p>BAL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PST_AMT</text:p>
          </table:table-cell>
          <table:table-cell office:value-type="string">
            <text:p>보증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THLY_RENT_AMT</text:p>
          </table:table-cell>
          <table:table-cell office:value-type="string">
            <text:p>월 임대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NTOR_NM</text:p>
          </table:table-cell>
          <table:table-cell office:value-type="string">
            <text:p>임대인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ENTOR_TELNO</text:p>
          </table:table-cell>
          <table:table-cell office:value-type="string">
            <text:p>임대인 전화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GNT_NM</text:p>
          </table:table-cell>
          <table:table-cell office:value-type="string">
            <text:p>대리인 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GNT_TELNO</text:p>
          </table:table-cell>
          <table:table-cell office:value-type="string">
            <text:p>대리인 전화번호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PCL_STPLTN_CN</text:p>
          </table:table-cell>
          <table:table-cell office:value-type="string">
            <text:p>특약 약정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BMSN_DOC_NO</text:p>
          </table:table-cell>
          <table:table-cell office:value-type="string">
            <text:p>제출 문서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TRT_APRV_DT</text:p>
          </table:table-cell>
          <table:table-cell office:value-type="string">
            <text:p>계약 승인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VIN_DT</text:p>
          </table:table-cell>
          <table:table-cell office:value-type="string">
            <text:p>입주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5">
            <text:p>6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임대 CTRT DOC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RENT_CTRT_DOC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임대 CTRT DOC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BMSN_DOC_TY_CD</text:p>
          </table:table-cell>
          <table:table-cell office:value-type="string">
            <text:p>제출 문서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T_LSTG_NO</text:p>
          </table:table-cell>
          <table:table-cell office:value-type="string">
            <text:p>임대 매물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6">
            <text:p>6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임대 매물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RENT_LISTING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임대 매물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NT_LSTG_NO</text:p>
          </table:table-cell>
          <table:table-cell office:value-type="string">
            <text:p>임대 매물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T_TYPE_CD</text:p>
          </table:table-cell>
          <table:table-cell office:value-type="string">
            <text:p>임대 유형 코드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PST_AMT</text:p>
          </table:table-cell>
          <table:table-cell office:value-type="string">
            <text:p>보증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THLY_RENT_AMT</text:p>
          </table:table-cell>
          <table:table-cell office:value-type="string">
            <text:p>월 임대 금액</text:p>
          </table:table-cell>
          <table:table-cell office:value-type="string">
            <text:p>N/A</text:p>
          </table:table-cell>
          <table:table-cell office:value-type="string">
            <text:p>NUMBER(15,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NT_LSTG_CN</text:p>
          </table:table-cell>
          <table:table-cell office:value-type="string">
            <text:p>임대 매물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NT_TTL</text:p>
          </table:table-cell>
          <table:table-cell office:value-type="string">
            <text:p>임대 제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CRT_LSTG_STTS_CD</text:p>
          </table:table-cell>
          <table:table-cell office:value-type="string">
            <text:p>모집 매물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AL_STTS_CD</text:p>
          </table:table-cell>
          <table:table-cell office:value-type="string">
            <text:p>거래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VIN_PSBL_DT</text:p>
          </table:table-cell>
          <table:table-cell office:value-type="string">
            <text:p>입주 가능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N_NO</text:p>
          </table:table-cell>
          <table:table-cell office:value-type="string">
            <text:p>공고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7">
            <text:p>67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입주민 요청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RESIDENT_RQS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입주민 요청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QST_NO</text:p>
          </table:table-cell>
          <table:table-cell office:value-type="string">
            <text:p>요청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VIN_PRD_DT</text:p>
          </table:table-cell>
          <table:table-cell office:value-type="string">
            <text:p>입주 예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RV_DT</text:p>
          </table:table-cell>
          <table:table-cell office:value-type="string">
            <text:p>승인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VOUT_RSN_CN</text:p>
          </table:table-cell>
          <table:table-cell office:value-type="string">
            <text:p>퇴거 사유 내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JCT_RSN_CN</text:p>
          </table:table-cell>
          <table:table-cell office:value-type="string">
            <text:p>반려 사유 내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CPT_DT</text:p>
          </table:table-cell>
          <table:table-cell office:value-type="string">
            <text:p>수신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VOUT_PRD_DT</text:p>
          </table:table-cell>
          <table:table-cell office:value-type="string">
            <text:p>퇴거 예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QST_TY_CD</text:p>
          </table:table-cell>
          <table:table-cell office:value-type="string">
            <text:p>요청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NG_NO</text:p>
          </table:table-cell>
          <table:table-cell office:value-type="string">
            <text:p>관리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PCL_CN</text:p>
          </table:table-cell>
          <table:table-cell office:value-type="string">
            <text:p>특약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8">
            <text:p>68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RSID 차량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RSID_VHC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RSID 차량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SID_VHCL_NO</text:p>
          </table:table-cell>
          <table:table-cell office:value-type="string">
            <text:p>입주자 차량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HCL_NM</text:p>
          </table:table-cell>
          <table:table-cell office:value-type="string">
            <text:p>차량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HCL_NO</text:p>
          </table:table-cell>
          <table:table-cell office:value-type="string">
            <text:p>차량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HCL_STTS_CD</text:p>
          </table:table-cell>
          <table:table-cell office:value-type="string">
            <text:p>차량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office:value-type="string">
            <text:p>'WAIT'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HCL_FILE_NO</text:p>
          </table:table-cell>
          <table:table-cell office:value-type="string">
            <text:p>차량 파일 번호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69">
            <text:p>69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SBMSN DOC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SBMSN_DOC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SBMSN DOC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BMSN_DOC_NO</text:p>
          </table:table-cell>
          <table:table-cell office:value-type="string">
            <text:p>제출 문서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BMSN_DOC_TY_CD</text:p>
          </table:table-cell>
          <table:table-cell office:value-type="string">
            <text:p>제출 문서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DFCN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TCH_FILE_ID</text:p>
          </table:table-cell>
          <table:table-cell office:value-type="string">
            <text:p>첨부 파일 아이디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LCT_NO</text:p>
          </table:table-cell>
          <table:table-cell office:value-type="string">
            <text:p>신청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0">
            <text:p>70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문자 SND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SMS_SND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문자 SND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S_NO</text:p>
          </table:table-cell>
          <table:table-cell office:value-type="string">
            <text:p>문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ND_TY_CD</text:p>
          </table:table-cell>
          <table:table-cell office:value-type="string">
            <text:p>발송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MS_TTL</text:p>
          </table:table-cell>
          <table:table-cell office:value-type="string">
            <text:p>문자 제목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MS_CN</text:p>
          </table:table-cell>
          <table:table-cell office:value-type="string">
            <text:p>문자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CPT_TRGT_GRP_CD</text:p>
          </table:table-cell>
          <table:table-cell office:value-type="string">
            <text:p>수신 대상 그룹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CPT_TRGT_CD</text:p>
          </table:table-cell>
          <table:table-cell office:value-type="string">
            <text:p>수신 대상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CPT_USER_NO</text:p>
          </table:table-cell>
          <table:table-cell office:value-type="string">
            <text:p>수신 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ND_STTS_CD</text:p>
          </table:table-cell>
          <table:table-cell office:value-type="string">
            <text:p>발송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ND_DTTM</text:p>
          </table:table-cell>
          <table:table-cell office:value-type="string">
            <text:p>발송 일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GTR_ID</text:p>
          </table:table-cell>
          <table:table-cell office:value-type="string">
            <text:p>등록자 아이디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ND_CNT</text:p>
          </table:table-cell>
          <table:table-cell office:value-type="string">
            <text:p>발송 건수</text:p>
          </table:table-cell>
          <table:table-cell office:value-type="string">
            <text:p>N/A</text:p>
          </table:table-cell>
          <table:table-cell office:value-type="string">
            <text:p>NUMBER(10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1">
            <text:p>7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문자 SND DTL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SMS_SND_DTL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문자 SND DTL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S_DTL_NO</text:p>
          </table:table-cell>
          <table:table-cell office:value-type="string">
            <text:p>문자 DTL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S_NO</text:p>
          </table:table-cell>
          <table:table-cell office:value-type="string">
            <text:p>문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SER_TEL</text:p>
          </table:table-cell>
          <table:table-cell office:value-type="string">
            <text:p>사용자 전화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ND_STTS_CD</text:p>
          </table:table-cell>
          <table:table-cell office:value-type="string">
            <text:p>발송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AIL_RSN_CN</text:p>
          </table:table-cell>
          <table:table-cell office:value-type="string">
            <text:p>실패 사유 내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ND_DT</text:p>
          </table:table-cell>
          <table:table-cell office:value-type="string">
            <text:p>발송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2">
            <text:p>72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설문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SURVEY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설문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RVEY_NO</text:p>
          </table:table-cell>
          <table:table-cell office:value-type="string">
            <text:p>설문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RVEY_NM</text:p>
          </table:table-cell>
          <table:table-cell office:value-type="string">
            <text:p>설문 명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RVEY_CN</text:p>
          </table:table-cell>
          <table:table-cell office:value-type="string">
            <text:p>설문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URVEY_TY_CD</text:p>
          </table:table-cell>
          <table:table-cell office:value-type="string">
            <text:p>설문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URVEY_QITEM_CN</text:p>
          </table:table-cell>
          <table:table-cell office:value-type="string">
            <text:p>설문 문항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URVEY_BGNG_DT</text:p>
          </table:table-cell>
          <table:table-cell office:value-type="string">
            <text:p>설문 시작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URVEY_END_DT</text:p>
          </table:table-cell>
          <table:table-cell office:value-type="string">
            <text:p>설문 종료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URVEY_STTS_CD</text:p>
          </table:table-cell>
          <table:table-cell office:value-type="string">
            <text:p>설문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GTR_ID</text:p>
          </table:table-cell>
          <table:table-cell office:value-type="string">
            <text:p>등록자 아이디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PT_CD</text:p>
          </table:table-cell>
          <table:table-cell office:value-type="string">
            <text:p>아파트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3">
            <text:p>73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설문 결과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SURVEY_RSL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설문 결과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RVEY_RSLT_NO</text:p>
          </table:table-cell>
          <table:table-cell office:value-type="string">
            <text:p>설문 결과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QITEM_NM</text:p>
          </table:table-cell>
          <table:table-cell office:value-type="string">
            <text:p>문항 명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/>
          <table:table-cell office:value-type="string">
            <text:p>U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SR_CN</text:p>
          </table:table-cell>
          <table:table-cell office:value-type="string">
            <text:p>응답 내용</text:p>
          </table:table-cell>
          <table:table-cell office:value-type="string">
            <text:p>N/A</text:p>
          </table:table-cell>
          <table:table-cell office:value-type="string">
            <text:p>VARCHAR2(200)</text:p>
          </table:table-cell>
          <table:table-cell office:value-type="string">
            <text:p>Not Null</text:p>
          </table:table-cell>
          <table:table-cell/>
          <table:table-cell office:value-type="string">
            <text:p>UK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NSR_CNT</text:p>
          </table:table-cell>
          <table:table-cell office:value-type="string">
            <text:p>응답 건수</text:p>
          </table:table-cell>
          <table:table-cell office:value-type="string">
            <text:p>N/A</text:p>
          </table:table-cell>
          <table:table-cell office:value-type="string">
            <text:p>NUMBER(10,0)</text:p>
          </table:table-cell>
          <table:table-cell office:value-type="string">
            <text:p>Not Null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URVEY_NO</text:p>
          </table:table-cell>
          <table:table-cell office:value-type="string">
            <text:p>설문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4">
            <text:p>74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설문 RSPNS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SURVEY_RSPNS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설문 RSPNS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SPNS_NO</text:p>
          </table:table-cell>
          <table:table-cell office:value-type="string">
            <text:p>응답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RVEY_NO</text:p>
          </table:table-cell>
          <table:table-cell office:value-type="string">
            <text:p>설문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SPNS_CN</text:p>
          </table:table-cell>
          <table:table-cell office:value-type="string">
            <text:p>응답 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5">
            <text:p>7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사용자 권한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USER_ROLE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사용자 권한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_ROLE_CD</text:p>
          </table:table-cell>
          <table:table-cell office:value-type="string">
            <text:p>사용자 권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office:value-type="string">
            <text:p>'ROLE_MEMBER'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6">
            <text:p>7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검침 제공자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UTILITY_PROVIDER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검침 제공자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TILITY_PROVIDER_NO</text:p>
          </table:table-cell>
          <table:table-cell office:value-type="string">
            <text:p>검침 제공자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T_CMPLEX_NO</text:p>
          </table:table-cell>
          <table:table-cell office:value-type="string">
            <text:p>아파트 단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SV_IDNTF_KEY</text:p>
          </table:table-cell>
          <table:table-cell office:value-type="string">
            <text:p>CSV 식별 키</text:p>
          </table:table-cell>
          <table:table-cell office:value-type="string">
            <text:p>N/A</text:p>
          </table:table-cell>
          <table:table-cell office:value-type="string">
            <text:p>VARCHAR2(255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T_CUST_NO</text:p>
          </table:table-cell>
          <table:table-cell office:value-type="string">
            <text:p>확장자 고객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MRK_CN</text:p>
          </table:table-cell>
          <table:table-cell office:value-type="string">
            <text:p>비고 내용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RTNER_NO</text:p>
          </table:table-cell>
          <table:table-cell office:value-type="string">
            <text:p>업체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NT_NO</text:p>
          </table:table-cell>
          <table:table-cell office:value-type="string">
            <text:p>계약 번호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ETER_TY_CD</text:p>
          </table:table-cell>
          <table:table-cell office:value-type="string">
            <text:p>검침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7">
            <text:p>7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방문 차량 예약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VST_VHCL_RSVT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방문 차량 예약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ST_VHCL_RSVT_NO</text:p>
          </table:table-cell>
          <table:table-cell office:value-type="string">
            <text:p>방문 차량 예약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ST_VHCL_TY_CD</text:p>
          </table:table-cell>
          <table:table-cell office:value-type="string">
            <text:p>방문 차량 유형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ST_VHCL_NO</text:p>
          </table:table-cell>
          <table:table-cell office:value-type="string">
            <text:p>방문 차량 번호</text:p>
          </table:table-cell>
          <table:table-cell office:value-type="string">
            <text:p>N/A</text:p>
          </table:table-cell>
          <table:table-cell office:value-type="string">
            <text:p>VARCHAR2(12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STR_NM</text:p>
          </table:table-cell>
          <table:table-cell office:value-type="string">
            <text:p>방문자 명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ST_YMD</text:p>
          </table:table-cell>
          <table:table-cell office:value-type="string">
            <text:p>방문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ST_STTS_CD</text:p>
          </table:table-cell>
          <table:table-cell office:value-type="string">
            <text:p>방문 상태 코드</text:p>
          </table:table-cell>
          <table:table-cell office:value-type="string">
            <text:p>N/A</text:p>
          </table:table-cell>
          <table:table-cell office:value-type="string">
            <text:p>VARCHAR2(2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G_DT</text:p>
          </table:table-cell>
          <table:table-cell office:value-type="string">
            <text:p>등록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DF_DT</text:p>
          </table:table-cell>
          <table:table-cell office:value-type="string">
            <text:p>수정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ST_PRPS_CN</text:p>
          </table:table-cell>
          <table:table-cell office:value-type="string">
            <text:p>방문 목적 내용</text:p>
          </table:table-cell>
          <table:table-cell office:value-type="string">
            <text:p>N/A</text:p>
          </table:table-cell>
          <table:table-cell office:value-type="string">
            <text:p>VARCHAR2(80)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R_NO</text:p>
          </table:table-cell>
          <table:table-cell office:value-type="string">
            <text:p>사용자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O_NO</text:p>
          </table:table-cell>
          <table:table-cell office:value-type="string">
            <text:p>호 번호</text:p>
          </table:table-cell>
          <table:table-cell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Y_HR</text:p>
          </table:table-cell>
          <table:table-cell office:value-type="string">
            <text:p>체류 HR</text:p>
          </table:table-cell>
          <table:table-cell office:value-type="string">
            <text:p>N/A</text:p>
          </table:table-cell>
          <table:table-cell office:value-type="string">
            <text:p>NUMBER(3,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테이블정의서</text:p>
          </table:table-cell>
          <table:covered-table-cell table:number-columns-repeated="7" table:style-name="ce5"/>
          <table:table-cell/>
          <table:table-cell table:style-name="ce12" office:value-type="float" office:value="78">
            <text:p>7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엔티티 타입명</text:p>
          </table:table-cell>
          <table:table-cell office:value-type="string" table:number-columns-spanned="2" table:number-rows-spanned="1">
            <text:p>웹훅 로그</text:p>
          </table:table-cell>
          <table:covered-table-cell/>
          <table:table-cell table:style-name="ce6" office:value-type="string">
            <text:p>작성일</text:p>
          </table:table-cell>
          <table:table-cell office:value-type="string" table:number-columns-spanned="2" table:number-rows-spanned="1">
            <text:p>2026/05/26</text:p>
          </table:table-cell>
          <table:covered-table-cell table:style-name="ce1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6" office:value-type="string">
            <text:p>테이블명</text:p>
          </table:table-cell>
          <table:table-cell table:style-name="ce8" office:value-type="string" table:number-columns-spanned="2" table:number-rows-spanned="1">
            <text:p>WEBHOOK_LOG</text:p>
          </table:table-cell>
          <table:covered-table-cell table:style-name="ce8"/>
          <table:table-cell table:style-name="ce6" office:value-type="string">
            <text:p>작성자</text:p>
          </table:table-cell>
          <table:table-cell office:value-type="string" table:number-columns-spanned="2" table:number-rows-spanned="1">
            <text:p>김지현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>
            <text:p>테이블 설명</text:p>
          </table:table-cell>
          <table:table-cell table:style-name="ce8" office:value-type="string" table:number-columns-spanned="7" table:number-rows-spanned="1">
            <text:p>웹훅 로그 테이블</text:p>
          </table:table-cell>
          <table:covered-table-cell table:style-name="ce8"/>
          <table:covered-table-cell table:number-columns-repeated="5"/>
          <table:table-cell table:number-columns-repeated="1016"/>
        </table:table-row>
        <table:table-row table:style-name="ro2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G_NO</text:p>
          </table:table-cell>
          <table:table-cell office:value-type="string">
            <text:p>로그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YLOAD</text:p>
          </table:table-cell>
          <table:table-cell office:value-type="string">
            <text:p>페이로드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VENT_TY</text:p>
          </table:table-cell>
          <table:table-cell office:value-type="string">
            <text:p>이벤트 유형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CEIVED_DT</text:p>
          </table:table-cell>
          <table:table-cell office:value-type="string">
            <text:p>수신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AY_NO</text:p>
          </table:table-cell>
          <table:table-cell office:value-type="string">
            <text:p>결제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YMT_NO</text:p>
          </table:table-cell>
          <table:table-cell office:value-type="string">
            <text:p>납부 번호</text:p>
          </table:table-cell>
          <table:table-cell office:value-type="string">
            <text:p>N/A</text:p>
          </table:table-cell>
          <table:table-cell office:value-type="string">
            <text:p>VARCHAR2(15)</text:p>
          </table:table-cell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table:style-name="ce9" table:number-columns-repeated="8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rlito" svg:font-family="Carlito" style:font-pitch="variable"/>
    <style:font-face style:name="맑은 고딕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rlito" fo:font-size="11pt" fo:font-style="normal" fo:text-shadow="none" style:text-underline-style="none" fo:font-weight="normal" style:font-size-asian="11pt" style:font-style-asian="normal" style:font-weight-asian="normal" style:font-name-complex="Carlit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4">2026-06-04</text:date>, <text:time>15:15:2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테이블정의서" style:display-name="PageStyle_테이블정의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4T15:15:20.95</dc:date>
    <meta:document-statistic meta:table-count="1" meta:cell-count="5960" meta:object-count="0"/>
    <meta:generator>OpenOffice/4.1.7$Win32 OpenOffice.org_project/417m1$Build-9800</meta:generator>
  </office:meta>
</office:document-meta>
</file>